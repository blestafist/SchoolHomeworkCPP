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dwaita Sans1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3.286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2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"/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afd095" fo:border="0.74pt solid #000000"/>
    </style:style>
    <style:style style:name="ce5" style:family="table-cell" style:parent-style-name="Default" style:data-style-name="N34">
      <style:table-cell-properties fo:background-color="#afd095" fo:border="0.74pt solid #000000"/>
    </style:style>
    <style:style style:name="ce6" style:family="table-cell" style:parent-style-name="Default">
      <style:table-cell-properties fo:background-color="#bf819e" fo:border="0.74pt solid #000000"/>
    </style:style>
    <style:style style:name="ce7" style:family="table-cell" style:parent-style-name="Default">
      <style:text-properties style:font-name="Liberation Serif" fo:font-size="10pt" fo:language="none" fo:country="none" style:font-name-asian="Adwaita Sans1" style:font-size-asian="10pt" style:language-asian="none" style:country-asian="none" style:font-name-complex="Noto Sans Arabic" style:font-size-complex="10pt" style:language-complex="none" style:country-complex="none"/>
    </style:style>
    <style:style style:name="ce8" style:family="table-cell" style:parent-style-name="Default" style:data-style-name="N3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36"/>
    <style:style style:name="ce14" style:family="table-cell" style:parent-style-name="Default" style:data-style-name="N11"/>
    <style:style style:name="ce1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 style:data-style-name="N11">
      <style:table-cell-properties fo:background-color="#b4c7dc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pady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5.7" calcext:value-type="float">
            <text:p>5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-3.8" calcext:value-type="float">
            <text:p>-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-3.9" calcext:value-type="float">
            <text:p>-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-6.6" calcext:value-type="float">
            <text:p>-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float" office:value="6.9" calcext:value-type="float">
            <text:p>6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8.1" calcext:value-type="float">
            <text:p>18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18.2" calcext:value-type="float">
            <text:p>18,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19.8" calcext:value-type="float">
            <text:p>19,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7.6" calcext:value-type="float">
            <text:p>17,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16.3" calcext:value-type="float">
            <text:p>16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23.2" calcext:value-type="float">
            <text:p>23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9.1" calcext:value-type="float">
            <text:p>19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0.4" calcext:value-type="float">
            <text:p>20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19.9" calcext:value-type="float">
            <text:p>1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0.7" calcext:value-type="float">
            <text:p>2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0.1" calcext:value-type="float">
            <text:p>20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6.6" calcext:value-type="float">
            <text:p>16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float" office:value="10.3" calcext:value-type="float">
            <text:p>10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10.1" calcext:value-type="float">
            <text:p>10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12.2" calcext:value-type="float">
            <text:p>12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11.8" calcext:value-type="float">
            <text:p>11,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12.1" calcext:value-type="float">
            <text:p>12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float" office:value="10.4" calcext:value-type="float">
            <text:p>10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float" office:value="14.3" calcext:value-type="float">
            <text:p>14,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float" office:value="5.9" calcext:value-type="float">
            <text:p>5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float" office:value="-2.3" calcext:value-type="float">
            <text:p>-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float" office:value="-2.8" calcext:value-type="float">
            <text:p>-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float" office:value="2.8" calcext:value-type="float">
            <text:p>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2.2" calcext:value-type="float">
            <text:p>2,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-1.9" calcext:value-type="float">
            <text:p>-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-0.7" calcext:value-type="float">
            <text:p>-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-3.3" calcext:value-type="float">
            <text:p>-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-4.9" calcext:value-type="float">
            <text:p>-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-5.6" calcext:value-type="float">
            <text:p>-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.9" calcext:value-type="float">
            <text:p>1,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Zadanie1" table:style-name="ta1">
        <table:shapes>
          <draw:frame draw:z-index="0" draw:style-name="gr1" draw:text-style-name="P1" svg:width="15.999cm" svg:height="8.999cm" svg:x="8.873cm" svg:y="6.739cm">
            <draw:object draw:notify-on-update-of-ranges="Zadanie1.G1:Zadanie1.G1 Zadanie1.G2:Zadanie1.G13 Zadanie1.H1:Zadanie1.H1 Zadanie1.H2:Zadanie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iesiąc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pady</text:p>
          </table:table-cell>
          <table:table-cell/>
          <table:table-cell table:style-name="ce3" office:value-type="string" calcext:value-type="string">
            <text:p>Miesiąc</text:p>
          </table:table-cell>
          <table:table-cell table:style-name="ce3" office:value-type="string" calcext:value-type="string">
            <text:p>Miesiąc (s)</text:p>
          </table:table-cell>
          <table:table-cell table:style-name="ce3" office:value-type="string" calcext:value-type="string">
            <text:p>Temperatura</text:p>
          </table:table-cell>
          <table:table-cell table:number-columns-repeated="2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table:formula="of:=MONTH([.A2])"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DATE(2022; [.F2]; 1)" office:value-type="date" office:date-value="2022-01-01" calcext:value-type="date">
            <text:p>styczeń</text:p>
          </table:table-cell>
          <table:table-cell table:style-name="ce6" table:formula="of:=ROUND(AVERAGEIF([.$B$2:.$B$366]; [.F2]; [.$C$2:.$C$366]); 1)" office:value-type="float" office:value="1.1" calcext:value-type="float">
            <text:p>1,1</text:p>
          </table:table-cell>
          <table:table-cell/>
          <table:table-cell table:style-name="ce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table:formula="of:=MONTH([.A3])"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DATE(2022; [.F3]; 1)" office:value-type="date" office:date-value="2022-02-01" calcext:value-type="date">
            <text:p>luty</text:p>
          </table:table-cell>
          <table:table-cell table:style-name="ce6" table:formula="of:=ROUND(AVERAGEIF([.$B$2:.$B$366]; [.F3]; [.$C$2:.$C$366]); 1)" office:value-type="float" office:value="4.1" calcext:value-type="float">
            <text:p>4,1</text:p>
          </table:table-cell>
          <table:table-cell table:number-columns-repeated="2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table:formula="of:=MONTH([.A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DATE(2022; [.F4]; 1)" office:value-type="date" office:date-value="2022-03-01" calcext:value-type="date">
            <text:p>marzec</text:p>
          </table:table-cell>
          <table:table-cell table:style-name="ce6" table:formula="of:=ROUND(AVERAGEIF([.$B$2:.$B$366]; [.F4]; [.$C$2:.$C$366]); 1)" office:value-type="float" office:value="4.1" calcext:value-type="float">
            <text:p>4,1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table:formula="of:=MONTH([.A5])" office:value-type="float" office:value="1" calcext:value-type="float">
            <text:p>1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DATE(2022; [.F5]; 1)" office:value-type="date" office:date-value="2022-04-01" calcext:value-type="date">
            <text:p>kwiecień</text:p>
          </table:table-cell>
          <table:table-cell table:style-name="ce6" table:formula="of:=ROUND(AVERAGEIF([.$B$2:.$B$366]; [.F5]; [.$C$2:.$C$366]); 1)" office:value-type="float" office:value="7.4" calcext:value-type="float">
            <text:p>7,4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table:formula="of:=MONTH([.A6])"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DATE(2022; [.F6]; 1)" office:value-type="date" office:date-value="2022-05-01" calcext:value-type="date">
            <text:p>maj</text:p>
          </table:table-cell>
          <table:table-cell table:style-name="ce6" table:formula="of:=ROUND(AVERAGEIF([.$B$2:.$B$366]; [.F6]; [.$C$2:.$C$366]); 1)" office:value-type="float" office:value="15.9" calcext:value-type="float">
            <text:p>15,9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table:formula="of:=MONTH([.A7])"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DATE(2022; [.F7]; 1)" office:value-type="date" office:date-value="2022-06-01" calcext:value-type="date">
            <text:p>czerwiec</text:p>
          </table:table-cell>
          <table:table-cell table:style-name="ce6" table:formula="of:=ROUND(AVERAGEIF([.$B$2:.$B$366]; [.F7]; [.$C$2:.$C$366]); 1)" office:value-type="float" office:value="20.5" calcext:value-type="float">
            <text:p>20,5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table:formula="of:=MONTH([.A8])" office:value-type="float" office:value="1" calcext:value-type="float">
            <text:p>1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DATE(2022; [.F8]; 1)" office:value-type="date" office:date-value="2022-07-01" calcext:value-type="date">
            <text:p>lipiec</text:p>
          </table:table-cell>
          <table:table-cell table:style-name="ce6" table:formula="of:=ROUND(AVERAGEIF([.$B$2:.$B$366]; [.F8]; [.$C$2:.$C$366]); 1)" office:value-type="float" office:value="20.4" calcext:value-type="float">
            <text:p>20,4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table:formula="of:=MONTH([.A9])"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DATE(2022; [.F9]; 1)" office:value-type="date" office:date-value="2022-08-01" calcext:value-type="date">
            <text:p>sierpień</text:p>
          </table:table-cell>
          <table:table-cell table:style-name="ce6" table:formula="of:=ROUND(AVERAGEIF([.$B$2:.$B$366]; [.F9]; [.$C$2:.$C$366]); 1)" office:value-type="float" office:value="21.1" calcext:value-type="float">
            <text:p>21,1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table:formula="of:=MONTH([.A10])"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DATE(2022; [.F10]; 1)" office:value-type="date" office:date-value="2022-09-01" calcext:value-type="date">
            <text:p>wrzesień</text:p>
          </table:table-cell>
          <table:table-cell table:style-name="ce6" table:formula="of:=ROUND(AVERAGEIF([.$B$2:.$B$366]; [.F10]; [.$C$2:.$C$366]); 1)" office:value-type="float" office:value="13.7" calcext:value-type="float">
            <text:p>13,7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table:formula="of:=MONTH([.A11])" office:value-type="float" office:value="1" calcext:value-type="float">
            <text:p>1</text:p>
          </table:table-cell>
          <table:table-cell office:value-type="float" office:value="-3.8" calcext:value-type="float">
            <text:p>-3,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DATE(2022; [.F11]; 1)" office:value-type="date" office:date-value="2022-10-01" calcext:value-type="date">
            <text:p>październik</text:p>
          </table:table-cell>
          <table:table-cell table:style-name="ce6" table:formula="of:=ROUND(AVERAGEIF([.$B$2:.$B$366]; [.F11]; [.$C$2:.$C$366]); 1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table:formula="of:=MONTH([.A12])" office:value-type="float" office:value="1" calcext:value-type="float">
            <text:p>1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DATE(2022; [.F12]; 1)" office:value-type="date" office:date-value="2022-11-01" calcext:value-type="date">
            <text:p>listopad</text:p>
          </table:table-cell>
          <table:table-cell table:style-name="ce6" table:formula="of:=ROUND(AVERAGEIF([.$B$2:.$B$366]; [.F12]; [.$C$2:.$C$366]); 1)" office:value-type="float" office:value="5.2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table:formula="of:=MONTH([.A13])" office:value-type="float" office:value="1" calcext:value-type="float">
            <text:p>1</text:p>
          </table:table-cell>
          <table:table-cell office:value-type="float" office:value="-3.9" calcext:value-type="float">
            <text:p>-3,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DATE(2022; [.F13]; 1)" office:value-type="date" office:date-value="2022-12-01" calcext:value-type="date">
            <text:p>grudzień</text:p>
          </table:table-cell>
          <table:table-cell table:style-name="ce6" table:formula="of:=ROUND(AVERAGEIF([.$B$2:.$B$366]; [.F13]; [.$C$2:.$C$366]); 1)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table:formula="of:=MONTH([.A14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table:formula="of:=MONTH([.A15])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table:formula="of:=MONTH([.A16])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table:formula="of:=MONTH([.A17])"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table:formula="of:=MONTH([.A18])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table:formula="of:=MONTH([.A19])" office:value-type="float" office:value="1" calcext:value-type="float">
            <text:p>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table:formula="of:=MONTH([.A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table:formula="of:=MONTH([.A21]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table:formula="of:=MONTH([.A22])" office:value-type="float" office:value="1" calcext:value-type="float">
            <text:p>1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table:formula="of:=MONTH([.A23])" office:value-type="float" office:value="1" calcext:value-type="float">
            <text:p>1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table:formula="of:=MONTH([.A24])" office:value-type="float" office:value="1" calcext:value-type="float">
            <text:p>1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table:formula="of:=MONTH([.A25])" office:value-type="float" office:value="1" calcext:value-type="float">
            <text:p>1</text:p>
          </table:table-cell>
          <table:table-cell office:value-type="float" office:value="-6.6" calcext:value-type="float">
            <text:p>-6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table:formula="of:=MONTH([.A26])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table:formula="of:=MONTH([.A27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table:formula="of:=MONTH([.A28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table:formula="of:=MONTH([.A29])"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table:formula="of:=MONTH([.A30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table:formula="of:=MONTH([.A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table:formula="of:=MONTH([.A32])"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table:formula="of:=MONTH([.A33]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table:formula="of:=MONTH([.A3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table:formula="of:=MONTH([.A35])"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table:formula="of:=MONTH([.A36])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table:formula="of:=MONTH([.A37])"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table:formula="of:=MONTH([.A38])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table:formula="of:=MONTH([.A39])"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table:formula="of:=MONTH([.A40])"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table:formula="of:=MONTH([.A41])"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table:formula="of:=MONTH([.A42])"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table:formula="of:=MONTH([.A43])"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table:formula="of:=MONTH([.A44])"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table:formula="of:=MONTH([.A45])"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table:formula="of:=MONTH([.A46])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table:formula="of:=MONTH([.A47])"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table:formula="of:=MONTH([.A48])"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table:formula="of:=MONTH([.A49])"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table:formula="of:=MONTH([.A50])" office:value-type="float" office:value="2" calcext:value-type="float">
            <text:p>2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table:formula="of:=MONTH([.A51])"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table:formula="of:=MONTH([.A52])"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table:formula="of:=MONTH([.A53])"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table:formula="of:=MONTH([.A54])"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table:formula="of:=MONTH([.A55])"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table:formula="of:=MONTH([.A56])"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table:formula="of:=MONTH([.A57])"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table:formula="of:=MONTH([.A58])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table:formula="of:=MONTH([.A59])"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table:formula="of:=MONTH([.A60])" office:value-type="float" office:value="2" calcext:value-type="float">
            <text:p>2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table:formula="of:=MONTH([.A61])" office:value-type="float" office:value="3" calcext:value-type="float">
            <text:p>3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table:formula="of:=MONTH([.A62])"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table:formula="of:=MONTH([.A6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table:formula="of:=MONTH([.A64])"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table:formula="of:=MONTH([.A65])"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table:formula="of:=MONTH([.A66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table:formula="of:=MONTH([.A67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table:formula="of:=MONTH([.A68])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table:formula="of:=MONTH([.A69]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table:formula="of:=MONTH([.A70])" office:value-type="float" office:value="3" calcext:value-type="float">
            <text:p>3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table:formula="of:=MONTH([.A71])" office:value-type="float" office:value="3" calcext:value-type="float">
            <text:p>3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table:formula="of:=MONTH([.A72])" office:value-type="float" office:value="3" calcext:value-type="float">
            <text:p>3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table:formula="of:=MONTH([.A73])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table:formula="of:=MONTH([.A74])"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table:formula="of:=MONTH([.A75])" office:value-type="float" office:value="3" calcext:value-type="float">
            <text:p>3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table:formula="of:=MONTH([.A76])"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table:formula="of:=MONTH([.A77])"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table:formula="of:=MONTH([.A7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table:formula="of:=MONTH([.A79])"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table:formula="of:=MONTH([.A80])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table:formula="of:=MONTH([.A81])"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table:formula="of:=MONTH([.A82])"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table:formula="of:=MONTH([.A83])"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table:formula="of:=MONTH([.A84])"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table:formula="of:=MONTH([.A85])"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table:formula="of:=MONTH([.A86])"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table:formula="of:=MONTH([.A87])" office:value-type="float" office:value="3" calcext:value-type="float">
            <text:p>3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table:formula="of:=MONTH([.A88])" office:value-type="float" office:value="3" calcext:value-type="float">
            <text:p>3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table:formula="of:=MONTH([.A89])" office:value-type="float" office:value="3" calcext:value-type="float">
            <text:p>3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table:formula="of:=MONTH([.A90])"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table:formula="of:=MONTH([.A91])"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table:formula="of:=MONTH([.A9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table:formula="of:=MONTH([.A93])" office:value-type="float" office:value="4" calcext:value-type="float">
            <text:p>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table:formula="of:=MONTH([.A94])"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table:formula="of:=MONTH([.A95])"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table:formula="of:=MONTH([.A96])"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table:formula="of:=MONTH([.A97])" office:value-type="float" office:value="4" calcext:value-type="float">
            <text:p>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table:formula="of:=MONTH([.A98])" office:value-type="float" office:value="4" calcext:value-type="float">
            <text:p>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table:formula="of:=MONTH([.A99])"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table:formula="of:=MONTH([.A100])" office:value-type="float" office:value="4" calcext:value-type="float">
            <text:p>4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table:formula="of:=MONTH([.A101])"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table:formula="of:=MONTH([.A102])"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table:formula="of:=MONTH([.A103])" office:value-type="float" office:value="4" calcext:value-type="float">
            <text:p>4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table:formula="of:=MONTH([.A104])" office:value-type="float" office:value="4" calcext:value-type="float">
            <text:p>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table:formula="of:=MONTH([.A105])" office:value-type="float" office:value="4" calcext:value-type="float">
            <text:p>4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table:formula="of:=MONTH([.A106])"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table:formula="of:=MONTH([.A107])" office:value-type="float" office:value="4" calcext:value-type="float">
            <text:p>4</text:p>
          </table:table-cell>
          <table:table-cell office:value-type="float" office:value="6.9" calcext:value-type="float">
            <text:p>6,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table:formula="of:=MONTH([.A108])" office:value-type="float" office:value="4" calcext:value-type="float">
            <text:p>4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table:formula="of:=MONTH([.A109])" office:value-type="float" office:value="4" calcext:value-type="float">
            <text:p>4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formula="of:=MONTH([.A110])"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formula="of:=MONTH([.A111])"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formula="of:=MONTH([.A112])" office:value-type="float" office:value="4" calcext:value-type="float">
            <text:p>4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formula="of:=MONTH([.A113])" office:value-type="float" office:value="4" calcext:value-type="float">
            <text:p>4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table:formula="of:=MONTH([.A114])" office:value-type="float" office:value="4" calcext:value-type="float">
            <text:p>4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table:formula="of:=MONTH([.A115])"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table:formula="of:=MONTH([.A116])"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table:formula="of:=MONTH([.A117])"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table:formula="of:=MONTH([.A118])" office:value-type="float" office:value="4" calcext:value-type="float">
            <text:p>4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table:formula="of:=MONTH([.A119])"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table:formula="of:=MONTH([.A120])"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table:formula="of:=MONTH([.A121])"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table:formula="of:=MONTH([.A122])" office:value-type="float" office:value="5" calcext:value-type="float">
            <text:p>5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table:formula="of:=MONTH([.A123])" office:value-type="float" office:value="5" calcext:value-type="float">
            <text:p>5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table:formula="of:=MONTH([.A124])" office:value-type="float" office:value="5" calcext:value-type="float">
            <text:p>5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table:formula="of:=MONTH([.A125])" office:value-type="float" office:value="5" calcext:value-type="float">
            <text:p>5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table:formula="of:=MONTH([.A126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table:formula="of:=MONTH([.A127])" office:value-type="float" office:value="5" calcext:value-type="float">
            <text:p>5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table:formula="of:=MONTH([.A128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table:formula="of:=MONTH([.A129])" office:value-type="float" office:value="5" calcext:value-type="float">
            <text:p>5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formula="of:=MONTH([.A130])"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table:formula="of:=MONTH([.A131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table:formula="of:=MONTH([.A132])" office:value-type="float" office:value="5" calcext:value-type="float">
            <text:p>5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table:formula="of:=MONTH([.A133])" office:value-type="float" office:value="5" calcext:value-type="float">
            <text:p>5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table:formula="of:=MONTH([.A134])" office:value-type="float" office:value="5" calcext:value-type="float">
            <text:p>5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table:formula="of:=MONTH([.A135])" office:value-type="float" office:value="5" calcext:value-type="float">
            <text:p>5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table:formula="of:=MONTH([.A136])" office:value-type="float" office:value="5" calcext:value-type="float">
            <text:p>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formula="of:=MONTH([.A137])" office:value-type="float" office:value="5" calcext:value-type="float">
            <text:p>5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formula="of:=MONTH([.A138])" office:value-type="float" office:value="5" calcext:value-type="float">
            <text:p>5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table:formula="of:=MONTH([.A139])"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table:formula="of:=MONTH([.A140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table:formula="of:=MONTH([.A141])" office:value-type="float" office:value="5" calcext:value-type="float">
            <text:p>5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table:formula="of:=MONTH([.A142])" office:value-type="float" office:value="5" calcext:value-type="float">
            <text:p>5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table:formula="of:=MONTH([.A143])" office:value-type="float" office:value="5" calcext:value-type="float">
            <text:p>5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table:formula="of:=MONTH([.A144])"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formula="of:=MONTH([.A145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table:formula="of:=MONTH([.A146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table:formula="of:=MONTH([.A147])" office:value-type="float" office:value="5" calcext:value-type="float">
            <text:p>5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table:formula="of:=MONTH([.A148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table:formula="of:=MONTH([.A149])" office:value-type="float" office:value="5" calcext:value-type="float">
            <text:p>5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table:formula="of:=MONTH([.A150])" office:value-type="float" office:value="5" calcext:value-type="float">
            <text:p>5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formula="of:=MONTH([.A151])" office:value-type="float" office:value="5" calcext:value-type="float">
            <text:p>5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table:formula="of:=MONTH([.A152])" office:value-type="float" office:value="5" calcext:value-type="float">
            <text:p>5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table:formula="of:=MONTH([.A153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table:formula="of:=MONTH([.A154])" office:value-type="float" office:value="6" calcext:value-type="float">
            <text:p>6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table:formula="of:=MONTH([.A155])"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table:formula="of:=MONTH([.A156])" office:value-type="float" office:value="6" calcext:value-type="float">
            <text:p>6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table:formula="of:=MONTH([.A157])" office:value-type="float" office:value="6" calcext:value-type="float">
            <text:p>6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table:formula="of:=MONTH([.A158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table:formula="of:=MONTH([.A159])" office:value-type="float" office:value="6" calcext:value-type="float">
            <text:p>6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table:formula="of:=MONTH([.A160])" office:value-type="float" office:value="6" calcext:value-type="float">
            <text:p>6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table:formula="of:=MONTH([.A161])" office:value-type="float" office:value="6" calcext:value-type="float">
            <text:p>6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table:formula="of:=MONTH([.A162])"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table:formula="of:=MONTH([.A163])" office:value-type="float" office:value="6" calcext:value-type="float">
            <text:p>6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table:formula="of:=MONTH([.A164])" office:value-type="float" office:value="6" calcext:value-type="float">
            <text:p>6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table:formula="of:=MONTH([.A165])" office:value-type="float" office:value="6" calcext:value-type="float">
            <text:p>6</text:p>
          </table:table-cell>
          <table:table-cell office:value-type="float" office:value="18.1" calcext:value-type="float">
            <text:p>18,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table:formula="of:=MONTH([.A166])"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table:formula="of:=MONTH([.A167])" office:value-type="float" office:value="6" calcext:value-type="float">
            <text:p>6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table:formula="of:=MONTH([.A168])"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table:formula="of:=MONTH([.A169])" office:value-type="float" office:value="6" calcext:value-type="float">
            <text:p>6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table:formula="of:=MONTH([.A170])" office:value-type="float" office:value="6" calcext:value-type="float">
            <text:p>6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table:formula="of:=MONTH([.A171])" office:value-type="float" office:value="6" calcext:value-type="float">
            <text:p>6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table:formula="of:=MONTH([.A172])" office:value-type="float" office:value="6" calcext:value-type="float">
            <text:p>6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table:formula="of:=MONTH([.A173])" office:value-type="float" office:value="6" calcext:value-type="float">
            <text:p>6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table:formula="of:=MONTH([.A174])" office:value-type="float" office:value="6" calcext:value-type="float">
            <text:p>6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table:formula="of:=MONTH([.A175])" office:value-type="float" office:value="6" calcext:value-type="float">
            <text:p>6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table:formula="of:=MONTH([.A176])"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table:formula="of:=MONTH([.A177])" office:value-type="float" office:value="6" calcext:value-type="float">
            <text:p>6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table:formula="of:=MONTH([.A178])" office:value-type="float" office:value="6" calcext:value-type="float">
            <text:p>6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table:formula="of:=MONTH([.A179])" office:value-type="float" office:value="6" calcext:value-type="float">
            <text:p>6</text:p>
          </table:table-cell>
          <table:table-cell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table:formula="of:=MONTH([.A180])" office:value-type="float" office:value="6" calcext:value-type="float">
            <text:p>6</text:p>
          </table:table-cell>
          <table:table-cell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table:formula="of:=MONTH([.A181])" office:value-type="float" office:value="6" calcext:value-type="float">
            <text:p>6</text:p>
          </table:table-cell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table:formula="of:=MONTH([.A182]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table:formula="of:=MONTH([.A183])" office:value-type="float" office:value="7" calcext:value-type="float">
            <text:p>7</text:p>
          </table:table-cell>
          <table:table-cell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table:formula="of:=MONTH([.A184])" office:value-type="float" office:value="7" calcext:value-type="float">
            <text:p>7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table:formula="of:=MONTH([.A185])" office:value-type="float" office:value="7" calcext:value-type="float">
            <text:p>7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table:formula="of:=MONTH([.A186])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table:formula="of:=MONTH([.A187])" office:value-type="float" office:value="7" calcext:value-type="float">
            <text:p>7</text:p>
          </table:table-cell>
          <table:table-cell office:value-type="float" office:value="19.8" calcext:value-type="float">
            <text:p>19,8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table:formula="of:=MONTH([.A188])" office:value-type="float" office:value="7" calcext:value-type="float">
            <text:p>7</text:p>
          </table:table-cell>
          <table:table-cell office:value-type="float" office:value="17.6" calcext:value-type="float">
            <text:p>17,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table:formula="of:=MONTH([.A189])" office:value-type="float" office:value="7" calcext:value-type="float">
            <text:p>7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table:formula="of:=MONTH([.A190])" office:value-type="float" office:value="7" calcext:value-type="float">
            <text:p>7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table:formula="of:=MONTH([.A191])"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table:formula="of:=MONTH([.A192])" office:value-type="float" office:value="7" calcext:value-type="float">
            <text:p>7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table:formula="of:=MONTH([.A193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table:formula="of:=MONTH([.A194])" office:value-type="float" office:value="7" calcext:value-type="float">
            <text:p>7</text:p>
          </table:table-cell>
          <table:table-cell office:value-type="float" office:value="16.3" calcext:value-type="float">
            <text:p>16,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table:formula="of:=MONTH([.A195])" office:value-type="float" office:value="7" calcext:value-type="float">
            <text:p>7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table:formula="of:=MONTH([.A196])" office:value-type="float" office:value="7" calcext:value-type="float">
            <text:p>7</text:p>
          </table:table-cell>
          <table:table-cell office:value-type="float" office:value="23.2" calcext:value-type="float">
            <text:p>23,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table:formula="of:=MONTH([.A197])" office:value-type="float" office:value="7" calcext:value-type="float">
            <text:p>7</text:p>
          </table:table-cell>
          <table:table-cell office:value-type="float" office:value="19.1" calcext:value-type="float">
            <text:p>19,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table:formula="of:=MONTH([.A198])" office:value-type="float" office:value="7" calcext:value-type="float">
            <text:p>7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table:formula="of:=MONTH([.A199])" office:value-type="float" office:value="7" calcext:value-type="float">
            <text:p>7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table:formula="of:=MONTH([.A200])" office:value-type="float" office:value="7" calcext:value-type="float">
            <text:p>7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table:formula="of:=MONTH([.A201])" office:value-type="float" office:value="7" calcext:value-type="float">
            <text:p>7</text:p>
          </table:table-cell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table:formula="of:=MONTH([.A202])" office:value-type="float" office:value="7" calcext:value-type="float">
            <text:p>7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table:formula="of:=MONTH([.A203])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table:formula="of:=MONTH([.A204])" office:value-type="float" office:value="7" calcext:value-type="float">
            <text:p>7</text:p>
          </table:table-cell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table:formula="of:=MONTH([.A205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table:formula="of:=MONTH([.A206])" office:value-type="float" office:value="7" calcext:value-type="float">
            <text:p>7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table:formula="of:=MONTH([.A207])" office:value-type="float" office:value="7" calcext:value-type="float">
            <text:p>7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table:formula="of:=MONTH([.A208])" office:value-type="float" office:value="7" calcext:value-type="float">
            <text:p>7</text:p>
          </table:table-cell>
          <table:table-cell office:value-type="float" office:value="20.4" calcext:value-type="float">
            <text:p>20,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table:formula="of:=MONTH([.A209])"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table:formula="of:=MONTH([.A210])"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table:formula="of:=MONTH([.A211])" office:value-type="float" office:value="7" calcext:value-type="float">
            <text:p>7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table:formula="of:=MONTH([.A212])" office:value-type="float" office:value="7" calcext:value-type="float">
            <text:p>7</text:p>
          </table:table-cell>
          <table:table-cell office:value-type="float" office:value="20.7" calcext:value-type="float">
            <text:p>20,7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table:formula="of:=MONTH([.A213])" office:value-type="float" office:value="7" calcext:value-type="float">
            <text:p>7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table:formula="of:=MONTH([.A214])" office:value-type="float" office:value="8" calcext:value-type="float">
            <text:p>8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table:formula="of:=MONTH([.A215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table:formula="of:=MONTH([.A216])" office:value-type="float" office:value="8" calcext:value-type="float">
            <text:p>8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table:formula="of:=MONTH([.A217])" office:value-type="float" office:value="8" calcext:value-type="float">
            <text:p>8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table:formula="of:=MONTH([.A218])" office:value-type="float" office:value="8" calcext:value-type="float">
            <text:p>8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table:formula="of:=MONTH([.A219])" office:value-type="float" office:value="8" calcext:value-type="float">
            <text:p>8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table:formula="of:=MONTH([.A220])"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table:formula="of:=MONTH([.A221])" office:value-type="float" office:value="8" calcext:value-type="float">
            <text:p>8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table:formula="of:=MONTH([.A222])" office:value-type="float" office:value="8" calcext:value-type="float">
            <text:p>8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table:formula="of:=MONTH([.A223])" office:value-type="float" office:value="8" calcext:value-type="float">
            <text:p>8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table:formula="of:=MONTH([.A224])" office:value-type="float" office:value="8" calcext:value-type="float">
            <text:p>8</text:p>
          </table:table-cell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table:formula="of:=MONTH([.A225])" office:value-type="float" office:value="8" calcext:value-type="float">
            <text:p>8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table:formula="of:=MONTH([.A226])" office:value-type="float" office:value="8" calcext:value-type="float">
            <text:p>8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table:formula="of:=MONTH([.A227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table:formula="of:=MONTH([.A228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table:formula="of:=MONTH([.A229])" office:value-type="float" office:value="8" calcext:value-type="float">
            <text:p>8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table:formula="of:=MONTH([.A230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table:formula="of:=MONTH([.A231])" office:value-type="float" office:value="8" calcext:value-type="float">
            <text:p>8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table:formula="of:=MONTH([.A232])" office:value-type="float" office:value="8" calcext:value-type="float">
            <text:p>8</text:p>
          </table:table-cell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table:formula="of:=MONTH([.A233])"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table:formula="of:=MONTH([.A234])" office:value-type="float" office:value="8" calcext:value-type="float">
            <text:p>8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table:formula="of:=MONTH([.A235])" office:value-type="float" office:value="8" calcext:value-type="float">
            <text:p>8</text:p>
          </table:table-cell>
          <table:table-cell office:value-type="float" office:value="20.1" calcext:value-type="float">
            <text:p>20,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table:formula="of:=MONTH([.A236])" office:value-type="float" office:value="8" calcext:value-type="float">
            <text:p>8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table:formula="of:=MONTH([.A237])" office:value-type="float" office:value="8" calcext:value-type="float">
            <text:p>8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table:formula="of:=MONTH([.A238])" office:value-type="float" office:value="8" calcext:value-type="float">
            <text:p>8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table:formula="of:=MONTH([.A239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table:formula="of:=MONTH([.A240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table:formula="of:=MONTH([.A241])" office:value-type="float" office:value="8" calcext:value-type="float">
            <text:p>8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table:formula="of:=MONTH([.A242])" office:value-type="float" office:value="8" calcext:value-type="float">
            <text:p>8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table:formula="of:=MONTH([.A243])" office:value-type="float" office:value="8" calcext:value-type="float">
            <text:p>8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table:formula="of:=MONTH([.A244])" office:value-type="float" office:value="8" calcext:value-type="float">
            <text:p>8</text:p>
          </table:table-cell>
          <table:table-cell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table:formula="of:=MONTH([.A245])" office:value-type="float" office:value="9" calcext:value-type="float">
            <text:p>9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MONTH([.A246])" office:value-type="float" office:value="9" calcext:value-type="float">
            <text:p>9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MONTH([.A247])" office:value-type="float" office:value="9" calcext:value-type="float">
            <text:p>9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MONTH([.A248])" office:value-type="float" office:value="9" calcext:value-type="float">
            <text:p>9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MONTH([.A249])"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MONTH([.A250])" office:value-type="float" office:value="9" calcext:value-type="float">
            <text:p>9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MONTH([.A251])" office:value-type="float" office:value="9" calcext:value-type="float">
            <text:p>9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MONTH([.A252])" office:value-type="float" office:value="9" calcext:value-type="float">
            <text:p>9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MONTH([.A253])" office:value-type="float" office:value="9" calcext:value-type="float">
            <text:p>9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MONTH([.A254])" office:value-type="float" office:value="9" calcext:value-type="float">
            <text:p>9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MONTH([.A255])" office:value-type="float" office:value="9" calcext:value-type="float">
            <text:p>9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MONTH([.A256])"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MONTH([.A257])" office:value-type="float" office:value="9" calcext:value-type="float">
            <text:p>9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MONTH([.A258])" office:value-type="float" office:value="9" calcext:value-type="float">
            <text:p>9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MONTH([.A259])" office:value-type="float" office:value="9" calcext:value-type="float">
            <text:p>9</text:p>
          </table:table-cell>
          <table:table-cell office:value-type="float" office:value="16.6" calcext:value-type="float">
            <text:p>16,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MONTH([.A260])" office:value-type="float" office:value="9" calcext:value-type="float">
            <text:p>9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MONTH([.A261])"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MONTH([.A262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MONTH([.A263])" office:value-type="float" office:value="9" calcext:value-type="float">
            <text:p>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MONTH([.A264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MONTH([.A265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MONTH([.A266])"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table:formula="of:=MONTH([.A267]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MONTH([.A268])" office:value-type="float" office:value="9" calcext:value-type="float">
            <text:p>9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MONTH([.A269])"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MONTH([.A270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MONTH([.A271])"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MONTH([.A272])" office:value-type="float" office:value="9" calcext:value-type="float">
            <text:p>9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MONTH([.A273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MONTH([.A274])"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table:formula="of:=MONTH([.A275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table:formula="of:=MONTH([.A276])" office:value-type="float" office:value="10" calcext:value-type="float">
            <text:p>10</text:p>
          </table:table-cell>
          <table:table-cell office:value-type="float" office:value="12.1" calcext:value-type="float">
            <text:p>12,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table:formula="of:=MONTH([.A277])"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table:formula="of:=MONTH([.A278])"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table:formula="of:=MONTH([.A279])" office:value-type="float" office:value="10" calcext:value-type="float">
            <text:p>10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table:formula="of:=MONTH([.A280])" office:value-type="float" office:value="10" calcext:value-type="float">
            <text:p>10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table:formula="of:=MONTH([.A281])" office:value-type="float" office:value="10" calcext:value-type="float">
            <text:p>10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table:formula="of:=MONTH([.A282])"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table:formula="of:=MONTH([.A283])" office:value-type="float" office:value="10" calcext:value-type="float">
            <text:p>10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table:formula="of:=MONTH([.A284])"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table:formula="of:=MONTH([.A285])"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table:formula="of:=MONTH([.A286])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table:formula="of:=MONTH([.A287])"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table:formula="of:=MONTH([.A288])"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table:formula="of:=MONTH([.A289])" office:value-type="float" office:value="10" calcext:value-type="float">
            <text:p>10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table:formula="of:=MONTH([.A290])" office:value-type="float" office:value="10" calcext:value-type="float">
            <text:p>10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table:formula="of:=MONTH([.A291])" office:value-type="float" office:value="10" calcext:value-type="float">
            <text:p>10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table:formula="of:=MONTH([.A292])" office:value-type="float" office:value="10" calcext:value-type="float">
            <text:p>10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table:formula="of:=MONTH([.A293])"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table:formula="of:=MONTH([.A294])"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table:formula="of:=MONTH([.A295])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table:formula="of:=MONTH([.A296])"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table:formula="of:=MONTH([.A297])" office:value-type="float" office:value="10" calcext:value-type="float">
            <text:p>10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table:formula="of:=MONTH([.A298])" office:value-type="float" office:value="10" calcext:value-type="float">
            <text:p>10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table:formula="of:=MONTH([.A299])" office:value-type="float" office:value="10" calcext:value-type="float">
            <text:p>10</text:p>
          </table:table-cell>
          <table:table-cell office:value-type="float" office:value="14.3" calcext:value-type="float">
            <text:p>14,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table:formula="of:=MONTH([.A300])"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table:formula="of:=MONTH([.A30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table:formula="of:=MONTH([.A302])" office:value-type="float" office:value="10" calcext:value-type="float">
            <text:p>10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table:formula="of:=MONTH([.A303])" office:value-type="float" office:value="10" calcext:value-type="float">
            <text:p>10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table:formula="of:=MONTH([.A304])"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table:formula="of:=MONTH([.A305])" office:value-type="float" office:value="10" calcext:value-type="float">
            <text:p>10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table:formula="of:=MONTH([.A306])"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table:formula="of:=MONTH([.A307])" office:value-type="float" office:value="11" calcext:value-type="float">
            <text:p>11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table:formula="of:=MONTH([.A30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table:formula="of:=MONTH([.A309])"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table:formula="of:=MONTH([.A310])"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table:formula="of:=MONTH([.A311])"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table:formula="of:=MONTH([.A312])" office:value-type="float" office:value="11" calcext:value-type="float">
            <text:p>1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table:formula="of:=MONTH([.A313])" office:value-type="float" office:value="11" calcext:value-type="float">
            <text:p>1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table:formula="of:=MONTH([.A314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table:formula="of:=MONTH([.A315])" office:value-type="float" office:value="11" calcext:value-type="float">
            <text:p>1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table:formula="of:=MONTH([.A316])"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table:formula="of:=MONTH([.A317])" office:value-type="float" office:value="11" calcext:value-type="float">
            <text:p>11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table:formula="of:=MONTH([.A318])" office:value-type="float" office:value="11" calcext:value-type="float">
            <text:p>11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table:formula="of:=MONTH([.A31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table:formula="of:=MONTH([.A320])"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table:formula="of:=MONTH([.A321])" office:value-type="float" office:value="11" calcext:value-type="float">
            <text:p>11</text:p>
          </table:table-cell>
          <table:table-cell office:value-type="float" office:value="5.9" calcext:value-type="float">
            <text:p>5,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table:formula="of:=MONTH([.A322])"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table:formula="of:=MONTH([.A323])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table:formula="of:=MONTH([.A324])" office:value-type="float" office:value="11" calcext:value-type="float">
            <text:p>11</text:p>
          </table:table-cell>
          <table:table-cell office:value-type="float" office:value="-2.3" calcext:value-type="float">
            <text:p>-2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table:formula="of:=MONTH([.A325])" office:value-type="float" office:value="11" calcext:value-type="float">
            <text:p>11</text:p>
          </table:table-cell>
          <table:table-cell office:value-type="float" office:value="-2.8" calcext:value-type="float">
            <text:p>-2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table:formula="of:=MONTH([.A326])"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table:formula="of:=MONTH([.A327])"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table:formula="of:=MONTH([.A328])" office:value-type="float" office:value="11" calcext:value-type="float">
            <text:p>1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table:formula="of:=MONTH([.A329])"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table:formula="of:=MONTH([.A330])"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table:formula="of:=MONTH([.A331])"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formula="of:=MONTH([.A332])"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table:formula="of:=MONTH([.A333])"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table:formula="of:=MONTH([.A334])"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table:formula="of:=MONTH([.A335])" office:value-type="float" office:value="11" calcext:value-type="float">
            <text:p>1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table:formula="of:=MONTH([.A336])"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table:formula="of:=MONTH([.A337])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table:formula="of:=MONTH([.A338])"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table:formula="of:=MONTH([.A339])"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table:formula="of:=MONTH([.A340])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table:formula="of:=MONTH([.A341])"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formula="of:=MONTH([.A342])"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table:formula="of:=MONTH([.A343])"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table:formula="of:=MONTH([.A344])"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table:formula="of:=MONTH([.A345])"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table:formula="of:=MONTH([.A346])" office:value-type="float" office:value="12" calcext:value-type="float">
            <text:p>12</text:p>
          </table:table-cell>
          <table:table-cell office:value-type="float" office:value="-1.9" calcext:value-type="float">
            <text:p>-1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table:formula="of:=MONTH([.A347])"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table:formula="of:=MONTH([.A348])" office:value-type="float" office:value="12" calcext:value-type="float">
            <text:p>12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table:formula="of:=MONTH([.A349])" office:value-type="float" office:value="12" calcext:value-type="float">
            <text:p>12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table:formula="of:=MONTH([.A350])" office:value-type="float" office:value="12" calcext:value-type="float">
            <text:p>12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table:formula="of:=MONTH([.A351])" office:value-type="float" office:value="12" calcext:value-type="float">
            <text:p>12</text:p>
          </table:table-cell>
          <table:table-cell office:value-type="float" office:value="-0.7" calcext:value-type="float">
            <text:p>-0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table:formula="of:=MONTH([.A352])" office:value-type="float" office:value="12" calcext:value-type="float">
            <text:p>12</text:p>
          </table:table-cell>
          <table:table-cell office:value-type="float" office:value="-3.3" calcext:value-type="float">
            <text:p>-3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table:formula="of:=MONTH([.A353])" office:value-type="float" office:value="12" calcext:value-type="float">
            <text:p>12</text:p>
          </table:table-cell>
          <table:table-cell office:value-type="float" office:value="-4.9" calcext:value-type="float">
            <text:p>-4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table:formula="of:=MONTH([.A354])" office:value-type="float" office:value="12" calcext:value-type="float">
            <text:p>12</text:p>
          </table:table-cell>
          <table:table-cell office:value-type="float" office:value="-5.6" calcext:value-type="float">
            <text:p>-5,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table:formula="of:=MONTH([.A355])"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table:formula="of:=MONTH([.A356])"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formula="of:=MONTH([.A357])"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formula="of:=MONTH([.A358])"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formula="of:=MONTH([.A359])"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formula="of:=MONTH([.A360])"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formula="of:=MONTH([.A361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formula="of:=MONTH([.A362])" office:value-type="float" office:value="12" calcext:value-type="float">
            <text:p>12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formula="of:=MONTH([.A363])"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formula="of:=MONTH([.A364])" office:value-type="float" office:value="12" calcext:value-type="float">
            <text:p>12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formula="of:=MONTH([.A365])"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formula="of:=MONTH([.A366])" office:value-type="float" office:value="12" calcext:value-type="float">
            <text:p>12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Zadanie2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pady</text:p>
          </table:table-cell>
          <table:table-cell office:value-type="string" calcext:value-type="string">
            <text:p>Streak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8" table:formula="of:=MONTH([.A2])"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Miesiąc</text:p>
          </table:table-cell>
          <table:table-cell table:style-name="ce10" office:value-type="string" calcext:value-type="string">
            <text:p>Max streak</text:p>
          </table:table-cell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8" table:formula="of:=MONTH([.A3])"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table:formula="of:=IF(AND([.D3] = 0; DAY([.A3] &lt;&gt; 1)); [.E2] + 1; 0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2" table:formula="of:=COM.MICROSOFT.MAXIFS([.$E$2:.$E$366]; [.$B$2:.$B$366]; [.G3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8" table:formula="of:=MONTH([.A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AND([.D4] = 0; DAY([.A4] &lt;&gt; 1)); [.E3] + 1; 0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2" table:formula="of:=COM.MICROSOFT.MAXIFS([.$E$2:.$E$366]; [.$B$2:.$B$366]; [.G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8" table:formula="of:=MONTH([.A5])" office:value-type="float" office:value="1" calcext:value-type="float">
            <text:p>1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table:formula="of:=IF(AND([.D5] = 0; DAY([.A5] &lt;&gt; 1)); [.E4] + 1; 0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2" table:formula="of:=COM.MICROSOFT.MAXIFS([.$E$2:.$E$366]; [.$B$2:.$B$366]; [.G5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8" table:formula="of:=MONTH([.A6])"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5" calcext:value-type="float">
            <text:p>5</text:p>
          </table:table-cell>
          <table:table-cell table:formula="of:=IF(AND([.D6] = 0; DAY([.A6] &lt;&gt; 1)); [.E5] + 1; 0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2" table:formula="of:=COM.MICROSOFT.MAXIFS([.$E$2:.$E$366]; [.$B$2:.$B$366]; [.G6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8" table:formula="of:=MONTH([.A7])"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formula="of:=IF(AND([.D7] = 0; DAY([.A7] &lt;&gt; 1)); [.E6] + 1; 0)"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2" table:formula="of:=COM.MICROSOFT.MAXIFS([.$E$2:.$E$366]; [.$B$2:.$B$366]; [.G7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8" table:formula="of:=MONTH([.A8])" office:value-type="float" office:value="1" calcext:value-type="float">
            <text:p>1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table:formula="of:=IF(AND([.D8] = 0; DAY([.A8] &lt;&gt; 1)); [.E7] + 1; 0)" office:value-type="float" office:value="2" calcext:value-type="float">
            <text:p>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2" table:formula="of:=COM.MICROSOFT.MAXIFS([.$E$2:.$E$366]; [.$B$2:.$B$366]; [.G8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8" table:formula="of:=MONTH([.A9])"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table:formula="of:=IF(AND([.D9] = 0; DAY([.A9] &lt;&gt; 1)); [.E8] + 1; 0)" office:value-type="float" office:value="3" calcext:value-type="float">
            <text:p>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2" table:formula="of:=COM.MICROSOFT.MAXIFS([.$E$2:.$E$366]; [.$B$2:.$B$366]; [.G9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8" table:formula="of:=MONTH([.A10])"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  <table:table-cell table:formula="of:=IF(AND([.D10] = 0; DAY([.A10] &lt;&gt; 1)); [.E9] + 1; 0)" office:value-type="float" office:value="4" calcext:value-type="float">
            <text:p>4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2" table:formula="of:=COM.MICROSOFT.MAXIFS([.$E$2:.$E$366]; [.$B$2:.$B$366]; [.G10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8" table:formula="of:=MONTH([.A11])" office:value-type="float" office:value="1" calcext:value-type="float">
            <text:p>1</text:p>
          </table:table-cell>
          <table:table-cell office:value-type="float" office:value="-3.8" calcext:value-type="float">
            <text:p>-3,8</text:p>
          </table:table-cell>
          <table:table-cell office:value-type="float" office:value="0" calcext:value-type="float">
            <text:p>0</text:p>
          </table:table-cell>
          <table:table-cell table:formula="of:=IF(AND([.D11] = 0; DAY([.A11] &lt;&gt; 1)); [.E10] + 1; 0)" office:value-type="float" office:value="5" calcext:value-type="float">
            <text:p>5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2" table:formula="of:=COM.MICROSOFT.MAXIFS([.$E$2:.$E$366]; [.$B$2:.$B$366]; [.G11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8" table:formula="of:=MONTH([.A12])" office:value-type="float" office:value="1" calcext:value-type="float">
            <text:p>1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table:formula="of:=IF(AND([.D12] = 0; DAY([.A12] &lt;&gt; 1)); [.E11] + 1; 0)" office:value-type="float" office:value="6" calcext:value-type="float">
            <text:p>6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2" table:formula="of:=COM.MICROSOFT.MAXIFS([.$E$2:.$E$366]; [.$B$2:.$B$366]; [.G12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8" table:formula="of:=MONTH([.A13])" office:value-type="float" office:value="1" calcext:value-type="float">
            <text:p>1</text:p>
          </table:table-cell>
          <table:table-cell office:value-type="float" office:value="-3.9" calcext:value-type="float">
            <text:p>-3,9</text:p>
          </table:table-cell>
          <table:table-cell office:value-type="float" office:value="0" calcext:value-type="float">
            <text:p>0</text:p>
          </table:table-cell>
          <table:table-cell table:formula="of:=IF(AND([.D13] = 0; DAY([.A13] &lt;&gt; 1)); [.E12] + 1; 0)" office:value-type="float" office:value="7" calcext:value-type="float">
            <text:p>7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2" table:formula="of:=COM.MICROSOFT.MAXIFS([.$E$2:.$E$366]; [.$B$2:.$B$366]; [.G13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8" table:formula="of:=MONTH([.A14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formula="of:=IF(AND([.D14] = 0; DAY([.A14] &lt;&gt; 1)); [.E13] + 1; 0)" office:value-type="float" office:value="8" calcext:value-type="float">
            <text:p>8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2" table:formula="of:=COM.MICROSOFT.MAXIFS([.$E$2:.$E$366]; [.$B$2:.$B$366]; [.G14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8" table:formula="of:=MONTH([.A15])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formula="of:=IF(AND([.D15] = 0; DAY([.A15] &lt;&gt; 1)); [.E14] + 1; 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8" table:formula="of:=MONTH([.A16])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formula="of:=IF(AND([.D16] = 0; DAY([.A16] &lt;&gt; 1)); [.E15] + 1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8" table:formula="of:=MONTH([.A17])"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table:formula="of:=IF(AND([.D17] = 0; DAY([.A17] &lt;&gt; 1)); [.E16] + 1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8" table:formula="of:=MONTH([.A18])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formula="of:=IF(AND([.D18] = 0; DAY([.A18] &lt;&gt; 1)); [.E17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8" table:formula="of:=MONTH([.A19])" office:value-type="float" office:value="1" calcext:value-type="float">
            <text:p>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formula="of:=IF(AND([.D19] = 0; DAY([.A19] &lt;&gt; 1)); [.E18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8" table:formula="of:=MONTH([.A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D20] = 0; DAY([.A20] &lt;&gt; 1)); [.E19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8" table:formula="of:=MONTH([.A21]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IF(AND([.D21] = 0; DAY([.A21] &lt;&gt; 1)); [.E20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8" table:formula="of:=MONTH([.A22])" office:value-type="float" office:value="1" calcext:value-type="float">
            <text:p>1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table:formula="of:=IF(AND([.D22] = 0; DAY([.A22] &lt;&gt; 1)); [.E21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8" table:formula="of:=MONTH([.A23])" office:value-type="float" office:value="1" calcext:value-type="float">
            <text:p>1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table:formula="of:=IF(AND([.D23] = 0; DAY([.A23] &lt;&gt; 1)); [.E22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8" table:formula="of:=MONTH([.A24])" office:value-type="float" office:value="1" calcext:value-type="float">
            <text:p>1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table:formula="of:=IF(AND([.D24] = 0; DAY([.A24] &lt;&gt; 1)); [.E23] + 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8" table:formula="of:=MONTH([.A25])" office:value-type="float" office:value="1" calcext:value-type="float">
            <text:p>1</text:p>
          </table:table-cell>
          <table:table-cell office:value-type="float" office:value="-6.6" calcext:value-type="float">
            <text:p>-6,6</text:p>
          </table:table-cell>
          <table:table-cell office:value-type="float" office:value="0" calcext:value-type="float">
            <text:p>0</text:p>
          </table:table-cell>
          <table:table-cell table:formula="of:=IF(AND([.D25] = 0; DAY([.A25] &lt;&gt; 1)); [.E24] + 1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8" table:formula="of:=MONTH([.A26])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IF(AND([.D26] = 0; DAY([.A26] &lt;&gt; 1)); [.E25] + 1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8" table:formula="of:=MONTH([.A27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IF(AND([.D27] = 0; DAY([.A27] &lt;&gt; 1)); [.E26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8" table:formula="of:=MONTH([.A28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IF(AND([.D28] = 0; DAY([.A28] &lt;&gt; 1)); [.E27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8" table:formula="of:=MONTH([.A29])"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table:formula="of:=IF(AND([.D29] = 0; DAY([.A29] &lt;&gt; 1)); [.E28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8" table:formula="of:=MONTH([.A30])"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formula="of:=IF(AND([.D30] = 0; DAY([.A30] &lt;&gt; 1)); [.E29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30" calcext:value-type="date">
            <text:p>2022-01-30</text:p>
          </table:table-cell>
          <table:table-cell table:style-name="ce8" table:formula="of:=MONTH([.A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D31] = 0; DAY([.A31] &lt;&gt; 1)); [.E30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1-31" calcext:value-type="date">
            <text:p>2022-01-31</text:p>
          </table:table-cell>
          <table:table-cell table:style-name="ce8" table:formula="of:=MONTH([.A32])"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formula="of:=IF(AND([.D32] = 0; DAY([.A32] &lt;&gt; 1)); [.E31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1" calcext:value-type="date">
            <text:p>2022-02-01</text:p>
          </table:table-cell>
          <table:table-cell table:style-name="ce8" table:formula="of:=MONTH([.A33]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IF(AND([.D33] = 0; DAY([.A33] &lt;&gt; 1)); [.E32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2" calcext:value-type="date">
            <text:p>2022-02-02</text:p>
          </table:table-cell>
          <table:table-cell table:style-name="ce8" table:formula="of:=MONTH([.A3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D34] = 0; DAY([.A34] &lt;&gt; 1)); [.E33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3" calcext:value-type="date">
            <text:p>2022-02-03</text:p>
          </table:table-cell>
          <table:table-cell table:style-name="ce8" table:formula="of:=MONTH([.A35])"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IF(AND([.D35] = 0; DAY([.A35] &lt;&gt; 1)); [.E34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4" calcext:value-type="date">
            <text:p>2022-02-04</text:p>
          </table:table-cell>
          <table:table-cell table:style-name="ce8" table:formula="of:=MONTH([.A36])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formula="of:=IF(AND([.D36] = 0; DAY([.A36] &lt;&gt; 1)); [.E35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5" calcext:value-type="date">
            <text:p>2022-02-05</text:p>
          </table:table-cell>
          <table:table-cell table:style-name="ce8" table:formula="of:=MONTH([.A37])"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formula="of:=IF(AND([.D37] = 0; DAY([.A37] &lt;&gt; 1)); [.E36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6" calcext:value-type="date">
            <text:p>2022-02-06</text:p>
          </table:table-cell>
          <table:table-cell table:style-name="ce8" table:formula="of:=MONTH([.A38])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AND([.D38] = 0; DAY([.A38] &lt;&gt; 1)); [.E37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7" calcext:value-type="date">
            <text:p>2022-02-07</text:p>
          </table:table-cell>
          <table:table-cell table:style-name="ce8" table:formula="of:=MONTH([.A39])"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formula="of:=IF(AND([.D39] = 0; DAY([.A39] &lt;&gt; 1)); [.E38] + 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8" calcext:value-type="date">
            <text:p>2022-02-08</text:p>
          </table:table-cell>
          <table:table-cell table:style-name="ce8" table:formula="of:=MONTH([.A40])"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formula="of:=IF(AND([.D40] = 0; DAY([.A40] &lt;&gt; 1)); [.E39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09" calcext:value-type="date">
            <text:p>2022-02-09</text:p>
          </table:table-cell>
          <table:table-cell table:style-name="ce8" table:formula="of:=MONTH([.A41])"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formula="of:=IF(AND([.D41] = 0; DAY([.A41] &lt;&gt; 1)); [.E40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0" calcext:value-type="date">
            <text:p>2022-02-10</text:p>
          </table:table-cell>
          <table:table-cell table:style-name="ce8" table:formula="of:=MONTH([.A42])"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formula="of:=IF(AND([.D42] = 0; DAY([.A42] &lt;&gt; 1)); [.E41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1" calcext:value-type="date">
            <text:p>2022-02-11</text:p>
          </table:table-cell>
          <table:table-cell table:style-name="ce8" table:formula="of:=MONTH([.A43])"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formula="of:=IF(AND([.D43] = 0; DAY([.A43] &lt;&gt; 1)); [.E42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2" calcext:value-type="date">
            <text:p>2022-02-12</text:p>
          </table:table-cell>
          <table:table-cell table:style-name="ce8" table:formula="of:=MONTH([.A44])"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IF(AND([.D44] = 0; DAY([.A44] &lt;&gt; 1)); [.E43] + 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3" calcext:value-type="date">
            <text:p>2022-02-13</text:p>
          </table:table-cell>
          <table:table-cell table:style-name="ce8" table:formula="of:=MONTH([.A45])"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formula="of:=IF(AND([.D45] = 0; DAY([.A45] &lt;&gt; 1)); [.E44] + 1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4" calcext:value-type="date">
            <text:p>2022-02-14</text:p>
          </table:table-cell>
          <table:table-cell table:style-name="ce8" table:formula="of:=MONTH([.A46])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AND([.D46] = 0; DAY([.A46] &lt;&gt; 1)); [.E45] + 1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5" calcext:value-type="date">
            <text:p>2022-02-15</text:p>
          </table:table-cell>
          <table:table-cell table:style-name="ce8" table:formula="of:=MONTH([.A47])"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table:formula="of:=IF(AND([.D47] = 0; DAY([.A47] &lt;&gt; 1)); [.E46] + 1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6" calcext:value-type="date">
            <text:p>2022-02-16</text:p>
          </table:table-cell>
          <table:table-cell table:style-name="ce8" table:formula="of:=MONTH([.A48])"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formula="of:=IF(AND([.D48] = 0; DAY([.A48] &lt;&gt; 1)); [.E47] + 1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7" calcext:value-type="date">
            <text:p>2022-02-17</text:p>
          </table:table-cell>
          <table:table-cell table:style-name="ce8" table:formula="of:=MONTH([.A49])"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  <table:table-cell table:formula="of:=IF(AND([.D49] = 0; DAY([.A49] &lt;&gt; 1)); [.E48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8" calcext:value-type="date">
            <text:p>2022-02-18</text:p>
          </table:table-cell>
          <table:table-cell table:style-name="ce8" table:formula="of:=MONTH([.A50])" office:value-type="float" office:value="2" calcext:value-type="float">
            <text:p>2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formula="of:=IF(AND([.D50] = 0; DAY([.A50] &lt;&gt; 1)); [.E49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19" calcext:value-type="date">
            <text:p>2022-02-19</text:p>
          </table:table-cell>
          <table:table-cell table:style-name="ce8" table:formula="of:=MONTH([.A51])"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formula="of:=IF(AND([.D51] = 0; DAY([.A51] &lt;&gt; 1)); [.E50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0" calcext:value-type="date">
            <text:p>2022-02-20</text:p>
          </table:table-cell>
          <table:table-cell table:style-name="ce8" table:formula="of:=MONTH([.A52])"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formula="of:=IF(AND([.D52] = 0; DAY([.A52] &lt;&gt; 1)); [.E51] + 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1" calcext:value-type="date">
            <text:p>2022-02-21</text:p>
          </table:table-cell>
          <table:table-cell table:style-name="ce8" table:formula="of:=MONTH([.A53])"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table:formula="of:=IF(AND([.D53] = 0; DAY([.A53] &lt;&gt; 1)); [.E52] +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2" calcext:value-type="date">
            <text:p>2022-02-22</text:p>
          </table:table-cell>
          <table:table-cell table:style-name="ce8" table:formula="of:=MONTH([.A54])"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formula="of:=IF(AND([.D54] = 0; DAY([.A54] &lt;&gt; 1)); [.E53] +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3" calcext:value-type="date">
            <text:p>2022-02-23</text:p>
          </table:table-cell>
          <table:table-cell table:style-name="ce8" table:formula="of:=MONTH([.A55])"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formula="of:=IF(AND([.D55] = 0; DAY([.A55] &lt;&gt; 1)); [.E54] + 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4" calcext:value-type="date">
            <text:p>2022-02-24</text:p>
          </table:table-cell>
          <table:table-cell table:style-name="ce8" table:formula="of:=MONTH([.A56])"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formula="of:=IF(AND([.D56] = 0; DAY([.A56] &lt;&gt; 1)); [.E55] + 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2-25" calcext:value-type="date">
            <text:p>2022-02-25</text:p>
          </table:table-cell>
          <table:table-cell table:style-name="ce8" table:formula="of:=MONTH([.A57])"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IF(AND([.D57] = 0; DAY([.A57] &lt;&gt; 1)); [.E56] + 1; 0)" office:value-type="float" office:value="4" calcext:value-type="float">
            <text:p>4</text:p>
          </table:table-cell>
          <table:table-cell table:style-name="ce9" table:formula="of:=IF(AND([.E57] = 0; DAY([.B57] &lt;&gt; 1)); [.F5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6" calcext:value-type="date">
            <text:p>2022-02-26</text:p>
          </table:table-cell>
          <table:table-cell table:style-name="ce8" table:formula="of:=MONTH([.A58])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table:formula="of:=IF(AND([.D58] = 0; DAY([.A58] &lt;&gt; 1)); [.E57] + 1; 0)" office:value-type="float" office:value="5" calcext:value-type="float">
            <text:p>5</text:p>
          </table:table-cell>
          <table:table-cell table:style-name="ce9" table:formula="of:=IF(AND([.E58] = 0; DAY([.B58] &lt;&gt; 1)); [.F5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7" calcext:value-type="date">
            <text:p>2022-02-27</text:p>
          </table:table-cell>
          <table:table-cell table:style-name="ce8" table:formula="of:=MONTH([.A59])"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formula="of:=IF(AND([.D59] = 0; DAY([.A59] &lt;&gt; 1)); [.E58] + 1; 0)" office:value-type="float" office:value="6" calcext:value-type="float">
            <text:p>6</text:p>
          </table:table-cell>
          <table:table-cell table:style-name="ce9" table:formula="of:=IF(AND([.E59] = 0; DAY([.B59] &lt;&gt; 1)); [.F5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8" calcext:value-type="date">
            <text:p>2022-02-28</text:p>
          </table:table-cell>
          <table:table-cell table:style-name="ce8" table:formula="of:=MONTH([.A60])" office:value-type="float" office:value="2" calcext:value-type="float">
            <text:p>2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  <table:table-cell table:formula="of:=IF(AND([.D60] = 0; DAY([.A60] &lt;&gt; 1)); [.E59] + 1; 0)" office:value-type="float" office:value="7" calcext:value-type="float">
            <text:p>7</text:p>
          </table:table-cell>
          <table:table-cell table:style-name="ce9" table:formula="of:=IF(AND([.E60] = 0; DAY([.B60] &lt;&gt; 1)); [.F5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1" calcext:value-type="date">
            <text:p>2022-03-01</text:p>
          </table:table-cell>
          <table:table-cell table:style-name="ce8" table:formula="of:=MONTH([.A61])" office:value-type="float" office:value="3" calcext:value-type="float">
            <text:p>3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table:formula="of:=IF(AND([.D61] = 0; DAY([.A61] &lt;&gt; 1)); [.E60] + 1; 0)" office:value-type="float" office:value="8" calcext:value-type="float">
            <text:p>8</text:p>
          </table:table-cell>
          <table:table-cell table:style-name="ce9" table:formula="of:=IF(AND([.E61] = 0; DAY([.B61] &lt;&gt; 1)); [.F6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2" calcext:value-type="date">
            <text:p>2022-03-02</text:p>
          </table:table-cell>
          <table:table-cell table:style-name="ce8" table:formula="of:=MONTH([.A62])"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IF(AND([.D62] = 0; DAY([.A62] &lt;&gt; 1)); [.E61] + 1; 0)" office:value-type="float" office:value="9" calcext:value-type="float">
            <text:p>9</text:p>
          </table:table-cell>
          <table:table-cell table:style-name="ce9" table:formula="of:=IF(AND([.E62] = 0; DAY([.B62] &lt;&gt; 1)); [.F6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3" calcext:value-type="date">
            <text:p>2022-03-03</text:p>
          </table:table-cell>
          <table:table-cell table:style-name="ce8" table:formula="of:=MONTH([.A6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AND([.D63] = 0; DAY([.A63] &lt;&gt; 1)); [.E62] + 1; 0)" office:value-type="float" office:value="10" calcext:value-type="float">
            <text:p>10</text:p>
          </table:table-cell>
          <table:table-cell table:style-name="ce9" table:formula="of:=IF(AND([.E63] = 0; DAY([.B63] &lt;&gt; 1)); [.F6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4" calcext:value-type="date">
            <text:p>2022-03-04</text:p>
          </table:table-cell>
          <table:table-cell table:style-name="ce8" table:formula="of:=MONTH([.A64])"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formula="of:=IF(AND([.D64] = 0; DAY([.A64] &lt;&gt; 1)); [.E63] + 1; 0)" office:value-type="float" office:value="11" calcext:value-type="float">
            <text:p>11</text:p>
          </table:table-cell>
          <table:table-cell table:style-name="ce9" table:formula="of:=IF(AND([.E64] = 0; DAY([.B64] &lt;&gt; 1)); [.F6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5" calcext:value-type="date">
            <text:p>2022-03-05</text:p>
          </table:table-cell>
          <table:table-cell table:style-name="ce8" table:formula="of:=MONTH([.A65])"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IF(AND([.D65] = 0; DAY([.A65] &lt;&gt; 1)); [.E64] + 1; 0)" office:value-type="float" office:value="12" calcext:value-type="float">
            <text:p>12</text:p>
          </table:table-cell>
          <table:table-cell table:style-name="ce9" table:formula="of:=IF(AND([.E65] = 0; DAY([.B65] &lt;&gt; 1)); [.F6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6" calcext:value-type="date">
            <text:p>2022-03-06</text:p>
          </table:table-cell>
          <table:table-cell table:style-name="ce8" table:formula="of:=MONTH([.A66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D66] = 0; DAY([.A66] &lt;&gt; 1)); [.E65] + 1; 0)" office:value-type="float" office:value="13" calcext:value-type="float">
            <text:p>13</text:p>
          </table:table-cell>
          <table:table-cell table:style-name="ce9" table:formula="of:=IF(AND([.E66] = 0; DAY([.B66] &lt;&gt; 1)); [.F6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7" calcext:value-type="date">
            <text:p>2022-03-07</text:p>
          </table:table-cell>
          <table:table-cell table:style-name="ce8" table:formula="of:=MONTH([.A67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D67] = 0; DAY([.A67] &lt;&gt; 1)); [.E66] + 1; 0)" office:value-type="float" office:value="14" calcext:value-type="float">
            <text:p>14</text:p>
          </table:table-cell>
          <table:table-cell table:style-name="ce9" table:formula="of:=IF(AND([.E67] = 0; DAY([.B67] &lt;&gt; 1)); [.F6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8" calcext:value-type="date">
            <text:p>2022-03-08</text:p>
          </table:table-cell>
          <table:table-cell table:style-name="ce8" table:formula="of:=MONTH([.A68])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IF(AND([.D68] = 0; DAY([.A68] &lt;&gt; 1)); [.E67] + 1; 0)" office:value-type="float" office:value="15" calcext:value-type="float">
            <text:p>15</text:p>
          </table:table-cell>
          <table:table-cell table:style-name="ce9" table:formula="of:=IF(AND([.E68] = 0; DAY([.B68] &lt;&gt; 1)); [.F6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09" calcext:value-type="date">
            <text:p>2022-03-09</text:p>
          </table:table-cell>
          <table:table-cell table:style-name="ce8" table:formula="of:=MONTH([.A69]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AND([.D69] = 0; DAY([.A69] &lt;&gt; 1)); [.E68] + 1; 0)" office:value-type="float" office:value="0" calcext:value-type="float">
            <text:p>0</text:p>
          </table:table-cell>
          <table:table-cell table:style-name="ce9" table:formula="of:=IF(AND([.E69] = 0; DAY([.B69] &lt;&gt; 1)); [.F6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0" calcext:value-type="date">
            <text:p>2022-03-10</text:p>
          </table:table-cell>
          <table:table-cell table:style-name="ce8" table:formula="of:=MONTH([.A70])" office:value-type="float" office:value="3" calcext:value-type="float">
            <text:p>3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  <table:table-cell table:formula="of:=IF(AND([.D70] = 0; DAY([.A70] &lt;&gt; 1)); [.E69] + 1; 0)" office:value-type="float" office:value="1" calcext:value-type="float">
            <text:p>1</text:p>
          </table:table-cell>
          <table:table-cell table:style-name="ce9" table:formula="of:=IF(AND([.E70] = 0; DAY([.B70] &lt;&gt; 1)); [.F6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1" calcext:value-type="date">
            <text:p>2022-03-11</text:p>
          </table:table-cell>
          <table:table-cell table:style-name="ce8" table:formula="of:=MONTH([.A71])" office:value-type="float" office:value="3" calcext:value-type="float">
            <text:p>3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table:formula="of:=IF(AND([.D71] = 0; DAY([.A71] &lt;&gt; 1)); [.E70] + 1; 0)" office:value-type="float" office:value="2" calcext:value-type="float">
            <text:p>2</text:p>
          </table:table-cell>
          <table:table-cell table:style-name="ce9" table:formula="of:=IF(AND([.E71] = 0; DAY([.B71] &lt;&gt; 1)); [.F7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2" calcext:value-type="date">
            <text:p>2022-03-12</text:p>
          </table:table-cell>
          <table:table-cell table:style-name="ce8" table:formula="of:=MONTH([.A72])" office:value-type="float" office:value="3" calcext:value-type="float">
            <text:p>3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formula="of:=IF(AND([.D72] = 0; DAY([.A72] &lt;&gt; 1)); [.E71] + 1; 0)" office:value-type="float" office:value="3" calcext:value-type="float">
            <text:p>3</text:p>
          </table:table-cell>
          <table:table-cell table:style-name="ce9" table:formula="of:=IF(AND([.E72] = 0; DAY([.B72] &lt;&gt; 1)); [.F7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3" calcext:value-type="date">
            <text:p>2022-03-13</text:p>
          </table:table-cell>
          <table:table-cell table:style-name="ce8" table:formula="of:=MONTH([.A73])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formula="of:=IF(AND([.D73] = 0; DAY([.A73] &lt;&gt; 1)); [.E72] + 1; 0)" office:value-type="float" office:value="4" calcext:value-type="float">
            <text:p>4</text:p>
          </table:table-cell>
          <table:table-cell table:style-name="ce9" table:formula="of:=IF(AND([.E73] = 0; DAY([.B73] &lt;&gt; 1)); [.F7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4" calcext:value-type="date">
            <text:p>2022-03-14</text:p>
          </table:table-cell>
          <table:table-cell table:style-name="ce8" table:formula="of:=MONTH([.A74])"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IF(AND([.D74] = 0; DAY([.A74] &lt;&gt; 1)); [.E73] + 1; 0)" office:value-type="float" office:value="5" calcext:value-type="float">
            <text:p>5</text:p>
          </table:table-cell>
          <table:table-cell table:style-name="ce9" table:formula="of:=IF(AND([.E74] = 0; DAY([.B74] &lt;&gt; 1)); [.F7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5" calcext:value-type="date">
            <text:p>2022-03-15</text:p>
          </table:table-cell>
          <table:table-cell table:style-name="ce8" table:formula="of:=MONTH([.A75])" office:value-type="float" office:value="3" calcext:value-type="float">
            <text:p>3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formula="of:=IF(AND([.D75] = 0; DAY([.A75] &lt;&gt; 1)); [.E74] + 1; 0)" office:value-type="float" office:value="6" calcext:value-type="float">
            <text:p>6</text:p>
          </table:table-cell>
          <table:table-cell table:style-name="ce9" table:formula="of:=IF(AND([.E75] = 0; DAY([.B75] &lt;&gt; 1)); [.F7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6" calcext:value-type="date">
            <text:p>2022-03-16</text:p>
          </table:table-cell>
          <table:table-cell table:style-name="ce8" table:formula="of:=MONTH([.A76])"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formula="of:=IF(AND([.D76] = 0; DAY([.A76] &lt;&gt; 1)); [.E75] + 1; 0)" office:value-type="float" office:value="7" calcext:value-type="float">
            <text:p>7</text:p>
          </table:table-cell>
          <table:table-cell table:style-name="ce9" table:formula="of:=IF(AND([.E76] = 0; DAY([.B76] &lt;&gt; 1)); [.F7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7" calcext:value-type="date">
            <text:p>2022-03-17</text:p>
          </table:table-cell>
          <table:table-cell table:style-name="ce8" table:formula="of:=MONTH([.A77])"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formula="of:=IF(AND([.D77] = 0; DAY([.A77] &lt;&gt; 1)); [.E76] + 1; 0)" office:value-type="float" office:value="8" calcext:value-type="float">
            <text:p>8</text:p>
          </table:table-cell>
          <table:table-cell table:style-name="ce9" table:formula="of:=IF(AND([.E77] = 0; DAY([.B77] &lt;&gt; 1)); [.F7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8" calcext:value-type="date">
            <text:p>2022-03-18</text:p>
          </table:table-cell>
          <table:table-cell table:style-name="ce8" table:formula="of:=MONTH([.A7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AND([.D78] = 0; DAY([.A78] &lt;&gt; 1)); [.E77] + 1; 0)" office:value-type="float" office:value="9" calcext:value-type="float">
            <text:p>9</text:p>
          </table:table-cell>
          <table:table-cell table:style-name="ce9" table:formula="of:=IF(AND([.E78] = 0; DAY([.B78] &lt;&gt; 1)); [.F7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19" calcext:value-type="date">
            <text:p>2022-03-19</text:p>
          </table:table-cell>
          <table:table-cell table:style-name="ce8" table:formula="of:=MONTH([.A79])"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IF(AND([.D79] = 0; DAY([.A79] &lt;&gt; 1)); [.E78] + 1; 0)" office:value-type="float" office:value="10" calcext:value-type="float">
            <text:p>10</text:p>
          </table:table-cell>
          <table:table-cell table:style-name="ce9" table:formula="of:=IF(AND([.E79] = 0; DAY([.B79] &lt;&gt; 1)); [.F7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0" calcext:value-type="date">
            <text:p>2022-03-20</text:p>
          </table:table-cell>
          <table:table-cell table:style-name="ce8" table:formula="of:=MONTH([.A80])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IF(AND([.D80] = 0; DAY([.A80] &lt;&gt; 1)); [.E79] + 1; 0)" office:value-type="float" office:value="11" calcext:value-type="float">
            <text:p>11</text:p>
          </table:table-cell>
          <table:table-cell table:style-name="ce9" table:formula="of:=IF(AND([.E80] = 0; DAY([.B80] &lt;&gt; 1)); [.F7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1" calcext:value-type="date">
            <text:p>2022-03-21</text:p>
          </table:table-cell>
          <table:table-cell table:style-name="ce8" table:formula="of:=MONTH([.A81])"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formula="of:=IF(AND([.D81] = 0; DAY([.A81] &lt;&gt; 1)); [.E80] + 1; 0)" office:value-type="float" office:value="12" calcext:value-type="float">
            <text:p>12</text:p>
          </table:table-cell>
          <table:table-cell table:style-name="ce9" table:formula="of:=IF(AND([.E81] = 0; DAY([.B81] &lt;&gt; 1)); [.F8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2" calcext:value-type="date">
            <text:p>2022-03-22</text:p>
          </table:table-cell>
          <table:table-cell table:style-name="ce8" table:formula="of:=MONTH([.A82])"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formula="of:=IF(AND([.D82] = 0; DAY([.A82] &lt;&gt; 1)); [.E81] + 1; 0)" office:value-type="float" office:value="13" calcext:value-type="float">
            <text:p>13</text:p>
          </table:table-cell>
          <table:table-cell table:style-name="ce9" table:formula="of:=IF(AND([.E82] = 0; DAY([.B82] &lt;&gt; 1)); [.F8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3" calcext:value-type="date">
            <text:p>2022-03-23</text:p>
          </table:table-cell>
          <table:table-cell table:style-name="ce8" table:formula="of:=MONTH([.A83])"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formula="of:=IF(AND([.D83] = 0; DAY([.A83] &lt;&gt; 1)); [.E82] + 1; 0)" office:value-type="float" office:value="14" calcext:value-type="float">
            <text:p>14</text:p>
          </table:table-cell>
          <table:table-cell table:style-name="ce9" table:formula="of:=IF(AND([.E83] = 0; DAY([.B83] &lt;&gt; 1)); [.F8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4" calcext:value-type="date">
            <text:p>2022-03-24</text:p>
          </table:table-cell>
          <table:table-cell table:style-name="ce8" table:formula="of:=MONTH([.A84])"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formula="of:=IF(AND([.D84] = 0; DAY([.A84] &lt;&gt; 1)); [.E83] + 1; 0)" office:value-type="float" office:value="15" calcext:value-type="float">
            <text:p>15</text:p>
          </table:table-cell>
          <table:table-cell table:style-name="ce9" table:formula="of:=IF(AND([.E84] = 0; DAY([.B84] &lt;&gt; 1)); [.F8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5" calcext:value-type="date">
            <text:p>2022-03-25</text:p>
          </table:table-cell>
          <table:table-cell table:style-name="ce8" table:formula="of:=MONTH([.A85])"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formula="of:=IF(AND([.D85] = 0; DAY([.A85] &lt;&gt; 1)); [.E84] + 1; 0)" office:value-type="float" office:value="16" calcext:value-type="float">
            <text:p>16</text:p>
          </table:table-cell>
          <table:table-cell table:style-name="ce9" table:formula="of:=IF(AND([.E85] = 0; DAY([.B85] &lt;&gt; 1)); [.F8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6" calcext:value-type="date">
            <text:p>2022-03-26</text:p>
          </table:table-cell>
          <table:table-cell table:style-name="ce8" table:formula="of:=MONTH([.A86])"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formula="of:=IF(AND([.D86] = 0; DAY([.A86] &lt;&gt; 1)); [.E85] + 1; 0)" office:value-type="float" office:value="17" calcext:value-type="float">
            <text:p>17</text:p>
          </table:table-cell>
          <table:table-cell table:style-name="ce9" table:formula="of:=IF(AND([.E86] = 0; DAY([.B86] &lt;&gt; 1)); [.F8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7" calcext:value-type="date">
            <text:p>2022-03-27</text:p>
          </table:table-cell>
          <table:table-cell table:style-name="ce8" table:formula="of:=MONTH([.A87])" office:value-type="float" office:value="3" calcext:value-type="float">
            <text:p>3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table:formula="of:=IF(AND([.D87] = 0; DAY([.A87] &lt;&gt; 1)); [.E86] + 1; 0)" office:value-type="float" office:value="18" calcext:value-type="float">
            <text:p>18</text:p>
          </table:table-cell>
          <table:table-cell table:style-name="ce9" table:formula="of:=IF(AND([.E87] = 0; DAY([.B87] &lt;&gt; 1)); [.F8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8" calcext:value-type="date">
            <text:p>2022-03-28</text:p>
          </table:table-cell>
          <table:table-cell table:style-name="ce8" table:formula="of:=MONTH([.A88])" office:value-type="float" office:value="3" calcext:value-type="float">
            <text:p>3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formula="of:=IF(AND([.D88] = 0; DAY([.A88] &lt;&gt; 1)); [.E87] + 1; 0)" office:value-type="float" office:value="19" calcext:value-type="float">
            <text:p>19</text:p>
          </table:table-cell>
          <table:table-cell table:style-name="ce9" table:formula="of:=IF(AND([.E88] = 0; DAY([.B88] &lt;&gt; 1)); [.F8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9" calcext:value-type="date">
            <text:p>2022-03-29</text:p>
          </table:table-cell>
          <table:table-cell table:style-name="ce8" table:formula="of:=MONTH([.A89])" office:value-type="float" office:value="3" calcext:value-type="float">
            <text:p>3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formula="of:=IF(AND([.D89] = 0; DAY([.A89] &lt;&gt; 1)); [.E88] + 1; 0)" office:value-type="float" office:value="20" calcext:value-type="float">
            <text:p>20</text:p>
          </table:table-cell>
          <table:table-cell table:style-name="ce9" table:formula="of:=IF(AND([.E89] = 0; DAY([.B89] &lt;&gt; 1)); [.F8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30" calcext:value-type="date">
            <text:p>2022-03-30</text:p>
          </table:table-cell>
          <table:table-cell table:style-name="ce8" table:formula="of:=MONTH([.A90])"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formula="of:=IF(AND([.D90] = 0; DAY([.A90] &lt;&gt; 1)); [.E89] + 1; 0)" office:value-type="float" office:value="0" calcext:value-type="float">
            <text:p>0</text:p>
          </table:table-cell>
          <table:table-cell table:style-name="ce9" table:formula="of:=IF(AND([.E90] = 0; DAY([.B90] &lt;&gt; 1)); [.F89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31" calcext:value-type="date">
            <text:p>2022-03-31</text:p>
          </table:table-cell>
          <table:table-cell table:style-name="ce8" table:formula="of:=MONTH([.A91])"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  <table:table-cell table:formula="of:=IF(AND([.D91] = 0; DAY([.A91] &lt;&gt; 1)); [.E90] + 1; 0)" office:value-type="float" office:value="0" calcext:value-type="float">
            <text:p>0</text:p>
          </table:table-cell>
          <table:table-cell table:style-name="ce9" table:formula="of:=IF(AND([.E91] = 0; DAY([.B91] &lt;&gt; 1)); [.F90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1" calcext:value-type="date">
            <text:p>2022-04-01</text:p>
          </table:table-cell>
          <table:table-cell table:style-name="ce8" table:formula="of:=MONTH([.A9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D92] = 0; DAY([.A92] &lt;&gt; 1)); [.E91] + 1; 0)" office:value-type="float" office:value="0" calcext:value-type="float">
            <text:p>0</text:p>
          </table:table-cell>
          <table:table-cell table:style-name="ce9" table:formula="of:=IF(AND([.E92] = 0; DAY([.B92] &lt;&gt; 1)); [.F91] + 1; 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2" calcext:value-type="date">
            <text:p>2022-04-02</text:p>
          </table:table-cell>
          <table:table-cell table:style-name="ce8" table:formula="of:=MONTH([.A93])" office:value-type="float" office:value="4" calcext:value-type="float">
            <text:p>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formula="of:=IF(AND([.D93] = 0; DAY([.A93] &lt;&gt; 1)); [.E92] + 1; 0)" office:value-type="float" office:value="1" calcext:value-type="float">
            <text:p>1</text:p>
          </table:table-cell>
          <table:table-cell table:style-name="ce9" table:formula="of:=IF(AND([.E93] = 0; DAY([.B93] &lt;&gt; 1)); [.F9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3" calcext:value-type="date">
            <text:p>2022-04-03</text:p>
          </table:table-cell>
          <table:table-cell table:style-name="ce8" table:formula="of:=MONTH([.A94])"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IF(AND([.D94] = 0; DAY([.A94] &lt;&gt; 1)); [.E93] + 1; 0)" office:value-type="float" office:value="0" calcext:value-type="float">
            <text:p>0</text:p>
          </table:table-cell>
          <table:table-cell table:style-name="ce9" table:formula="of:=IF(AND([.E94] = 0; DAY([.B94] &lt;&gt; 1)); [.F9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4" calcext:value-type="date">
            <text:p>2022-04-04</text:p>
          </table:table-cell>
          <table:table-cell table:style-name="ce8" table:formula="of:=MONTH([.A95])"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IF(AND([.D95] = 0; DAY([.A95] &lt;&gt; 1)); [.E94] + 1; 0)" office:value-type="float" office:value="1" calcext:value-type="float">
            <text:p>1</text:p>
          </table:table-cell>
          <table:table-cell table:style-name="ce9" table:formula="of:=IF(AND([.E95] = 0; DAY([.B95] &lt;&gt; 1)); [.F9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5" calcext:value-type="date">
            <text:p>2022-04-05</text:p>
          </table:table-cell>
          <table:table-cell table:style-name="ce8" table:formula="of:=MONTH([.A96])"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  <table:table-cell table:formula="of:=IF(AND([.D96] = 0; DAY([.A96] &lt;&gt; 1)); [.E95] + 1; 0)" office:value-type="float" office:value="0" calcext:value-type="float">
            <text:p>0</text:p>
          </table:table-cell>
          <table:table-cell table:style-name="ce9" table:formula="of:=IF(AND([.E96] = 0; DAY([.B96] &lt;&gt; 1)); [.F9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6" calcext:value-type="date">
            <text:p>2022-04-06</text:p>
          </table:table-cell>
          <table:table-cell table:style-name="ce8" table:formula="of:=MONTH([.A97])" office:value-type="float" office:value="4" calcext:value-type="float">
            <text:p>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formula="of:=IF(AND([.D97] = 0; DAY([.A97] &lt;&gt; 1)); [.E96] + 1; 0)" office:value-type="float" office:value="1" calcext:value-type="float">
            <text:p>1</text:p>
          </table:table-cell>
          <table:table-cell table:style-name="ce9" table:formula="of:=IF(AND([.E97] = 0; DAY([.B97] &lt;&gt; 1)); [.F9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7" calcext:value-type="date">
            <text:p>2022-04-07</text:p>
          </table:table-cell>
          <table:table-cell table:style-name="ce8" table:formula="of:=MONTH([.A98])" office:value-type="float" office:value="4" calcext:value-type="float">
            <text:p>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IF(AND([.D98] = 0; DAY([.A98] &lt;&gt; 1)); [.E97] + 1; 0)" office:value-type="float" office:value="2" calcext:value-type="float">
            <text:p>2</text:p>
          </table:table-cell>
          <table:table-cell table:style-name="ce9" table:formula="of:=IF(AND([.E98] = 0; DAY([.B98] &lt;&gt; 1)); [.F9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8" calcext:value-type="date">
            <text:p>2022-04-08</text:p>
          </table:table-cell>
          <table:table-cell table:style-name="ce8" table:formula="of:=MONTH([.A99])"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table:formula="of:=IF(AND([.D99] = 0; DAY([.A99] &lt;&gt; 1)); [.E98] + 1; 0)" office:value-type="float" office:value="0" calcext:value-type="float">
            <text:p>0</text:p>
          </table:table-cell>
          <table:table-cell table:style-name="ce9" table:formula="of:=IF(AND([.E99] = 0; DAY([.B99] &lt;&gt; 1)); [.F9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09" calcext:value-type="date">
            <text:p>2022-04-09</text:p>
          </table:table-cell>
          <table:table-cell table:style-name="ce8" table:formula="of:=MONTH([.A100])" office:value-type="float" office:value="4" calcext:value-type="float">
            <text:p>4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table:formula="of:=IF(AND([.D100] = 0; DAY([.A100] &lt;&gt; 1)); [.E99] + 1; 0)" office:value-type="float" office:value="0" calcext:value-type="float">
            <text:p>0</text:p>
          </table:table-cell>
          <table:table-cell table:style-name="ce9" table:formula="of:=IF(AND([.E100] = 0; DAY([.B100] &lt;&gt; 1)); [.F99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0" calcext:value-type="date">
            <text:p>2022-04-10</text:p>
          </table:table-cell>
          <table:table-cell table:style-name="ce8" table:formula="of:=MONTH([.A101])"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table:formula="of:=IF(AND([.D101] = 0; DAY([.A101] &lt;&gt; 1)); [.E100] + 1; 0)" office:value-type="float" office:value="1" calcext:value-type="float">
            <text:p>1</text:p>
          </table:table-cell>
          <table:table-cell table:style-name="ce9" table:formula="of:=IF(AND([.E101] = 0; DAY([.B101] &lt;&gt; 1)); [.F10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1" calcext:value-type="date">
            <text:p>2022-04-11</text:p>
          </table:table-cell>
          <table:table-cell table:style-name="ce8" table:formula="of:=MONTH([.A102])"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formula="of:=IF(AND([.D102] = 0; DAY([.A102] &lt;&gt; 1)); [.E101] + 1; 0)" office:value-type="float" office:value="2" calcext:value-type="float">
            <text:p>2</text:p>
          </table:table-cell>
          <table:table-cell table:style-name="ce9" table:formula="of:=IF(AND([.E102] = 0; DAY([.B102] &lt;&gt; 1)); [.F10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2" calcext:value-type="date">
            <text:p>2022-04-12</text:p>
          </table:table-cell>
          <table:table-cell table:style-name="ce8" table:formula="of:=MONTH([.A103])" office:value-type="float" office:value="4" calcext:value-type="float">
            <text:p>4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formula="of:=IF(AND([.D103] = 0; DAY([.A103] &lt;&gt; 1)); [.E102] + 1; 0)" office:value-type="float" office:value="3" calcext:value-type="float">
            <text:p>3</text:p>
          </table:table-cell>
          <table:table-cell table:style-name="ce9" table:formula="of:=IF(AND([.E103] = 0; DAY([.B103] &lt;&gt; 1)); [.F10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3" calcext:value-type="date">
            <text:p>2022-04-13</text:p>
          </table:table-cell>
          <table:table-cell table:style-name="ce8" table:formula="of:=MONTH([.A104])" office:value-type="float" office:value="4" calcext:value-type="float">
            <text:p>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formula="of:=IF(AND([.D104] = 0; DAY([.A104] &lt;&gt; 1)); [.E103] + 1; 0)" office:value-type="float" office:value="4" calcext:value-type="float">
            <text:p>4</text:p>
          </table:table-cell>
          <table:table-cell table:style-name="ce9" table:formula="of:=IF(AND([.E104] = 0; DAY([.B104] &lt;&gt; 1)); [.F10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4" calcext:value-type="date">
            <text:p>2022-04-14</text:p>
          </table:table-cell>
          <table:table-cell table:style-name="ce8" table:formula="of:=MONTH([.A105])" office:value-type="float" office:value="4" calcext:value-type="float">
            <text:p>4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IF(AND([.D105] = 0; DAY([.A105] &lt;&gt; 1)); [.E104] + 1; 0)" office:value-type="float" office:value="5" calcext:value-type="float">
            <text:p>5</text:p>
          </table:table-cell>
          <table:table-cell table:style-name="ce9" table:formula="of:=IF(AND([.E105] = 0; DAY([.B105] &lt;&gt; 1)); [.F10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5" calcext:value-type="date">
            <text:p>2022-04-15</text:p>
          </table:table-cell>
          <table:table-cell table:style-name="ce8" table:formula="of:=MONTH([.A106])"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table:formula="of:=IF(AND([.D106] = 0; DAY([.A106] &lt;&gt; 1)); [.E105] + 1; 0)" office:value-type="float" office:value="0" calcext:value-type="float">
            <text:p>0</text:p>
          </table:table-cell>
          <table:table-cell table:style-name="ce9" table:formula="of:=IF(AND([.E106] = 0; DAY([.B106] &lt;&gt; 1)); [.F10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6" calcext:value-type="date">
            <text:p>2022-04-16</text:p>
          </table:table-cell>
          <table:table-cell table:style-name="ce8" table:formula="of:=MONTH([.A107])" office:value-type="float" office:value="4" calcext:value-type="float">
            <text:p>4</text:p>
          </table:table-cell>
          <table:table-cell office:value-type="float" office:value="6.9" calcext:value-type="float">
            <text:p>6,9</text:p>
          </table:table-cell>
          <table:table-cell office:value-type="float" office:value="4" calcext:value-type="float">
            <text:p>4</text:p>
          </table:table-cell>
          <table:table-cell table:formula="of:=IF(AND([.D107] = 0; DAY([.A107] &lt;&gt; 1)); [.E106] + 1; 0)" office:value-type="float" office:value="0" calcext:value-type="float">
            <text:p>0</text:p>
          </table:table-cell>
          <table:table-cell table:style-name="ce9" table:formula="of:=IF(AND([.E107] = 0; DAY([.B107] &lt;&gt; 1)); [.F106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7" calcext:value-type="date">
            <text:p>2022-04-17</text:p>
          </table:table-cell>
          <table:table-cell table:style-name="ce8" table:formula="of:=MONTH([.A108])" office:value-type="float" office:value="4" calcext:value-type="float">
            <text:p>4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formula="of:=IF(AND([.D108] = 0; DAY([.A108] &lt;&gt; 1)); [.E107] + 1; 0)" office:value-type="float" office:value="1" calcext:value-type="float">
            <text:p>1</text:p>
          </table:table-cell>
          <table:table-cell table:style-name="ce9" table:formula="of:=IF(AND([.E108] = 0; DAY([.B108] &lt;&gt; 1)); [.F10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8" calcext:value-type="date">
            <text:p>2022-04-18</text:p>
          </table:table-cell>
          <table:table-cell table:style-name="ce8" table:formula="of:=MONTH([.A109])" office:value-type="float" office:value="4" calcext:value-type="float">
            <text:p>4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formula="of:=IF(AND([.D109] = 0; DAY([.A109] &lt;&gt; 1)); [.E108] + 1; 0)" office:value-type="float" office:value="2" calcext:value-type="float">
            <text:p>2</text:p>
          </table:table-cell>
          <table:table-cell table:style-name="ce9" table:formula="of:=IF(AND([.E109] = 0; DAY([.B109] &lt;&gt; 1)); [.F10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19" calcext:value-type="date">
            <text:p>2022-04-19</text:p>
          </table:table-cell>
          <table:table-cell table:style-name="ce8" table:formula="of:=MONTH([.A110])"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formula="of:=IF(AND([.D110] = 0; DAY([.A110] &lt;&gt; 1)); [.E109] + 1; 0)" office:value-type="float" office:value="3" calcext:value-type="float">
            <text:p>3</text:p>
          </table:table-cell>
          <table:table-cell table:style-name="ce9" table:formula="of:=IF(AND([.E110] = 0; DAY([.B110] &lt;&gt; 1)); [.F10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0" calcext:value-type="date">
            <text:p>2022-04-20</text:p>
          </table:table-cell>
          <table:table-cell table:style-name="ce8" table:formula="of:=MONTH([.A111])"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formula="of:=IF(AND([.D111] = 0; DAY([.A111] &lt;&gt; 1)); [.E110] + 1; 0)" office:value-type="float" office:value="4" calcext:value-type="float">
            <text:p>4</text:p>
          </table:table-cell>
          <table:table-cell table:style-name="ce9" table:formula="of:=IF(AND([.E111] = 0; DAY([.B111] &lt;&gt; 1)); [.F11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1" calcext:value-type="date">
            <text:p>2022-04-21</text:p>
          </table:table-cell>
          <table:table-cell table:style-name="ce8" table:formula="of:=MONTH([.A112])" office:value-type="float" office:value="4" calcext:value-type="float">
            <text:p>4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formula="of:=IF(AND([.D112] = 0; DAY([.A112] &lt;&gt; 1)); [.E111] + 1; 0)" office:value-type="float" office:value="5" calcext:value-type="float">
            <text:p>5</text:p>
          </table:table-cell>
          <table:table-cell table:style-name="ce9" table:formula="of:=IF(AND([.E112] = 0; DAY([.B112] &lt;&gt; 1)); [.F11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2" calcext:value-type="date">
            <text:p>2022-04-22</text:p>
          </table:table-cell>
          <table:table-cell table:style-name="ce8" table:formula="of:=MONTH([.A113])" office:value-type="float" office:value="4" calcext:value-type="float">
            <text:p>4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formula="of:=IF(AND([.D113] = 0; DAY([.A113] &lt;&gt; 1)); [.E112] + 1; 0)" office:value-type="float" office:value="6" calcext:value-type="float">
            <text:p>6</text:p>
          </table:table-cell>
          <table:table-cell table:style-name="ce9" table:formula="of:=IF(AND([.E113] = 0; DAY([.B113] &lt;&gt; 1)); [.F11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3" calcext:value-type="date">
            <text:p>2022-04-23</text:p>
          </table:table-cell>
          <table:table-cell table:style-name="ce8" table:formula="of:=MONTH([.A114])" office:value-type="float" office:value="4" calcext:value-type="float">
            <text:p>4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formula="of:=IF(AND([.D114] = 0; DAY([.A114] &lt;&gt; 1)); [.E113] + 1; 0)" office:value-type="float" office:value="7" calcext:value-type="float">
            <text:p>7</text:p>
          </table:table-cell>
          <table:table-cell table:style-name="ce9" table:formula="of:=IF(AND([.E114] = 0; DAY([.B114] &lt;&gt; 1)); [.F11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4" calcext:value-type="date">
            <text:p>2022-04-24</text:p>
          </table:table-cell>
          <table:table-cell table:style-name="ce8" table:formula="of:=MONTH([.A115])"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table:formula="of:=IF(AND([.D115] = 0; DAY([.A115] &lt;&gt; 1)); [.E114] + 1; 0)" office:value-type="float" office:value="8" calcext:value-type="float">
            <text:p>8</text:p>
          </table:table-cell>
          <table:table-cell table:style-name="ce9" table:formula="of:=IF(AND([.E115] = 0; DAY([.B115] &lt;&gt; 1)); [.F11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5" calcext:value-type="date">
            <text:p>2022-04-25</text:p>
          </table:table-cell>
          <table:table-cell table:style-name="ce8" table:formula="of:=MONTH([.A116])"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  <table:table-cell table:formula="of:=IF(AND([.D116] = 0; DAY([.A116] &lt;&gt; 1)); [.E115] + 1; 0)" office:value-type="float" office:value="0" calcext:value-type="float">
            <text:p>0</text:p>
          </table:table-cell>
          <table:table-cell table:style-name="ce9" table:formula="of:=IF(AND([.E116] = 0; DAY([.B116] &lt;&gt; 1)); [.F11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6" calcext:value-type="date">
            <text:p>2022-04-26</text:p>
          </table:table-cell>
          <table:table-cell table:style-name="ce8" table:formula="of:=MONTH([.A117])"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formula="of:=IF(AND([.D117] = 0; DAY([.A117] &lt;&gt; 1)); [.E116] + 1; 0)" office:value-type="float" office:value="1" calcext:value-type="float">
            <text:p>1</text:p>
          </table:table-cell>
          <table:table-cell table:style-name="ce9" table:formula="of:=IF(AND([.E117] = 0; DAY([.B117] &lt;&gt; 1)); [.F11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7" calcext:value-type="date">
            <text:p>2022-04-27</text:p>
          </table:table-cell>
          <table:table-cell table:style-name="ce8" table:formula="of:=MONTH([.A118])" office:value-type="float" office:value="4" calcext:value-type="float">
            <text:p>4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formula="of:=IF(AND([.D118] = 0; DAY([.A118] &lt;&gt; 1)); [.E117] + 1; 0)" office:value-type="float" office:value="2" calcext:value-type="float">
            <text:p>2</text:p>
          </table:table-cell>
          <table:table-cell table:style-name="ce9" table:formula="of:=IF(AND([.E118] = 0; DAY([.B118] &lt;&gt; 1)); [.F11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8" calcext:value-type="date">
            <text:p>2022-04-28</text:p>
          </table:table-cell>
          <table:table-cell table:style-name="ce8" table:formula="of:=MONTH([.A119])"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formula="of:=IF(AND([.D119] = 0; DAY([.A119] &lt;&gt; 1)); [.E118] + 1; 0)" office:value-type="float" office:value="3" calcext:value-type="float">
            <text:p>3</text:p>
          </table:table-cell>
          <table:table-cell table:style-name="ce9" table:formula="of:=IF(AND([.E119] = 0; DAY([.B119] &lt;&gt; 1)); [.F11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29" calcext:value-type="date">
            <text:p>2022-04-29</text:p>
          </table:table-cell>
          <table:table-cell table:style-name="ce8" table:formula="of:=MONTH([.A120])"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formula="of:=IF(AND([.D120] = 0; DAY([.A120] &lt;&gt; 1)); [.E119] + 1; 0)" office:value-type="float" office:value="4" calcext:value-type="float">
            <text:p>4</text:p>
          </table:table-cell>
          <table:table-cell table:style-name="ce9" table:formula="of:=IF(AND([.E120] = 0; DAY([.B120] &lt;&gt; 1)); [.F11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4-30" calcext:value-type="date">
            <text:p>2022-04-30</text:p>
          </table:table-cell>
          <table:table-cell table:style-name="ce8" table:formula="of:=MONTH([.A121])"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  <table:table-cell table:formula="of:=IF(AND([.D121] = 0; DAY([.A121] &lt;&gt; 1)); [.E120] + 1; 0)" office:value-type="float" office:value="0" calcext:value-type="float">
            <text:p>0</text:p>
          </table:table-cell>
          <table:table-cell table:style-name="ce9" table:formula="of:=IF(AND([.E121] = 0; DAY([.B121] &lt;&gt; 1)); [.F120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1" calcext:value-type="date">
            <text:p>2022-05-01</text:p>
          </table:table-cell>
          <table:table-cell table:style-name="ce8" table:formula="of:=MONTH([.A122])" office:value-type="float" office:value="5" calcext:value-type="float">
            <text:p>5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formula="of:=IF(AND([.D122] = 0; DAY([.A122] &lt;&gt; 1)); [.E121] + 1; 0)" office:value-type="float" office:value="1" calcext:value-type="float">
            <text:p>1</text:p>
          </table:table-cell>
          <table:table-cell table:style-name="ce9" table:formula="of:=IF(AND([.E122] = 0; DAY([.B122] &lt;&gt; 1)); [.F12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2" calcext:value-type="date">
            <text:p>2022-05-02</text:p>
          </table:table-cell>
          <table:table-cell table:style-name="ce8" table:formula="of:=MONTH([.A123])" office:value-type="float" office:value="5" calcext:value-type="float">
            <text:p>5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formula="of:=IF(AND([.D123] = 0; DAY([.A123] &lt;&gt; 1)); [.E122] + 1; 0)" office:value-type="float" office:value="2" calcext:value-type="float">
            <text:p>2</text:p>
          </table:table-cell>
          <table:table-cell table:style-name="ce9" table:formula="of:=IF(AND([.E123] = 0; DAY([.B123] &lt;&gt; 1)); [.F12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3" calcext:value-type="date">
            <text:p>2022-05-03</text:p>
          </table:table-cell>
          <table:table-cell table:style-name="ce8" table:formula="of:=MONTH([.A124])" office:value-type="float" office:value="5" calcext:value-type="float">
            <text:p>5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IF(AND([.D124] = 0; DAY([.A124] &lt;&gt; 1)); [.E123] + 1; 0)" office:value-type="float" office:value="3" calcext:value-type="float">
            <text:p>3</text:p>
          </table:table-cell>
          <table:table-cell table:style-name="ce9" table:formula="of:=IF(AND([.E124] = 0; DAY([.B124] &lt;&gt; 1)); [.F12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4" calcext:value-type="date">
            <text:p>2022-05-04</text:p>
          </table:table-cell>
          <table:table-cell table:style-name="ce8" table:formula="of:=MONTH([.A125])" office:value-type="float" office:value="5" calcext:value-type="float">
            <text:p>5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formula="of:=IF(AND([.D125] = 0; DAY([.A125] &lt;&gt; 1)); [.E124] + 1; 0)" office:value-type="float" office:value="4" calcext:value-type="float">
            <text:p>4</text:p>
          </table:table-cell>
          <table:table-cell table:style-name="ce9" table:formula="of:=IF(AND([.E125] = 0; DAY([.B125] &lt;&gt; 1)); [.F12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5" calcext:value-type="date">
            <text:p>2022-05-05</text:p>
          </table:table-cell>
          <table:table-cell table:style-name="ce8" table:formula="of:=MONTH([.A126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126] = 0; DAY([.A126] &lt;&gt; 1)); [.E125] + 1; 0)" office:value-type="float" office:value="5" calcext:value-type="float">
            <text:p>5</text:p>
          </table:table-cell>
          <table:table-cell table:style-name="ce9" table:formula="of:=IF(AND([.E126] = 0; DAY([.B126] &lt;&gt; 1)); [.F12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6" calcext:value-type="date">
            <text:p>2022-05-06</text:p>
          </table:table-cell>
          <table:table-cell table:style-name="ce8" table:formula="of:=MONTH([.A127])" office:value-type="float" office:value="5" calcext:value-type="float">
            <text:p>5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formula="of:=IF(AND([.D127] = 0; DAY([.A127] &lt;&gt; 1)); [.E126] + 1; 0)" office:value-type="float" office:value="6" calcext:value-type="float">
            <text:p>6</text:p>
          </table:table-cell>
          <table:table-cell table:style-name="ce9" table:formula="of:=IF(AND([.E127] = 0; DAY([.B127] &lt;&gt; 1)); [.F12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7" calcext:value-type="date">
            <text:p>2022-05-07</text:p>
          </table:table-cell>
          <table:table-cell table:style-name="ce8" table:formula="of:=MONTH([.A128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AND([.D128] = 0; DAY([.A128] &lt;&gt; 1)); [.E127] + 1; 0)" office:value-type="float" office:value="7" calcext:value-type="float">
            <text:p>7</text:p>
          </table:table-cell>
          <table:table-cell table:style-name="ce9" table:formula="of:=IF(AND([.E128] = 0; DAY([.B128] &lt;&gt; 1)); [.F12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8" calcext:value-type="date">
            <text:p>2022-05-08</text:p>
          </table:table-cell>
          <table:table-cell table:style-name="ce8" table:formula="of:=MONTH([.A129])" office:value-type="float" office:value="5" calcext:value-type="float">
            <text:p>5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formula="of:=IF(AND([.D129] = 0; DAY([.A129] &lt;&gt; 1)); [.E128] + 1; 0)" office:value-type="float" office:value="8" calcext:value-type="float">
            <text:p>8</text:p>
          </table:table-cell>
          <table:table-cell table:style-name="ce9" table:formula="of:=IF(AND([.E129] = 0; DAY([.B129] &lt;&gt; 1)); [.F12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09" calcext:value-type="date">
            <text:p>2022-05-09</text:p>
          </table:table-cell>
          <table:table-cell table:style-name="ce8" table:formula="of:=MONTH([.A130])"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formula="of:=IF(AND([.D130] = 0; DAY([.A130] &lt;&gt; 1)); [.E129] + 1; 0)" office:value-type="float" office:value="9" calcext:value-type="float">
            <text:p>9</text:p>
          </table:table-cell>
          <table:table-cell table:style-name="ce9" table:formula="of:=IF(AND([.E130] = 0; DAY([.B130] &lt;&gt; 1)); [.F12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0" calcext:value-type="date">
            <text:p>2022-05-10</text:p>
          </table:table-cell>
          <table:table-cell table:style-name="ce8" table:formula="of:=MONTH([.A131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AND([.D131] = 0; DAY([.A131] &lt;&gt; 1)); [.E130] + 1; 0)" office:value-type="float" office:value="10" calcext:value-type="float">
            <text:p>10</text:p>
          </table:table-cell>
          <table:table-cell table:style-name="ce9" table:formula="of:=IF(AND([.E131] = 0; DAY([.B131] &lt;&gt; 1)); [.F13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1" calcext:value-type="date">
            <text:p>2022-05-11</text:p>
          </table:table-cell>
          <table:table-cell table:style-name="ce8" table:formula="of:=MONTH([.A132])" office:value-type="float" office:value="5" calcext:value-type="float">
            <text:p>5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IF(AND([.D132] = 0; DAY([.A132] &lt;&gt; 1)); [.E131] + 1; 0)" office:value-type="float" office:value="11" calcext:value-type="float">
            <text:p>11</text:p>
          </table:table-cell>
          <table:table-cell table:style-name="ce9" table:formula="of:=IF(AND([.E132] = 0; DAY([.B132] &lt;&gt; 1)); [.F13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2" calcext:value-type="date">
            <text:p>2022-05-12</text:p>
          </table:table-cell>
          <table:table-cell table:style-name="ce8" table:formula="of:=MONTH([.A133])" office:value-type="float" office:value="5" calcext:value-type="float">
            <text:p>5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formula="of:=IF(AND([.D133] = 0; DAY([.A133] &lt;&gt; 1)); [.E132] + 1; 0)" office:value-type="float" office:value="12" calcext:value-type="float">
            <text:p>12</text:p>
          </table:table-cell>
          <table:table-cell table:style-name="ce9" table:formula="of:=IF(AND([.E133] = 0; DAY([.B133] &lt;&gt; 1)); [.F13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3" calcext:value-type="date">
            <text:p>2022-05-13</text:p>
          </table:table-cell>
          <table:table-cell table:style-name="ce8" table:formula="of:=MONTH([.A134])" office:value-type="float" office:value="5" calcext:value-type="float">
            <text:p>5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formula="of:=IF(AND([.D134] = 0; DAY([.A134] &lt;&gt; 1)); [.E133] + 1; 0)" office:value-type="float" office:value="13" calcext:value-type="float">
            <text:p>13</text:p>
          </table:table-cell>
          <table:table-cell table:style-name="ce9" table:formula="of:=IF(AND([.E134] = 0; DAY([.B134] &lt;&gt; 1)); [.F13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4" calcext:value-type="date">
            <text:p>2022-05-14</text:p>
          </table:table-cell>
          <table:table-cell table:style-name="ce8" table:formula="of:=MONTH([.A135])" office:value-type="float" office:value="5" calcext:value-type="float">
            <text:p>5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formula="of:=IF(AND([.D135] = 0; DAY([.A135] &lt;&gt; 1)); [.E134] + 1; 0)" office:value-type="float" office:value="14" calcext:value-type="float">
            <text:p>14</text:p>
          </table:table-cell>
          <table:table-cell table:style-name="ce9" table:formula="of:=IF(AND([.E135] = 0; DAY([.B135] &lt;&gt; 1)); [.F13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5" calcext:value-type="date">
            <text:p>2022-05-15</text:p>
          </table:table-cell>
          <table:table-cell table:style-name="ce8" table:formula="of:=MONTH([.A136])" office:value-type="float" office:value="5" calcext:value-type="float">
            <text:p>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formula="of:=IF(AND([.D136] = 0; DAY([.A136] &lt;&gt; 1)); [.E135] + 1; 0)" office:value-type="float" office:value="15" calcext:value-type="float">
            <text:p>15</text:p>
          </table:table-cell>
          <table:table-cell table:style-name="ce9" table:formula="of:=IF(AND([.E136] = 0; DAY([.B136] &lt;&gt; 1)); [.F13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6" calcext:value-type="date">
            <text:p>2022-05-16</text:p>
          </table:table-cell>
          <table:table-cell table:style-name="ce8" table:formula="of:=MONTH([.A137])" office:value-type="float" office:value="5" calcext:value-type="float">
            <text:p>5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table:formula="of:=IF(AND([.D137] = 0; DAY([.A137] &lt;&gt; 1)); [.E136] + 1; 0)" office:value-type="float" office:value="16" calcext:value-type="float">
            <text:p>16</text:p>
          </table:table-cell>
          <table:table-cell table:style-name="ce9" table:formula="of:=IF(AND([.E137] = 0; DAY([.B137] &lt;&gt; 1)); [.F13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7" calcext:value-type="date">
            <text:p>2022-05-17</text:p>
          </table:table-cell>
          <table:table-cell table:style-name="ce8" table:formula="of:=MONTH([.A138])" office:value-type="float" office:value="5" calcext:value-type="float">
            <text:p>5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formula="of:=IF(AND([.D138] = 0; DAY([.A138] &lt;&gt; 1)); [.E137] + 1; 0)" office:value-type="float" office:value="17" calcext:value-type="float">
            <text:p>17</text:p>
          </table:table-cell>
          <table:table-cell table:style-name="ce9" table:formula="of:=IF(AND([.E138] = 0; DAY([.B138] &lt;&gt; 1)); [.F13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8" calcext:value-type="date">
            <text:p>2022-05-18</text:p>
          </table:table-cell>
          <table:table-cell table:style-name="ce8" table:formula="of:=MONTH([.A139])"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IF(AND([.D139] = 0; DAY([.A139] &lt;&gt; 1)); [.E138] + 1; 0)" office:value-type="float" office:value="18" calcext:value-type="float">
            <text:p>18</text:p>
          </table:table-cell>
          <table:table-cell table:style-name="ce9" table:formula="of:=IF(AND([.E139] = 0; DAY([.B139] &lt;&gt; 1)); [.F13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19" calcext:value-type="date">
            <text:p>2022-05-19</text:p>
          </table:table-cell>
          <table:table-cell table:style-name="ce8" table:formula="of:=MONTH([.A140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AND([.D140] = 0; DAY([.A140] &lt;&gt; 1)); [.E139] + 1; 0)" office:value-type="float" office:value="19" calcext:value-type="float">
            <text:p>19</text:p>
          </table:table-cell>
          <table:table-cell table:style-name="ce9" table:formula="of:=IF(AND([.E140] = 0; DAY([.B140] &lt;&gt; 1)); [.F13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0" calcext:value-type="date">
            <text:p>2022-05-20</text:p>
          </table:table-cell>
          <table:table-cell table:style-name="ce8" table:formula="of:=MONTH([.A141])" office:value-type="float" office:value="5" calcext:value-type="float">
            <text:p>5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table:formula="of:=IF(AND([.D141] = 0; DAY([.A141] &lt;&gt; 1)); [.E140] + 1; 0)" office:value-type="float" office:value="20" calcext:value-type="float">
            <text:p>20</text:p>
          </table:table-cell>
          <table:table-cell table:style-name="ce9" table:formula="of:=IF(AND([.E141] = 0; DAY([.B141] &lt;&gt; 1)); [.F14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1" calcext:value-type="date">
            <text:p>2022-05-21</text:p>
          </table:table-cell>
          <table:table-cell table:style-name="ce8" table:formula="of:=MONTH([.A142])" office:value-type="float" office:value="5" calcext:value-type="float">
            <text:p>5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table:formula="of:=IF(AND([.D142] = 0; DAY([.A142] &lt;&gt; 1)); [.E141] + 1; 0)" office:value-type="float" office:value="0" calcext:value-type="float">
            <text:p>0</text:p>
          </table:table-cell>
          <table:table-cell table:style-name="ce9" table:formula="of:=IF(AND([.E142] = 0; DAY([.B142] &lt;&gt; 1)); [.F141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2" calcext:value-type="date">
            <text:p>2022-05-22</text:p>
          </table:table-cell>
          <table:table-cell table:style-name="ce8" table:formula="of:=MONTH([.A143])" office:value-type="float" office:value="5" calcext:value-type="float">
            <text:p>5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formula="of:=IF(AND([.D143] = 0; DAY([.A143] &lt;&gt; 1)); [.E142] + 1; 0)" office:value-type="float" office:value="1" calcext:value-type="float">
            <text:p>1</text:p>
          </table:table-cell>
          <table:table-cell table:style-name="ce9" table:formula="of:=IF(AND([.E143] = 0; DAY([.B143] &lt;&gt; 1)); [.F14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3" calcext:value-type="date">
            <text:p>2022-05-23</text:p>
          </table:table-cell>
          <table:table-cell table:style-name="ce8" table:formula="of:=MONTH([.A144])"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formula="of:=IF(AND([.D144] = 0; DAY([.A144] &lt;&gt; 1)); [.E143] + 1; 0)" office:value-type="float" office:value="2" calcext:value-type="float">
            <text:p>2</text:p>
          </table:table-cell>
          <table:table-cell table:style-name="ce9" table:formula="of:=IF(AND([.E144] = 0; DAY([.B144] &lt;&gt; 1)); [.F14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4" calcext:value-type="date">
            <text:p>2022-05-24</text:p>
          </table:table-cell>
          <table:table-cell table:style-name="ce8" table:formula="of:=MONTH([.A145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145] = 0; DAY([.A145] &lt;&gt; 1)); [.E144] + 1; 0)" office:value-type="float" office:value="3" calcext:value-type="float">
            <text:p>3</text:p>
          </table:table-cell>
          <table:table-cell table:style-name="ce9" table:formula="of:=IF(AND([.E145] = 0; DAY([.B145] &lt;&gt; 1)); [.F14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5" calcext:value-type="date">
            <text:p>2022-05-25</text:p>
          </table:table-cell>
          <table:table-cell table:style-name="ce8" table:formula="of:=MONTH([.A146])" office:value-type="float" office:value="5" calcext:value-type="float">
            <text:p>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146] = 0; DAY([.A146] &lt;&gt; 1)); [.E145] + 1; 0)" office:value-type="float" office:value="4" calcext:value-type="float">
            <text:p>4</text:p>
          </table:table-cell>
          <table:table-cell table:style-name="ce9" table:formula="of:=IF(AND([.E146] = 0; DAY([.B146] &lt;&gt; 1)); [.F14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6" calcext:value-type="date">
            <text:p>2022-05-26</text:p>
          </table:table-cell>
          <table:table-cell table:style-name="ce8" table:formula="of:=MONTH([.A147])" office:value-type="float" office:value="5" calcext:value-type="float">
            <text:p>5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formula="of:=IF(AND([.D147] = 0; DAY([.A147] &lt;&gt; 1)); [.E146] + 1; 0)" office:value-type="float" office:value="5" calcext:value-type="float">
            <text:p>5</text:p>
          </table:table-cell>
          <table:table-cell table:style-name="ce9" table:formula="of:=IF(AND([.E147] = 0; DAY([.B147] &lt;&gt; 1)); [.F14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7" calcext:value-type="date">
            <text:p>2022-05-27</text:p>
          </table:table-cell>
          <table:table-cell table:style-name="ce8" table:formula="of:=MONTH([.A148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AND([.D148] = 0; DAY([.A148] &lt;&gt; 1)); [.E147] + 1; 0)" office:value-type="float" office:value="6" calcext:value-type="float">
            <text:p>6</text:p>
          </table:table-cell>
          <table:table-cell table:style-name="ce9" table:formula="of:=IF(AND([.E148] = 0; DAY([.B148] &lt;&gt; 1)); [.F14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8" calcext:value-type="date">
            <text:p>2022-05-28</text:p>
          </table:table-cell>
          <table:table-cell table:style-name="ce8" table:formula="of:=MONTH([.A149])" office:value-type="float" office:value="5" calcext:value-type="float">
            <text:p>5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formula="of:=IF(AND([.D149] = 0; DAY([.A149] &lt;&gt; 1)); [.E148] + 1; 0)" office:value-type="float" office:value="7" calcext:value-type="float">
            <text:p>7</text:p>
          </table:table-cell>
          <table:table-cell table:style-name="ce9" table:formula="of:=IF(AND([.E149] = 0; DAY([.B149] &lt;&gt; 1)); [.F14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29" calcext:value-type="date">
            <text:p>2022-05-29</text:p>
          </table:table-cell>
          <table:table-cell table:style-name="ce8" table:formula="of:=MONTH([.A150])" office:value-type="float" office:value="5" calcext:value-type="float">
            <text:p>5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formula="of:=IF(AND([.D150] = 0; DAY([.A150] &lt;&gt; 1)); [.E149] + 1; 0)" office:value-type="float" office:value="8" calcext:value-type="float">
            <text:p>8</text:p>
          </table:table-cell>
          <table:table-cell table:style-name="ce9" table:formula="of:=IF(AND([.E150] = 0; DAY([.B150] &lt;&gt; 1)); [.F14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30" calcext:value-type="date">
            <text:p>2022-05-30</text:p>
          </table:table-cell>
          <table:table-cell table:style-name="ce8" table:formula="of:=MONTH([.A151])" office:value-type="float" office:value="5" calcext:value-type="float">
            <text:p>5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formula="of:=IF(AND([.D151] = 0; DAY([.A151] &lt;&gt; 1)); [.E150] + 1; 0)" office:value-type="float" office:value="0" calcext:value-type="float">
            <text:p>0</text:p>
          </table:table-cell>
          <table:table-cell table:style-name="ce9" table:formula="of:=IF(AND([.E151] = 0; DAY([.B151] &lt;&gt; 1)); [.F150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5-31" calcext:value-type="date">
            <text:p>2022-05-31</text:p>
          </table:table-cell>
          <table:table-cell table:style-name="ce8" table:formula="of:=MONTH([.A152])" office:value-type="float" office:value="5" calcext:value-type="float">
            <text:p>5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formula="of:=IF(AND([.D152] = 0; DAY([.A152] &lt;&gt; 1)); [.E151] + 1; 0)" office:value-type="float" office:value="1" calcext:value-type="float">
            <text:p>1</text:p>
          </table:table-cell>
          <table:table-cell table:style-name="ce9" table:formula="of:=IF(AND([.E152] = 0; DAY([.B152] &lt;&gt; 1)); [.F15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1" calcext:value-type="date">
            <text:p>2022-06-01</text:p>
          </table:table-cell>
          <table:table-cell table:style-name="ce8" table:formula="of:=MONTH([.A153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AND([.D153] = 0; DAY([.A153] &lt;&gt; 1)); [.E152] + 1; 0)" office:value-type="float" office:value="2" calcext:value-type="float">
            <text:p>2</text:p>
          </table:table-cell>
          <table:table-cell table:style-name="ce9" table:formula="of:=IF(AND([.E153] = 0; DAY([.B153] &lt;&gt; 1)); [.F15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2" calcext:value-type="date">
            <text:p>2022-06-02</text:p>
          </table:table-cell>
          <table:table-cell table:style-name="ce8" table:formula="of:=MONTH([.A154])" office:value-type="float" office:value="6" calcext:value-type="float">
            <text:p>6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table:formula="of:=IF(AND([.D154] = 0; DAY([.A154] &lt;&gt; 1)); [.E153] + 1; 0)" office:value-type="float" office:value="0" calcext:value-type="float">
            <text:p>0</text:p>
          </table:table-cell>
          <table:table-cell table:style-name="ce9" table:formula="of:=IF(AND([.E154] = 0; DAY([.B154] &lt;&gt; 1)); [.F15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3" calcext:value-type="date">
            <text:p>2022-06-03</text:p>
          </table:table-cell>
          <table:table-cell table:style-name="ce8" table:formula="of:=MONTH([.A155])"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IF(AND([.D155] = 0; DAY([.A155] &lt;&gt; 1)); [.E154] + 1; 0)" office:value-type="float" office:value="1" calcext:value-type="float">
            <text:p>1</text:p>
          </table:table-cell>
          <table:table-cell table:style-name="ce9" table:formula="of:=IF(AND([.E155] = 0; DAY([.B155] &lt;&gt; 1)); [.F15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4" calcext:value-type="date">
            <text:p>2022-06-04</text:p>
          </table:table-cell>
          <table:table-cell table:style-name="ce8" table:formula="of:=MONTH([.A156])" office:value-type="float" office:value="6" calcext:value-type="float">
            <text:p>6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formula="of:=IF(AND([.D156] = 0; DAY([.A156] &lt;&gt; 1)); [.E155] + 1; 0)" office:value-type="float" office:value="2" calcext:value-type="float">
            <text:p>2</text:p>
          </table:table-cell>
          <table:table-cell table:style-name="ce9" table:formula="of:=IF(AND([.E156] = 0; DAY([.B156] &lt;&gt; 1)); [.F15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5" calcext:value-type="date">
            <text:p>2022-06-05</text:p>
          </table:table-cell>
          <table:table-cell table:style-name="ce8" table:formula="of:=MONTH([.A157])" office:value-type="float" office:value="6" calcext:value-type="float">
            <text:p>6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IF(AND([.D157] = 0; DAY([.A157] &lt;&gt; 1)); [.E156] + 1; 0)" office:value-type="float" office:value="3" calcext:value-type="float">
            <text:p>3</text:p>
          </table:table-cell>
          <table:table-cell table:style-name="ce9" table:formula="of:=IF(AND([.E157] = 0; DAY([.B157] &lt;&gt; 1)); [.F15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6" calcext:value-type="date">
            <text:p>2022-06-06</text:p>
          </table:table-cell>
          <table:table-cell table:style-name="ce8" table:formula="of:=MONTH([.A158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AND([.D158] = 0; DAY([.A158] &lt;&gt; 1)); [.E157] + 1; 0)" office:value-type="float" office:value="4" calcext:value-type="float">
            <text:p>4</text:p>
          </table:table-cell>
          <table:table-cell table:style-name="ce9" table:formula="of:=IF(AND([.E158] = 0; DAY([.B158] &lt;&gt; 1)); [.F15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7" calcext:value-type="date">
            <text:p>2022-06-07</text:p>
          </table:table-cell>
          <table:table-cell table:style-name="ce8" table:formula="of:=MONTH([.A159])" office:value-type="float" office:value="6" calcext:value-type="float">
            <text:p>6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formula="of:=IF(AND([.D159] = 0; DAY([.A159] &lt;&gt; 1)); [.E158] + 1; 0)" office:value-type="float" office:value="5" calcext:value-type="float">
            <text:p>5</text:p>
          </table:table-cell>
          <table:table-cell table:style-name="ce9" table:formula="of:=IF(AND([.E159] = 0; DAY([.B159] &lt;&gt; 1)); [.F15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8" calcext:value-type="date">
            <text:p>2022-06-08</text:p>
          </table:table-cell>
          <table:table-cell table:style-name="ce8" table:formula="of:=MONTH([.A160])" office:value-type="float" office:value="6" calcext:value-type="float">
            <text:p>6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formula="of:=IF(AND([.D160] = 0; DAY([.A160] &lt;&gt; 1)); [.E159] + 1; 0)" office:value-type="float" office:value="6" calcext:value-type="float">
            <text:p>6</text:p>
          </table:table-cell>
          <table:table-cell table:style-name="ce9" table:formula="of:=IF(AND([.E160] = 0; DAY([.B160] &lt;&gt; 1)); [.F15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09" calcext:value-type="date">
            <text:p>2022-06-09</text:p>
          </table:table-cell>
          <table:table-cell table:style-name="ce8" table:formula="of:=MONTH([.A161])" office:value-type="float" office:value="6" calcext:value-type="float">
            <text:p>6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  <table:table-cell table:formula="of:=IF(AND([.D161] = 0; DAY([.A161] &lt;&gt; 1)); [.E160] + 1; 0)" office:value-type="float" office:value="0" calcext:value-type="float">
            <text:p>0</text:p>
          </table:table-cell>
          <table:table-cell table:style-name="ce9" table:formula="of:=IF(AND([.E161] = 0; DAY([.B161] &lt;&gt; 1)); [.F160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0" calcext:value-type="date">
            <text:p>2022-06-10</text:p>
          </table:table-cell>
          <table:table-cell table:style-name="ce8" table:formula="of:=MONTH([.A162])"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IF(AND([.D162] = 0; DAY([.A162] &lt;&gt; 1)); [.E161] + 1; 0)" office:value-type="float" office:value="1" calcext:value-type="float">
            <text:p>1</text:p>
          </table:table-cell>
          <table:table-cell table:style-name="ce9" table:formula="of:=IF(AND([.E162] = 0; DAY([.B162] &lt;&gt; 1)); [.F16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1" calcext:value-type="date">
            <text:p>2022-06-11</text:p>
          </table:table-cell>
          <table:table-cell table:style-name="ce8" table:formula="of:=MONTH([.A163])" office:value-type="float" office:value="6" calcext:value-type="float">
            <text:p>6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formula="of:=IF(AND([.D163] = 0; DAY([.A163] &lt;&gt; 1)); [.E162] + 1; 0)" office:value-type="float" office:value="2" calcext:value-type="float">
            <text:p>2</text:p>
          </table:table-cell>
          <table:table-cell table:style-name="ce9" table:formula="of:=IF(AND([.E163] = 0; DAY([.B163] &lt;&gt; 1)); [.F16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2" calcext:value-type="date">
            <text:p>2022-06-12</text:p>
          </table:table-cell>
          <table:table-cell table:style-name="ce8" table:formula="of:=MONTH([.A164])" office:value-type="float" office:value="6" calcext:value-type="float">
            <text:p>6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IF(AND([.D164] = 0; DAY([.A164] &lt;&gt; 1)); [.E163] + 1; 0)" office:value-type="float" office:value="3" calcext:value-type="float">
            <text:p>3</text:p>
          </table:table-cell>
          <table:table-cell table:style-name="ce9" table:formula="of:=IF(AND([.E164] = 0; DAY([.B164] &lt;&gt; 1)); [.F16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3" calcext:value-type="date">
            <text:p>2022-06-13</text:p>
          </table:table-cell>
          <table:table-cell table:style-name="ce8" table:formula="of:=MONTH([.A165])" office:value-type="float" office:value="6" calcext:value-type="float">
            <text:p>6</text:p>
          </table:table-cell>
          <table:table-cell office:value-type="float" office:value="18.1" calcext:value-type="float">
            <text:p>18,1</text:p>
          </table:table-cell>
          <table:table-cell office:value-type="float" office:value="7" calcext:value-type="float">
            <text:p>7</text:p>
          </table:table-cell>
          <table:table-cell table:formula="of:=IF(AND([.D165] = 0; DAY([.A165] &lt;&gt; 1)); [.E164] + 1; 0)" office:value-type="float" office:value="0" calcext:value-type="float">
            <text:p>0</text:p>
          </table:table-cell>
          <table:table-cell table:style-name="ce9" table:formula="of:=IF(AND([.E165] = 0; DAY([.B165] &lt;&gt; 1)); [.F164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4" calcext:value-type="date">
            <text:p>2022-06-14</text:p>
          </table:table-cell>
          <table:table-cell table:style-name="ce8" table:formula="of:=MONTH([.A166])"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IF(AND([.D166] = 0; DAY([.A166] &lt;&gt; 1)); [.E165] + 1; 0)" office:value-type="float" office:value="1" calcext:value-type="float">
            <text:p>1</text:p>
          </table:table-cell>
          <table:table-cell table:style-name="ce9" table:formula="of:=IF(AND([.E166] = 0; DAY([.B166] &lt;&gt; 1)); [.F16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5" calcext:value-type="date">
            <text:p>2022-06-15</text:p>
          </table:table-cell>
          <table:table-cell table:style-name="ce8" table:formula="of:=MONTH([.A167])" office:value-type="float" office:value="6" calcext:value-type="float">
            <text:p>6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167] = 0; DAY([.A167] &lt;&gt; 1)); [.E166] + 1; 0)" office:value-type="float" office:value="2" calcext:value-type="float">
            <text:p>2</text:p>
          </table:table-cell>
          <table:table-cell table:style-name="ce9" table:formula="of:=IF(AND([.E167] = 0; DAY([.B167] &lt;&gt; 1)); [.F16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6" calcext:value-type="date">
            <text:p>2022-06-16</text:p>
          </table:table-cell>
          <table:table-cell table:style-name="ce8" table:formula="of:=MONTH([.A168])"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float" office:value="15" calcext:value-type="float">
            <text:p>15</text:p>
          </table:table-cell>
          <table:table-cell table:formula="of:=IF(AND([.D168] = 0; DAY([.A168] &lt;&gt; 1)); [.E167] + 1; 0)" office:value-type="float" office:value="0" calcext:value-type="float">
            <text:p>0</text:p>
          </table:table-cell>
          <table:table-cell table:style-name="ce9" table:formula="of:=IF(AND([.E168] = 0; DAY([.B168] &lt;&gt; 1)); [.F167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7" calcext:value-type="date">
            <text:p>2022-06-17</text:p>
          </table:table-cell>
          <table:table-cell table:style-name="ce8" table:formula="of:=MONTH([.A169])" office:value-type="float" office:value="6" calcext:value-type="float">
            <text:p>6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formula="of:=IF(AND([.D169] = 0; DAY([.A169] &lt;&gt; 1)); [.E168] + 1; 0)" office:value-type="float" office:value="1" calcext:value-type="float">
            <text:p>1</text:p>
          </table:table-cell>
          <table:table-cell table:style-name="ce9" table:formula="of:=IF(AND([.E169] = 0; DAY([.B169] &lt;&gt; 1)); [.F16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8" calcext:value-type="date">
            <text:p>2022-06-18</text:p>
          </table:table-cell>
          <table:table-cell table:style-name="ce8" table:formula="of:=MONTH([.A170])" office:value-type="float" office:value="6" calcext:value-type="float">
            <text:p>6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formula="of:=IF(AND([.D170] = 0; DAY([.A170] &lt;&gt; 1)); [.E169] + 1; 0)" office:value-type="float" office:value="2" calcext:value-type="float">
            <text:p>2</text:p>
          </table:table-cell>
          <table:table-cell table:style-name="ce9" table:formula="of:=IF(AND([.E170] = 0; DAY([.B170] &lt;&gt; 1)); [.F16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19" calcext:value-type="date">
            <text:p>2022-06-19</text:p>
          </table:table-cell>
          <table:table-cell table:style-name="ce8" table:formula="of:=MONTH([.A171])" office:value-type="float" office:value="6" calcext:value-type="float">
            <text:p>6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formula="of:=IF(AND([.D171] = 0; DAY([.A171] &lt;&gt; 1)); [.E170] + 1; 0)" office:value-type="float" office:value="3" calcext:value-type="float">
            <text:p>3</text:p>
          </table:table-cell>
          <table:table-cell table:style-name="ce9" table:formula="of:=IF(AND([.E171] = 0; DAY([.B171] &lt;&gt; 1)); [.F17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0" calcext:value-type="date">
            <text:p>2022-06-20</text:p>
          </table:table-cell>
          <table:table-cell table:style-name="ce8" table:formula="of:=MONTH([.A172])" office:value-type="float" office:value="6" calcext:value-type="float">
            <text:p>6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table:formula="of:=IF(AND([.D172] = 0; DAY([.A172] &lt;&gt; 1)); [.E171] + 1; 0)" office:value-type="float" office:value="4" calcext:value-type="float">
            <text:p>4</text:p>
          </table:table-cell>
          <table:table-cell table:style-name="ce9" table:formula="of:=IF(AND([.E172] = 0; DAY([.B172] &lt;&gt; 1)); [.F17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1" calcext:value-type="date">
            <text:p>2022-06-21</text:p>
          </table:table-cell>
          <table:table-cell table:style-name="ce8" table:formula="of:=MONTH([.A173])" office:value-type="float" office:value="6" calcext:value-type="float">
            <text:p>6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formula="of:=IF(AND([.D173] = 0; DAY([.A173] &lt;&gt; 1)); [.E172] + 1; 0)" office:value-type="float" office:value="5" calcext:value-type="float">
            <text:p>5</text:p>
          </table:table-cell>
          <table:table-cell table:style-name="ce9" table:formula="of:=IF(AND([.E173] = 0; DAY([.B173] &lt;&gt; 1)); [.F17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2" calcext:value-type="date">
            <text:p>2022-06-22</text:p>
          </table:table-cell>
          <table:table-cell table:style-name="ce8" table:formula="of:=MONTH([.A174])" office:value-type="float" office:value="6" calcext:value-type="float">
            <text:p>6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formula="of:=IF(AND([.D174] = 0; DAY([.A174] &lt;&gt; 1)); [.E173] + 1; 0)" office:value-type="float" office:value="6" calcext:value-type="float">
            <text:p>6</text:p>
          </table:table-cell>
          <table:table-cell table:style-name="ce9" table:formula="of:=IF(AND([.E174] = 0; DAY([.B174] &lt;&gt; 1)); [.F17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3" calcext:value-type="date">
            <text:p>2022-06-23</text:p>
          </table:table-cell>
          <table:table-cell table:style-name="ce8" table:formula="of:=MONTH([.A175])" office:value-type="float" office:value="6" calcext:value-type="float">
            <text:p>6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formula="of:=IF(AND([.D175] = 0; DAY([.A175] &lt;&gt; 1)); [.E174] + 1; 0)" office:value-type="float" office:value="7" calcext:value-type="float">
            <text:p>7</text:p>
          </table:table-cell>
          <table:table-cell table:style-name="ce9" table:formula="of:=IF(AND([.E175] = 0; DAY([.B175] &lt;&gt; 1)); [.F17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4" calcext:value-type="date">
            <text:p>2022-06-24</text:p>
          </table:table-cell>
          <table:table-cell table:style-name="ce8" table:formula="of:=MONTH([.A176])"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  <table:table-cell table:formula="of:=IF(AND([.D176] = 0; DAY([.A176] &lt;&gt; 1)); [.E175] + 1; 0)" office:value-type="float" office:value="8" calcext:value-type="float">
            <text:p>8</text:p>
          </table:table-cell>
          <table:table-cell table:style-name="ce9" table:formula="of:=IF(AND([.E176] = 0; DAY([.B176] &lt;&gt; 1)); [.F17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5" calcext:value-type="date">
            <text:p>2022-06-25</text:p>
          </table:table-cell>
          <table:table-cell table:style-name="ce8" table:formula="of:=MONTH([.A177])" office:value-type="float" office:value="6" calcext:value-type="float">
            <text:p>6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formula="of:=IF(AND([.D177] = 0; DAY([.A177] &lt;&gt; 1)); [.E176] + 1; 0)" office:value-type="float" office:value="9" calcext:value-type="float">
            <text:p>9</text:p>
          </table:table-cell>
          <table:table-cell table:style-name="ce9" table:formula="of:=IF(AND([.E177] = 0; DAY([.B177] &lt;&gt; 1)); [.F17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6" calcext:value-type="date">
            <text:p>2022-06-26</text:p>
          </table:table-cell>
          <table:table-cell table:style-name="ce8" table:formula="of:=MONTH([.A178])" office:value-type="float" office:value="6" calcext:value-type="float">
            <text:p>6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IF(AND([.D178] = 0; DAY([.A178] &lt;&gt; 1)); [.E177] + 1; 0)" office:value-type="float" office:value="10" calcext:value-type="float">
            <text:p>10</text:p>
          </table:table-cell>
          <table:table-cell table:style-name="ce9" table:formula="of:=IF(AND([.E178] = 0; DAY([.B178] &lt;&gt; 1)); [.F17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7" calcext:value-type="date">
            <text:p>2022-06-27</text:p>
          </table:table-cell>
          <table:table-cell table:style-name="ce8" table:formula="of:=MONTH([.A179])" office:value-type="float" office:value="6" calcext:value-type="float">
            <text:p>6</text:p>
          </table:table-cell>
          <table:table-cell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  <table:table-cell table:formula="of:=IF(AND([.D179] = 0; DAY([.A179] &lt;&gt; 1)); [.E178] + 1; 0)" office:value-type="float" office:value="11" calcext:value-type="float">
            <text:p>11</text:p>
          </table:table-cell>
          <table:table-cell table:style-name="ce9" table:formula="of:=IF(AND([.E179] = 0; DAY([.B179] &lt;&gt; 1)); [.F17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8" calcext:value-type="date">
            <text:p>2022-06-28</text:p>
          </table:table-cell>
          <table:table-cell table:style-name="ce8" table:formula="of:=MONTH([.A180])" office:value-type="float" office:value="6" calcext:value-type="float">
            <text:p>6</text:p>
          </table:table-cell>
          <table:table-cell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table:formula="of:=IF(AND([.D180] = 0; DAY([.A180] &lt;&gt; 1)); [.E179] + 1; 0)" office:value-type="float" office:value="0" calcext:value-type="float">
            <text:p>0</text:p>
          </table:table-cell>
          <table:table-cell table:style-name="ce9" table:formula="of:=IF(AND([.E180] = 0; DAY([.B180] &lt;&gt; 1)); [.F179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29" calcext:value-type="date">
            <text:p>2022-06-29</text:p>
          </table:table-cell>
          <table:table-cell table:style-name="ce8" table:formula="of:=MONTH([.A181])" office:value-type="float" office:value="6" calcext:value-type="float">
            <text:p>6</text:p>
          </table:table-cell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table:formula="of:=IF(AND([.D181] = 0; DAY([.A181] &lt;&gt; 1)); [.E180] + 1; 0)" office:value-type="float" office:value="1" calcext:value-type="float">
            <text:p>1</text:p>
          </table:table-cell>
          <table:table-cell table:style-name="ce9" table:formula="of:=IF(AND([.E181] = 0; DAY([.B181] &lt;&gt; 1)); [.F18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6-30" calcext:value-type="date">
            <text:p>2022-06-30</text:p>
          </table:table-cell>
          <table:table-cell table:style-name="ce8" table:formula="of:=MONTH([.A182]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AND([.D182] = 0; DAY([.A182] &lt;&gt; 1)); [.E181] + 1; 0)" office:value-type="float" office:value="2" calcext:value-type="float">
            <text:p>2</text:p>
          </table:table-cell>
          <table:table-cell table:style-name="ce9" table:formula="of:=IF(AND([.E182] = 0; DAY([.B182] &lt;&gt; 1)); [.F18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1" calcext:value-type="date">
            <text:p>2022-07-01</text:p>
          </table:table-cell>
          <table:table-cell table:style-name="ce8" table:formula="of:=MONTH([.A183])" office:value-type="float" office:value="7" calcext:value-type="float">
            <text:p>7</text:p>
          </table:table-cell>
          <table:table-cell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  <table:table-cell table:formula="of:=IF(AND([.D183] = 0; DAY([.A183] &lt;&gt; 1)); [.E182] + 1; 0)" office:value-type="float" office:value="3" calcext:value-type="float">
            <text:p>3</text:p>
          </table:table-cell>
          <table:table-cell table:style-name="ce9" table:formula="of:=IF(AND([.E183] = 0; DAY([.B183] &lt;&gt; 1)); [.F18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2" calcext:value-type="date">
            <text:p>2022-07-02</text:p>
          </table:table-cell>
          <table:table-cell table:style-name="ce8" table:formula="of:=MONTH([.A184])" office:value-type="float" office:value="7" calcext:value-type="float">
            <text:p>7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formula="of:=IF(AND([.D184] = 0; DAY([.A184] &lt;&gt; 1)); [.E183] + 1; 0)" office:value-type="float" office:value="4" calcext:value-type="float">
            <text:p>4</text:p>
          </table:table-cell>
          <table:table-cell table:style-name="ce9" table:formula="of:=IF(AND([.E184] = 0; DAY([.B184] &lt;&gt; 1)); [.F18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3" calcext:value-type="date">
            <text:p>2022-07-03</text:p>
          </table:table-cell>
          <table:table-cell table:style-name="ce8" table:formula="of:=MONTH([.A185])" office:value-type="float" office:value="7" calcext:value-type="float">
            <text:p>7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formula="of:=IF(AND([.D185] = 0; DAY([.A185] &lt;&gt; 1)); [.E184] + 1; 0)" office:value-type="float" office:value="5" calcext:value-type="float">
            <text:p>5</text:p>
          </table:table-cell>
          <table:table-cell table:style-name="ce9" table:formula="of:=IF(AND([.E185] = 0; DAY([.B185] &lt;&gt; 1)); [.F18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4" calcext:value-type="date">
            <text:p>2022-07-04</text:p>
          </table:table-cell>
          <table:table-cell table:style-name="ce8" table:formula="of:=MONTH([.A186])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IF(AND([.D186] = 0; DAY([.A186] &lt;&gt; 1)); [.E185] + 1; 0)" office:value-type="float" office:value="6" calcext:value-type="float">
            <text:p>6</text:p>
          </table:table-cell>
          <table:table-cell table:style-name="ce9" table:formula="of:=IF(AND([.E186] = 0; DAY([.B186] &lt;&gt; 1)); [.F18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5" calcext:value-type="date">
            <text:p>2022-07-05</text:p>
          </table:table-cell>
          <table:table-cell table:style-name="ce8" table:formula="of:=MONTH([.A187])" office:value-type="float" office:value="7" calcext:value-type="float">
            <text:p>7</text:p>
          </table:table-cell>
          <table:table-cell office:value-type="float" office:value="19.8" calcext:value-type="float">
            <text:p>19,8</text:p>
          </table:table-cell>
          <table:table-cell office:value-type="float" office:value="17" calcext:value-type="float">
            <text:p>17</text:p>
          </table:table-cell>
          <table:table-cell table:formula="of:=IF(AND([.D187] = 0; DAY([.A187] &lt;&gt; 1)); [.E186] + 1; 0)" office:value-type="float" office:value="0" calcext:value-type="float">
            <text:p>0</text:p>
          </table:table-cell>
          <table:table-cell table:style-name="ce9" table:formula="of:=IF(AND([.E187] = 0; DAY([.B187] &lt;&gt; 1)); [.F186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6" calcext:value-type="date">
            <text:p>2022-07-06</text:p>
          </table:table-cell>
          <table:table-cell table:style-name="ce8" table:formula="of:=MONTH([.A188])" office:value-type="float" office:value="7" calcext:value-type="float">
            <text:p>7</text:p>
          </table:table-cell>
          <table:table-cell office:value-type="float" office:value="17.6" calcext:value-type="float">
            <text:p>17,6</text:p>
          </table:table-cell>
          <table:table-cell office:value-type="float" office:value="21" calcext:value-type="float">
            <text:p>21</text:p>
          </table:table-cell>
          <table:table-cell table:formula="of:=IF(AND([.D188] = 0; DAY([.A188] &lt;&gt; 1)); [.E187] + 1; 0)" office:value-type="float" office:value="0" calcext:value-type="float">
            <text:p>0</text:p>
          </table:table-cell>
          <table:table-cell table:style-name="ce9" table:formula="of:=IF(AND([.E188] = 0; DAY([.B188] &lt;&gt; 1)); [.F187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7" calcext:value-type="date">
            <text:p>2022-07-07</text:p>
          </table:table-cell>
          <table:table-cell table:style-name="ce8" table:formula="of:=MONTH([.A189])" office:value-type="float" office:value="7" calcext:value-type="float">
            <text:p>7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formula="of:=IF(AND([.D189] = 0; DAY([.A189] &lt;&gt; 1)); [.E188] + 1; 0)" office:value-type="float" office:value="1" calcext:value-type="float">
            <text:p>1</text:p>
          </table:table-cell>
          <table:table-cell table:style-name="ce9" table:formula="of:=IF(AND([.E189] = 0; DAY([.B189] &lt;&gt; 1)); [.F18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8" calcext:value-type="date">
            <text:p>2022-07-08</text:p>
          </table:table-cell>
          <table:table-cell table:style-name="ce8" table:formula="of:=MONTH([.A190])" office:value-type="float" office:value="7" calcext:value-type="float">
            <text:p>7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formula="of:=IF(AND([.D190] = 0; DAY([.A190] &lt;&gt; 1)); [.E189] + 1; 0)" office:value-type="float" office:value="2" calcext:value-type="float">
            <text:p>2</text:p>
          </table:table-cell>
          <table:table-cell table:style-name="ce9" table:formula="of:=IF(AND([.E190] = 0; DAY([.B190] &lt;&gt; 1)); [.F18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9" calcext:value-type="date">
            <text:p>2022-07-09</text:p>
          </table:table-cell>
          <table:table-cell table:style-name="ce8" table:formula="of:=MONTH([.A191])"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formula="of:=IF(AND([.D191] = 0; DAY([.A191] &lt;&gt; 1)); [.E190] + 1; 0)" office:value-type="float" office:value="3" calcext:value-type="float">
            <text:p>3</text:p>
          </table:table-cell>
          <table:table-cell table:style-name="ce9" table:formula="of:=IF(AND([.E191] = 0; DAY([.B191] &lt;&gt; 1)); [.F19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0" calcext:value-type="date">
            <text:p>2022-07-10</text:p>
          </table:table-cell>
          <table:table-cell table:style-name="ce8" table:formula="of:=MONTH([.A192])" office:value-type="float" office:value="7" calcext:value-type="float">
            <text:p>7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  <table:table-cell table:formula="of:=IF(AND([.D192] = 0; DAY([.A192] &lt;&gt; 1)); [.E191] + 1; 0)" office:value-type="float" office:value="0" calcext:value-type="float">
            <text:p>0</text:p>
          </table:table-cell>
          <table:table-cell table:style-name="ce9" table:formula="of:=IF(AND([.E192] = 0; DAY([.B192] &lt;&gt; 1)); [.F191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1" calcext:value-type="date">
            <text:p>2022-07-11</text:p>
          </table:table-cell>
          <table:table-cell table:style-name="ce8" table:formula="of:=MONTH([.A193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AND([.D193] = 0; DAY([.A193] &lt;&gt; 1)); [.E192] + 1; 0)" office:value-type="float" office:value="0" calcext:value-type="float">
            <text:p>0</text:p>
          </table:table-cell>
          <table:table-cell table:style-name="ce9" table:formula="of:=IF(AND([.E193] = 0; DAY([.B193] &lt;&gt; 1)); [.F192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2" calcext:value-type="date">
            <text:p>2022-07-12</text:p>
          </table:table-cell>
          <table:table-cell table:style-name="ce8" table:formula="of:=MONTH([.A194])" office:value-type="float" office:value="7" calcext:value-type="float">
            <text:p>7</text:p>
          </table:table-cell>
          <table:table-cell office:value-type="float" office:value="16.3" calcext:value-type="float">
            <text:p>16,3</text:p>
          </table:table-cell>
          <table:table-cell office:value-type="float" office:value="2" calcext:value-type="float">
            <text:p>2</text:p>
          </table:table-cell>
          <table:table-cell table:formula="of:=IF(AND([.D194] = 0; DAY([.A194] &lt;&gt; 1)); [.E193] + 1; 0)" office:value-type="float" office:value="0" calcext:value-type="float">
            <text:p>0</text:p>
          </table:table-cell>
          <table:table-cell table:style-name="ce9" table:formula="of:=IF(AND([.E194] = 0; DAY([.B194] &lt;&gt; 1)); [.F193] + 1; 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3" calcext:value-type="date">
            <text:p>2022-07-13</text:p>
          </table:table-cell>
          <table:table-cell table:style-name="ce8" table:formula="of:=MONTH([.A195])" office:value-type="float" office:value="7" calcext:value-type="float">
            <text:p>7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formula="of:=IF(AND([.D195] = 0; DAY([.A195] &lt;&gt; 1)); [.E194] + 1; 0)" office:value-type="float" office:value="1" calcext:value-type="float">
            <text:p>1</text:p>
          </table:table-cell>
          <table:table-cell table:style-name="ce9" table:formula="of:=IF(AND([.E195] = 0; DAY([.B195] &lt;&gt; 1)); [.F19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4" calcext:value-type="date">
            <text:p>2022-07-14</text:p>
          </table:table-cell>
          <table:table-cell table:style-name="ce8" table:formula="of:=MONTH([.A196])" office:value-type="float" office:value="7" calcext:value-type="float">
            <text:p>7</text:p>
          </table:table-cell>
          <table:table-cell office:value-type="float" office:value="23.2" calcext:value-type="float">
            <text:p>23,2</text:p>
          </table:table-cell>
          <table:table-cell office:value-type="float" office:value="4" calcext:value-type="float">
            <text:p>4</text:p>
          </table:table-cell>
          <table:table-cell table:formula="of:=IF(AND([.D196] = 0; DAY([.A196] &lt;&gt; 1)); [.E195] + 1; 0)" office:value-type="float" office:value="0" calcext:value-type="float">
            <text:p>0</text:p>
          </table:table-cell>
          <table:table-cell table:style-name="ce9" table:formula="of:=IF(AND([.E196] = 0; DAY([.B196] &lt;&gt; 1)); [.F19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5" calcext:value-type="date">
            <text:p>2022-07-15</text:p>
          </table:table-cell>
          <table:table-cell table:style-name="ce8" table:formula="of:=MONTH([.A197])" office:value-type="float" office:value="7" calcext:value-type="float">
            <text:p>7</text:p>
          </table:table-cell>
          <table:table-cell office:value-type="float" office:value="19.1" calcext:value-type="float">
            <text:p>19,1</text:p>
          </table:table-cell>
          <table:table-cell office:value-type="float" office:value="2" calcext:value-type="float">
            <text:p>2</text:p>
          </table:table-cell>
          <table:table-cell table:formula="of:=IF(AND([.D197] = 0; DAY([.A197] &lt;&gt; 1)); [.E196] + 1; 0)" office:value-type="float" office:value="0" calcext:value-type="float">
            <text:p>0</text:p>
          </table:table-cell>
          <table:table-cell table:style-name="ce9" table:formula="of:=IF(AND([.E197] = 0; DAY([.B197] &lt;&gt; 1)); [.F196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6" calcext:value-type="date">
            <text:p>2022-07-16</text:p>
          </table:table-cell>
          <table:table-cell table:style-name="ce8" table:formula="of:=MONTH([.A198])" office:value-type="float" office:value="7" calcext:value-type="float">
            <text:p>7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198] = 0; DAY([.A198] &lt;&gt; 1)); [.E197] + 1; 0)" office:value-type="float" office:value="1" calcext:value-type="float">
            <text:p>1</text:p>
          </table:table-cell>
          <table:table-cell table:style-name="ce9" table:formula="of:=IF(AND([.E198] = 0; DAY([.B198] &lt;&gt; 1)); [.F19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7" calcext:value-type="date">
            <text:p>2022-07-17</text:p>
          </table:table-cell>
          <table:table-cell table:style-name="ce8" table:formula="of:=MONTH([.A199])" office:value-type="float" office:value="7" calcext:value-type="float">
            <text:p>7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formula="of:=IF(AND([.D199] = 0; DAY([.A199] &lt;&gt; 1)); [.E198] + 1; 0)" office:value-type="float" office:value="2" calcext:value-type="float">
            <text:p>2</text:p>
          </table:table-cell>
          <table:table-cell table:style-name="ce9" table:formula="of:=IF(AND([.E199] = 0; DAY([.B199] &lt;&gt; 1)); [.F19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8" calcext:value-type="date">
            <text:p>2022-07-18</text:p>
          </table:table-cell>
          <table:table-cell table:style-name="ce8" table:formula="of:=MONTH([.A200])" office:value-type="float" office:value="7" calcext:value-type="float">
            <text:p>7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formula="of:=IF(AND([.D200] = 0; DAY([.A200] &lt;&gt; 1)); [.E199] + 1; 0)" office:value-type="float" office:value="3" calcext:value-type="float">
            <text:p>3</text:p>
          </table:table-cell>
          <table:table-cell table:style-name="ce9" table:formula="of:=IF(AND([.E200] = 0; DAY([.B200] &lt;&gt; 1)); [.F19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9" calcext:value-type="date">
            <text:p>2022-07-19</text:p>
          </table:table-cell>
          <table:table-cell table:style-name="ce8" table:formula="of:=MONTH([.A201])" office:value-type="float" office:value="7" calcext:value-type="float">
            <text:p>7</text:p>
          </table:table-cell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  <table:table-cell table:formula="of:=IF(AND([.D201] = 0; DAY([.A201] &lt;&gt; 1)); [.E200] + 1; 0)" office:value-type="float" office:value="4" calcext:value-type="float">
            <text:p>4</text:p>
          </table:table-cell>
          <table:table-cell table:style-name="ce9" table:formula="of:=IF(AND([.E201] = 0; DAY([.B201] &lt;&gt; 1)); [.F20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0" calcext:value-type="date">
            <text:p>2022-07-20</text:p>
          </table:table-cell>
          <table:table-cell table:style-name="ce8" table:formula="of:=MONTH([.A202])" office:value-type="float" office:value="7" calcext:value-type="float">
            <text:p>7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formula="of:=IF(AND([.D202] = 0; DAY([.A202] &lt;&gt; 1)); [.E201] + 1; 0)" office:value-type="float" office:value="5" calcext:value-type="float">
            <text:p>5</text:p>
          </table:table-cell>
          <table:table-cell table:style-name="ce9" table:formula="of:=IF(AND([.E202] = 0; DAY([.B202] &lt;&gt; 1)); [.F20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1" calcext:value-type="date">
            <text:p>2022-07-21</text:p>
          </table:table-cell>
          <table:table-cell table:style-name="ce8" table:formula="of:=MONTH([.A203])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IF(AND([.D203] = 0; DAY([.A203] &lt;&gt; 1)); [.E202] + 1; 0)" office:value-type="float" office:value="6" calcext:value-type="float">
            <text:p>6</text:p>
          </table:table-cell>
          <table:table-cell table:style-name="ce9" table:formula="of:=IF(AND([.E203] = 0; DAY([.B203] &lt;&gt; 1)); [.F20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2" calcext:value-type="date">
            <text:p>2022-07-22</text:p>
          </table:table-cell>
          <table:table-cell table:style-name="ce8" table:formula="of:=MONTH([.A204])" office:value-type="float" office:value="7" calcext:value-type="float">
            <text:p>7</text:p>
          </table:table-cell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table:formula="of:=IF(AND([.D204] = 0; DAY([.A204] &lt;&gt; 1)); [.E203] + 1; 0)" office:value-type="float" office:value="7" calcext:value-type="float">
            <text:p>7</text:p>
          </table:table-cell>
          <table:table-cell table:style-name="ce9" table:formula="of:=IF(AND([.E204] = 0; DAY([.B204] &lt;&gt; 1)); [.F20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3" calcext:value-type="date">
            <text:p>2022-07-23</text:p>
          </table:table-cell>
          <table:table-cell table:style-name="ce8" table:formula="of:=MONTH([.A205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AND([.D205] = 0; DAY([.A205] &lt;&gt; 1)); [.E204] + 1; 0)" office:value-type="float" office:value="8" calcext:value-type="float">
            <text:p>8</text:p>
          </table:table-cell>
          <table:table-cell table:style-name="ce9" table:formula="of:=IF(AND([.E205] = 0; DAY([.B205] &lt;&gt; 1)); [.F20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4" calcext:value-type="date">
            <text:p>2022-07-24</text:p>
          </table:table-cell>
          <table:table-cell table:style-name="ce8" table:formula="of:=MONTH([.A206])" office:value-type="float" office:value="7" calcext:value-type="float">
            <text:p>7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formula="of:=IF(AND([.D206] = 0; DAY([.A206] &lt;&gt; 1)); [.E205] + 1; 0)" office:value-type="float" office:value="9" calcext:value-type="float">
            <text:p>9</text:p>
          </table:table-cell>
          <table:table-cell table:style-name="ce9" table:formula="of:=IF(AND([.E206] = 0; DAY([.B206] &lt;&gt; 1)); [.F20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5" calcext:value-type="date">
            <text:p>2022-07-25</text:p>
          </table:table-cell>
          <table:table-cell table:style-name="ce8" table:formula="of:=MONTH([.A207])" office:value-type="float" office:value="7" calcext:value-type="float">
            <text:p>7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formula="of:=IF(AND([.D207] = 0; DAY([.A207] &lt;&gt; 1)); [.E206] + 1; 0)" office:value-type="float" office:value="10" calcext:value-type="float">
            <text:p>10</text:p>
          </table:table-cell>
          <table:table-cell table:style-name="ce9" table:formula="of:=IF(AND([.E207] = 0; DAY([.B207] &lt;&gt; 1)); [.F20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6" calcext:value-type="date">
            <text:p>2022-07-26</text:p>
          </table:table-cell>
          <table:table-cell table:style-name="ce8" table:formula="of:=MONTH([.A208])" office:value-type="float" office:value="7" calcext:value-type="float">
            <text:p>7</text:p>
          </table:table-cell>
          <table:table-cell office:value-type="float" office:value="20.4" calcext:value-type="float">
            <text:p>20,4</text:p>
          </table:table-cell>
          <table:table-cell office:value-type="float" office:value="3" calcext:value-type="float">
            <text:p>3</text:p>
          </table:table-cell>
          <table:table-cell table:formula="of:=IF(AND([.D208] = 0; DAY([.A208] &lt;&gt; 1)); [.E207] + 1; 0)" office:value-type="float" office:value="0" calcext:value-type="float">
            <text:p>0</text:p>
          </table:table-cell>
          <table:table-cell table:style-name="ce9" table:formula="of:=IF(AND([.E208] = 0; DAY([.B208] &lt;&gt; 1)); [.F207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7" calcext:value-type="date">
            <text:p>2022-07-27</text:p>
          </table:table-cell>
          <table:table-cell table:style-name="ce8" table:formula="of:=MONTH([.A209])"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IF(AND([.D209] = 0; DAY([.A209] &lt;&gt; 1)); [.E208] + 1; 0)" office:value-type="float" office:value="1" calcext:value-type="float">
            <text:p>1</text:p>
          </table:table-cell>
          <table:table-cell table:style-name="ce9" table:formula="of:=IF(AND([.E209] = 0; DAY([.B209] &lt;&gt; 1)); [.F20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8" calcext:value-type="date">
            <text:p>2022-07-28</text:p>
          </table:table-cell>
          <table:table-cell table:style-name="ce8" table:formula="of:=MONTH([.A210])"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  <table:table-cell office:value-type="float" office:value="7" calcext:value-type="float">
            <text:p>7</text:p>
          </table:table-cell>
          <table:table-cell table:formula="of:=IF(AND([.D210] = 0; DAY([.A210] &lt;&gt; 1)); [.E209] + 1; 0)" office:value-type="float" office:value="0" calcext:value-type="float">
            <text:p>0</text:p>
          </table:table-cell>
          <table:table-cell table:style-name="ce9" table:formula="of:=IF(AND([.E210] = 0; DAY([.B210] &lt;&gt; 1)); [.F209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29" calcext:value-type="date">
            <text:p>2022-07-29</text:p>
          </table:table-cell>
          <table:table-cell table:style-name="ce8" table:formula="of:=MONTH([.A211])" office:value-type="float" office:value="7" calcext:value-type="float">
            <text:p>7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formula="of:=IF(AND([.D211] = 0; DAY([.A211] &lt;&gt; 1)); [.E210] + 1; 0)" office:value-type="float" office:value="1" calcext:value-type="float">
            <text:p>1</text:p>
          </table:table-cell>
          <table:table-cell table:style-name="ce9" table:formula="of:=IF(AND([.E211] = 0; DAY([.B211] &lt;&gt; 1)); [.F21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30" calcext:value-type="date">
            <text:p>2022-07-30</text:p>
          </table:table-cell>
          <table:table-cell table:style-name="ce8" table:formula="of:=MONTH([.A212])" office:value-type="float" office:value="7" calcext:value-type="float">
            <text:p>7</text:p>
          </table:table-cell>
          <table:table-cell office:value-type="float" office:value="20.7" calcext:value-type="float">
            <text:p>20,7</text:p>
          </table:table-cell>
          <table:table-cell office:value-type="float" office:value="37" calcext:value-type="float">
            <text:p>37</text:p>
          </table:table-cell>
          <table:table-cell table:formula="of:=IF(AND([.D212] = 0; DAY([.A212] &lt;&gt; 1)); [.E211] + 1; 0)" office:value-type="float" office:value="0" calcext:value-type="float">
            <text:p>0</text:p>
          </table:table-cell>
          <table:table-cell table:style-name="ce9" table:formula="of:=IF(AND([.E212] = 0; DAY([.B212] &lt;&gt; 1)); [.F211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31" calcext:value-type="date">
            <text:p>2022-07-31</text:p>
          </table:table-cell>
          <table:table-cell table:style-name="ce8" table:formula="of:=MONTH([.A213])" office:value-type="float" office:value="7" calcext:value-type="float">
            <text:p>7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formula="of:=IF(AND([.D213] = 0; DAY([.A213] &lt;&gt; 1)); [.E212] + 1; 0)" office:value-type="float" office:value="1" calcext:value-type="float">
            <text:p>1</text:p>
          </table:table-cell>
          <table:table-cell table:style-name="ce9" table:formula="of:=IF(AND([.E213] = 0; DAY([.B213] &lt;&gt; 1)); [.F21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1" calcext:value-type="date">
            <text:p>2022-08-01</text:p>
          </table:table-cell>
          <table:table-cell table:style-name="ce8" table:formula="of:=MONTH([.A214])" office:value-type="float" office:value="8" calcext:value-type="float">
            <text:p>8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table:formula="of:=IF(AND([.D214] = 0; DAY([.A214] &lt;&gt; 1)); [.E213] + 1; 0)" office:value-type="float" office:value="0" calcext:value-type="float">
            <text:p>0</text:p>
          </table:table-cell>
          <table:table-cell table:style-name="ce9" table:formula="of:=IF(AND([.E214] = 0; DAY([.B214] &lt;&gt; 1)); [.F21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2" calcext:value-type="date">
            <text:p>2022-08-02</text:p>
          </table:table-cell>
          <table:table-cell table:style-name="ce8" table:formula="of:=MONTH([.A215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AND([.D215] = 0; DAY([.A215] &lt;&gt; 1)); [.E214] + 1; 0)" office:value-type="float" office:value="0" calcext:value-type="float">
            <text:p>0</text:p>
          </table:table-cell>
          <table:table-cell table:style-name="ce9" table:formula="of:=IF(AND([.E215] = 0; DAY([.B215] &lt;&gt; 1)); [.F214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3" calcext:value-type="date">
            <text:p>2022-08-03</text:p>
          </table:table-cell>
          <table:table-cell table:style-name="ce8" table:formula="of:=MONTH([.A216])" office:value-type="float" office:value="8" calcext:value-type="float">
            <text:p>8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formula="of:=IF(AND([.D216] = 0; DAY([.A216] &lt;&gt; 1)); [.E215] + 1; 0)" office:value-type="float" office:value="1" calcext:value-type="float">
            <text:p>1</text:p>
          </table:table-cell>
          <table:table-cell table:style-name="ce9" table:formula="of:=IF(AND([.E216] = 0; DAY([.B216] &lt;&gt; 1)); [.F21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4" calcext:value-type="date">
            <text:p>2022-08-04</text:p>
          </table:table-cell>
          <table:table-cell table:style-name="ce8" table:formula="of:=MONTH([.A217])" office:value-type="float" office:value="8" calcext:value-type="float">
            <text:p>8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formula="of:=IF(AND([.D217] = 0; DAY([.A217] &lt;&gt; 1)); [.E216] + 1; 0)" office:value-type="float" office:value="2" calcext:value-type="float">
            <text:p>2</text:p>
          </table:table-cell>
          <table:table-cell table:style-name="ce9" table:formula="of:=IF(AND([.E217] = 0; DAY([.B217] &lt;&gt; 1)); [.F21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5" calcext:value-type="date">
            <text:p>2022-08-05</text:p>
          </table:table-cell>
          <table:table-cell table:style-name="ce8" table:formula="of:=MONTH([.A218])" office:value-type="float" office:value="8" calcext:value-type="float">
            <text:p>8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formula="of:=IF(AND([.D218] = 0; DAY([.A218] &lt;&gt; 1)); [.E217] + 1; 0)" office:value-type="float" office:value="3" calcext:value-type="float">
            <text:p>3</text:p>
          </table:table-cell>
          <table:table-cell table:style-name="ce9" table:formula="of:=IF(AND([.E218] = 0; DAY([.B218] &lt;&gt; 1)); [.F21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6" calcext:value-type="date">
            <text:p>2022-08-06</text:p>
          </table:table-cell>
          <table:table-cell table:style-name="ce8" table:formula="of:=MONTH([.A219])" office:value-type="float" office:value="8" calcext:value-type="float">
            <text:p>8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formula="of:=IF(AND([.D219] = 0; DAY([.A219] &lt;&gt; 1)); [.E218] + 1; 0)" office:value-type="float" office:value="4" calcext:value-type="float">
            <text:p>4</text:p>
          </table:table-cell>
          <table:table-cell table:style-name="ce9" table:formula="of:=IF(AND([.E219] = 0; DAY([.B219] &lt;&gt; 1)); [.F21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7" calcext:value-type="date">
            <text:p>2022-08-07</text:p>
          </table:table-cell>
          <table:table-cell table:style-name="ce8" table:formula="of:=MONTH([.A220])"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formula="of:=IF(AND([.D220] = 0; DAY([.A220] &lt;&gt; 1)); [.E219] + 1; 0)" office:value-type="float" office:value="5" calcext:value-type="float">
            <text:p>5</text:p>
          </table:table-cell>
          <table:table-cell table:style-name="ce9" table:formula="of:=IF(AND([.E220] = 0; DAY([.B220] &lt;&gt; 1)); [.F21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8" calcext:value-type="date">
            <text:p>2022-08-08</text:p>
          </table:table-cell>
          <table:table-cell table:style-name="ce8" table:formula="of:=MONTH([.A221])" office:value-type="float" office:value="8" calcext:value-type="float">
            <text:p>8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formula="of:=IF(AND([.D221] = 0; DAY([.A221] &lt;&gt; 1)); [.E220] + 1; 0)" office:value-type="float" office:value="6" calcext:value-type="float">
            <text:p>6</text:p>
          </table:table-cell>
          <table:table-cell table:style-name="ce9" table:formula="of:=IF(AND([.E221] = 0; DAY([.B221] &lt;&gt; 1)); [.F22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09" calcext:value-type="date">
            <text:p>2022-08-09</text:p>
          </table:table-cell>
          <table:table-cell table:style-name="ce8" table:formula="of:=MONTH([.A222])" office:value-type="float" office:value="8" calcext:value-type="float">
            <text:p>8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formula="of:=IF(AND([.D222] = 0; DAY([.A222] &lt;&gt; 1)); [.E221] + 1; 0)" office:value-type="float" office:value="7" calcext:value-type="float">
            <text:p>7</text:p>
          </table:table-cell>
          <table:table-cell table:style-name="ce9" table:formula="of:=IF(AND([.E222] = 0; DAY([.B222] &lt;&gt; 1)); [.F22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0" calcext:value-type="date">
            <text:p>2022-08-10</text:p>
          </table:table-cell>
          <table:table-cell table:style-name="ce8" table:formula="of:=MONTH([.A223])" office:value-type="float" office:value="8" calcext:value-type="float">
            <text:p>8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formula="of:=IF(AND([.D223] = 0; DAY([.A223] &lt;&gt; 1)); [.E222] + 1; 0)" office:value-type="float" office:value="8" calcext:value-type="float">
            <text:p>8</text:p>
          </table:table-cell>
          <table:table-cell table:style-name="ce9" table:formula="of:=IF(AND([.E223] = 0; DAY([.B223] &lt;&gt; 1)); [.F22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1" calcext:value-type="date">
            <text:p>2022-08-11</text:p>
          </table:table-cell>
          <table:table-cell table:style-name="ce8" table:formula="of:=MONTH([.A224])" office:value-type="float" office:value="8" calcext:value-type="float">
            <text:p>8</text:p>
          </table:table-cell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formula="of:=IF(AND([.D224] = 0; DAY([.A224] &lt;&gt; 1)); [.E223] + 1; 0)" office:value-type="float" office:value="0" calcext:value-type="float">
            <text:p>0</text:p>
          </table:table-cell>
          <table:table-cell table:style-name="ce9" table:formula="of:=IF(AND([.E224] = 0; DAY([.B224] &lt;&gt; 1)); [.F22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2" calcext:value-type="date">
            <text:p>2022-08-12</text:p>
          </table:table-cell>
          <table:table-cell table:style-name="ce8" table:formula="of:=MONTH([.A225])" office:value-type="float" office:value="8" calcext:value-type="float">
            <text:p>8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formula="of:=IF(AND([.D225] = 0; DAY([.A225] &lt;&gt; 1)); [.E224] + 1; 0)" office:value-type="float" office:value="1" calcext:value-type="float">
            <text:p>1</text:p>
          </table:table-cell>
          <table:table-cell table:style-name="ce9" table:formula="of:=IF(AND([.E225] = 0; DAY([.B225] &lt;&gt; 1)); [.F22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3" calcext:value-type="date">
            <text:p>2022-08-13</text:p>
          </table:table-cell>
          <table:table-cell table:style-name="ce8" table:formula="of:=MONTH([.A226])" office:value-type="float" office:value="8" calcext:value-type="float">
            <text:p>8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formula="of:=IF(AND([.D226] = 0; DAY([.A226] &lt;&gt; 1)); [.E225] + 1; 0)" office:value-type="float" office:value="2" calcext:value-type="float">
            <text:p>2</text:p>
          </table:table-cell>
          <table:table-cell table:style-name="ce9" table:formula="of:=IF(AND([.E226] = 0; DAY([.B226] &lt;&gt; 1)); [.F22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4" calcext:value-type="date">
            <text:p>2022-08-14</text:p>
          </table:table-cell>
          <table:table-cell table:style-name="ce8" table:formula="of:=MONTH([.A227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IF(AND([.D227] = 0; DAY([.A227] &lt;&gt; 1)); [.E226] + 1; 0)" office:value-type="float" office:value="0" calcext:value-type="float">
            <text:p>0</text:p>
          </table:table-cell>
          <table:table-cell table:style-name="ce9" table:formula="of:=IF(AND([.E227] = 0; DAY([.B227] &lt;&gt; 1)); [.F226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5" calcext:value-type="date">
            <text:p>2022-08-15</text:p>
          </table:table-cell>
          <table:table-cell table:style-name="ce8" table:formula="of:=MONTH([.A228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AND([.D228] = 0; DAY([.A228] &lt;&gt; 1)); [.E227] + 1; 0)" office:value-type="float" office:value="1" calcext:value-type="float">
            <text:p>1</text:p>
          </table:table-cell>
          <table:table-cell table:style-name="ce9" table:formula="of:=IF(AND([.E228] = 0; DAY([.B228] &lt;&gt; 1)); [.F22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6" calcext:value-type="date">
            <text:p>2022-08-16</text:p>
          </table:table-cell>
          <table:table-cell table:style-name="ce8" table:formula="of:=MONTH([.A229])" office:value-type="float" office:value="8" calcext:value-type="float">
            <text:p>8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formula="of:=IF(AND([.D229] = 0; DAY([.A229] &lt;&gt; 1)); [.E228] + 1; 0)" office:value-type="float" office:value="2" calcext:value-type="float">
            <text:p>2</text:p>
          </table:table-cell>
          <table:table-cell table:style-name="ce9" table:formula="of:=IF(AND([.E229] = 0; DAY([.B229] &lt;&gt; 1)); [.F22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7" calcext:value-type="date">
            <text:p>2022-08-17</text:p>
          </table:table-cell>
          <table:table-cell table:style-name="ce8" table:formula="of:=MONTH([.A230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formula="of:=IF(AND([.D230] = 0; DAY([.A230] &lt;&gt; 1)); [.E229] + 1; 0)" office:value-type="float" office:value="3" calcext:value-type="float">
            <text:p>3</text:p>
          </table:table-cell>
          <table:table-cell table:style-name="ce9" table:formula="of:=IF(AND([.E230] = 0; DAY([.B230] &lt;&gt; 1)); [.F22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8" calcext:value-type="date">
            <text:p>2022-08-18</text:p>
          </table:table-cell>
          <table:table-cell table:style-name="ce8" table:formula="of:=MONTH([.A231])" office:value-type="float" office:value="8" calcext:value-type="float">
            <text:p>8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IF(AND([.D231] = 0; DAY([.A231] &lt;&gt; 1)); [.E230] + 1; 0)" office:value-type="float" office:value="4" calcext:value-type="float">
            <text:p>4</text:p>
          </table:table-cell>
          <table:table-cell table:style-name="ce9" table:formula="of:=IF(AND([.E231] = 0; DAY([.B231] &lt;&gt; 1)); [.F23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19" calcext:value-type="date">
            <text:p>2022-08-19</text:p>
          </table:table-cell>
          <table:table-cell table:style-name="ce8" table:formula="of:=MONTH([.A232])" office:value-type="float" office:value="8" calcext:value-type="float">
            <text:p>8</text:p>
          </table:table-cell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  <table:table-cell table:formula="of:=IF(AND([.D232] = 0; DAY([.A232] &lt;&gt; 1)); [.E231] + 1; 0)" office:value-type="float" office:value="5" calcext:value-type="float">
            <text:p>5</text:p>
          </table:table-cell>
          <table:table-cell table:style-name="ce9" table:formula="of:=IF(AND([.E232] = 0; DAY([.B232] &lt;&gt; 1)); [.F23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0" calcext:value-type="date">
            <text:p>2022-08-20</text:p>
          </table:table-cell>
          <table:table-cell table:style-name="ce8" table:formula="of:=MONTH([.A233])"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table:formula="of:=IF(AND([.D233] = 0; DAY([.A233] &lt;&gt; 1)); [.E232] + 1; 0)" office:value-type="float" office:value="6" calcext:value-type="float">
            <text:p>6</text:p>
          </table:table-cell>
          <table:table-cell table:style-name="ce9" table:formula="of:=IF(AND([.E233] = 0; DAY([.B233] &lt;&gt; 1)); [.F23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1" calcext:value-type="date">
            <text:p>2022-08-21</text:p>
          </table:table-cell>
          <table:table-cell table:style-name="ce8" table:formula="of:=MONTH([.A234])" office:value-type="float" office:value="8" calcext:value-type="float">
            <text:p>8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table:formula="of:=IF(AND([.D234] = 0; DAY([.A234] &lt;&gt; 1)); [.E233] + 1; 0)" office:value-type="float" office:value="0" calcext:value-type="float">
            <text:p>0</text:p>
          </table:table-cell>
          <table:table-cell table:style-name="ce9" table:formula="of:=IF(AND([.E234] = 0; DAY([.B234] &lt;&gt; 1)); [.F23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2" calcext:value-type="date">
            <text:p>2022-08-22</text:p>
          </table:table-cell>
          <table:table-cell table:style-name="ce8" table:formula="of:=MONTH([.A235])" office:value-type="float" office:value="8" calcext:value-type="float">
            <text:p>8</text:p>
          </table:table-cell>
          <table:table-cell office:value-type="float" office:value="20.1" calcext:value-type="float">
            <text:p>20,1</text:p>
          </table:table-cell>
          <table:table-cell office:value-type="float" office:value="11" calcext:value-type="float">
            <text:p>11</text:p>
          </table:table-cell>
          <table:table-cell table:formula="of:=IF(AND([.D235] = 0; DAY([.A235] &lt;&gt; 1)); [.E234] + 1; 0)" office:value-type="float" office:value="0" calcext:value-type="float">
            <text:p>0</text:p>
          </table:table-cell>
          <table:table-cell table:style-name="ce9" table:formula="of:=IF(AND([.E235] = 0; DAY([.B235] &lt;&gt; 1)); [.F234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3" calcext:value-type="date">
            <text:p>2022-08-23</text:p>
          </table:table-cell>
          <table:table-cell table:style-name="ce8" table:formula="of:=MONTH([.A236])" office:value-type="float" office:value="8" calcext:value-type="float">
            <text:p>8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formula="of:=IF(AND([.D236] = 0; DAY([.A236] &lt;&gt; 1)); [.E235] + 1; 0)" office:value-type="float" office:value="1" calcext:value-type="float">
            <text:p>1</text:p>
          </table:table-cell>
          <table:table-cell table:style-name="ce9" table:formula="of:=IF(AND([.E236] = 0; DAY([.B236] &lt;&gt; 1)); [.F23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4" calcext:value-type="date">
            <text:p>2022-08-24</text:p>
          </table:table-cell>
          <table:table-cell table:style-name="ce8" table:formula="of:=MONTH([.A237])" office:value-type="float" office:value="8" calcext:value-type="float">
            <text:p>8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  <table:table-cell table:formula="of:=IF(AND([.D237] = 0; DAY([.A237] &lt;&gt; 1)); [.E236] + 1; 0)" office:value-type="float" office:value="0" calcext:value-type="float">
            <text:p>0</text:p>
          </table:table-cell>
          <table:table-cell table:style-name="ce9" table:formula="of:=IF(AND([.E237] = 0; DAY([.B237] &lt;&gt; 1)); [.F236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5" calcext:value-type="date">
            <text:p>2022-08-25</text:p>
          </table:table-cell>
          <table:table-cell table:style-name="ce8" table:formula="of:=MONTH([.A238])" office:value-type="float" office:value="8" calcext:value-type="float">
            <text:p>8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formula="of:=IF(AND([.D238] = 0; DAY([.A238] &lt;&gt; 1)); [.E237] + 1; 0)" office:value-type="float" office:value="1" calcext:value-type="float">
            <text:p>1</text:p>
          </table:table-cell>
          <table:table-cell table:style-name="ce9" table:formula="of:=IF(AND([.E238] = 0; DAY([.B238] &lt;&gt; 1)); [.F23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6" calcext:value-type="date">
            <text:p>2022-08-26</text:p>
          </table:table-cell>
          <table:table-cell table:style-name="ce8" table:formula="of:=MONTH([.A239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formula="of:=IF(AND([.D239] = 0; DAY([.A239] &lt;&gt; 1)); [.E238] + 1; 0)" office:value-type="float" office:value="2" calcext:value-type="float">
            <text:p>2</text:p>
          </table:table-cell>
          <table:table-cell table:style-name="ce9" table:formula="of:=IF(AND([.E239] = 0; DAY([.B239] &lt;&gt; 1)); [.F23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7" calcext:value-type="date">
            <text:p>2022-08-27</text:p>
          </table:table-cell>
          <table:table-cell table:style-name="ce8" table:formula="of:=MONTH([.A240])"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formula="of:=IF(AND([.D240] = 0; DAY([.A240] &lt;&gt; 1)); [.E239] + 1; 0)" office:value-type="float" office:value="3" calcext:value-type="float">
            <text:p>3</text:p>
          </table:table-cell>
          <table:table-cell table:style-name="ce9" table:formula="of:=IF(AND([.E240] = 0; DAY([.B240] &lt;&gt; 1)); [.F23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8" calcext:value-type="date">
            <text:p>2022-08-28</text:p>
          </table:table-cell>
          <table:table-cell table:style-name="ce8" table:formula="of:=MONTH([.A241])" office:value-type="float" office:value="8" calcext:value-type="float">
            <text:p>8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formula="of:=IF(AND([.D241] = 0; DAY([.A241] &lt;&gt; 1)); [.E240] + 1; 0)" office:value-type="float" office:value="4" calcext:value-type="float">
            <text:p>4</text:p>
          </table:table-cell>
          <table:table-cell table:style-name="ce9" table:formula="of:=IF(AND([.E241] = 0; DAY([.B241] &lt;&gt; 1)); [.F24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29" calcext:value-type="date">
            <text:p>2022-08-29</text:p>
          </table:table-cell>
          <table:table-cell table:style-name="ce8" table:formula="of:=MONTH([.A242])" office:value-type="float" office:value="8" calcext:value-type="float">
            <text:p>8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formula="of:=IF(AND([.D242] = 0; DAY([.A242] &lt;&gt; 1)); [.E241] + 1; 0)" office:value-type="float" office:value="5" calcext:value-type="float">
            <text:p>5</text:p>
          </table:table-cell>
          <table:table-cell table:style-name="ce9" table:formula="of:=IF(AND([.E242] = 0; DAY([.B242] &lt;&gt; 1)); [.F24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30" calcext:value-type="date">
            <text:p>2022-08-30</text:p>
          </table:table-cell>
          <table:table-cell table:style-name="ce8" table:formula="of:=MONTH([.A243])" office:value-type="float" office:value="8" calcext:value-type="float">
            <text:p>8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IF(AND([.D243] = 0; DAY([.A243] &lt;&gt; 1)); [.E242] + 1; 0)" office:value-type="float" office:value="6" calcext:value-type="float">
            <text:p>6</text:p>
          </table:table-cell>
          <table:table-cell table:style-name="ce9" table:formula="of:=IF(AND([.E243] = 0; DAY([.B243] &lt;&gt; 1)); [.F24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8-31" calcext:value-type="date">
            <text:p>2022-08-31</text:p>
          </table:table-cell>
          <table:table-cell table:style-name="ce8" table:formula="of:=MONTH([.A244])" office:value-type="float" office:value="8" calcext:value-type="float">
            <text:p>8</text:p>
          </table:table-cell>
          <table:table-cell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table:formula="of:=IF(AND([.D244] = 0; DAY([.A244] &lt;&gt; 1)); [.E243] + 1; 0)" office:value-type="float" office:value="0" calcext:value-type="float">
            <text:p>0</text:p>
          </table:table-cell>
          <table:table-cell table:style-name="ce9" table:formula="of:=IF(AND([.E244] = 0; DAY([.B244] &lt;&gt; 1)); [.F24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1" calcext:value-type="date">
            <text:p>2022-09-01</text:p>
          </table:table-cell>
          <table:table-cell table:style-name="ce8" table:formula="of:=MONTH([.A245])" office:value-type="float" office:value="9" calcext:value-type="float">
            <text:p>9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formula="of:=IF(AND([.D245] = 0; DAY([.A245] &lt;&gt; 1)); [.E244] + 1; 0)" office:value-type="float" office:value="1" calcext:value-type="float">
            <text:p>1</text:p>
          </table:table-cell>
          <table:table-cell table:style-name="ce9" table:formula="of:=IF(AND([.E245] = 0; DAY([.B245] &lt;&gt; 1)); [.F24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2" calcext:value-type="date">
            <text:p>2022-09-02</text:p>
          </table:table-cell>
          <table:table-cell table:style-name="ce8" table:formula="of:=MONTH([.A246])" office:value-type="float" office:value="9" calcext:value-type="float">
            <text:p>9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formula="of:=IF(AND([.D246] = 0; DAY([.A246] &lt;&gt; 1)); [.E245] + 1; 0)" office:value-type="float" office:value="2" calcext:value-type="float">
            <text:p>2</text:p>
          </table:table-cell>
          <table:table-cell table:style-name="ce9" table:formula="of:=IF(AND([.E246] = 0; DAY([.B246] &lt;&gt; 1)); [.F24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3" calcext:value-type="date">
            <text:p>2022-09-03</text:p>
          </table:table-cell>
          <table:table-cell table:style-name="ce8" table:formula="of:=MONTH([.A247])" office:value-type="float" office:value="9" calcext:value-type="float">
            <text:p>9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IF(AND([.D247] = 0; DAY([.A247] &lt;&gt; 1)); [.E246] + 1; 0)" office:value-type="float" office:value="3" calcext:value-type="float">
            <text:p>3</text:p>
          </table:table-cell>
          <table:table-cell table:style-name="ce9" table:formula="of:=IF(AND([.E247] = 0; DAY([.B247] &lt;&gt; 1)); [.F24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4" calcext:value-type="date">
            <text:p>2022-09-04</text:p>
          </table:table-cell>
          <table:table-cell table:style-name="ce8" table:formula="of:=MONTH([.A248])" office:value-type="float" office:value="9" calcext:value-type="float">
            <text:p>9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formula="of:=IF(AND([.D248] = 0; DAY([.A248] &lt;&gt; 1)); [.E247] + 1; 0)" office:value-type="float" office:value="4" calcext:value-type="float">
            <text:p>4</text:p>
          </table:table-cell>
          <table:table-cell table:style-name="ce9" table:formula="of:=IF(AND([.E248] = 0; DAY([.B248] &lt;&gt; 1)); [.F24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5" calcext:value-type="date">
            <text:p>2022-09-05</text:p>
          </table:table-cell>
          <table:table-cell table:style-name="ce8" table:formula="of:=MONTH([.A249])"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formula="of:=IF(AND([.D249] = 0; DAY([.A249] &lt;&gt; 1)); [.E248] + 1; 0)" office:value-type="float" office:value="5" calcext:value-type="float">
            <text:p>5</text:p>
          </table:table-cell>
          <table:table-cell table:style-name="ce9" table:formula="of:=IF(AND([.E249] = 0; DAY([.B249] &lt;&gt; 1)); [.F24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6" calcext:value-type="date">
            <text:p>2022-09-06</text:p>
          </table:table-cell>
          <table:table-cell table:style-name="ce8" table:formula="of:=MONTH([.A250])" office:value-type="float" office:value="9" calcext:value-type="float">
            <text:p>9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formula="of:=IF(AND([.D250] = 0; DAY([.A250] &lt;&gt; 1)); [.E249] + 1; 0)" office:value-type="float" office:value="6" calcext:value-type="float">
            <text:p>6</text:p>
          </table:table-cell>
          <table:table-cell table:style-name="ce9" table:formula="of:=IF(AND([.E250] = 0; DAY([.B250] &lt;&gt; 1)); [.F24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7" calcext:value-type="date">
            <text:p>2022-09-07</text:p>
          </table:table-cell>
          <table:table-cell table:style-name="ce8" table:formula="of:=MONTH([.A251])" office:value-type="float" office:value="9" calcext:value-type="float">
            <text:p>9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formula="of:=IF(AND([.D251] = 0; DAY([.A251] &lt;&gt; 1)); [.E250] + 1; 0)" office:value-type="float" office:value="7" calcext:value-type="float">
            <text:p>7</text:p>
          </table:table-cell>
          <table:table-cell table:style-name="ce9" table:formula="of:=IF(AND([.E251] = 0; DAY([.B251] &lt;&gt; 1)); [.F25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8" calcext:value-type="date">
            <text:p>2022-09-08</text:p>
          </table:table-cell>
          <table:table-cell table:style-name="ce8" table:formula="of:=MONTH([.A252])" office:value-type="float" office:value="9" calcext:value-type="float">
            <text:p>9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formula="of:=IF(AND([.D252] = 0; DAY([.A252] &lt;&gt; 1)); [.E251] + 1; 0)" office:value-type="float" office:value="8" calcext:value-type="float">
            <text:p>8</text:p>
          </table:table-cell>
          <table:table-cell table:style-name="ce9" table:formula="of:=IF(AND([.E252] = 0; DAY([.B252] &lt;&gt; 1)); [.F25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09" calcext:value-type="date">
            <text:p>2022-09-09</text:p>
          </table:table-cell>
          <table:table-cell table:style-name="ce8" table:formula="of:=MONTH([.A253])" office:value-type="float" office:value="9" calcext:value-type="float">
            <text:p>9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formula="of:=IF(AND([.D253] = 0; DAY([.A253] &lt;&gt; 1)); [.E252] + 1; 0)" office:value-type="float" office:value="9" calcext:value-type="float">
            <text:p>9</text:p>
          </table:table-cell>
          <table:table-cell table:style-name="ce9" table:formula="of:=IF(AND([.E253] = 0; DAY([.B253] &lt;&gt; 1)); [.F25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0" calcext:value-type="date">
            <text:p>2022-09-10</text:p>
          </table:table-cell>
          <table:table-cell table:style-name="ce8" table:formula="of:=MONTH([.A254])" office:value-type="float" office:value="9" calcext:value-type="float">
            <text:p>9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IF(AND([.D254] = 0; DAY([.A254] &lt;&gt; 1)); [.E253] + 1; 0)" office:value-type="float" office:value="10" calcext:value-type="float">
            <text:p>10</text:p>
          </table:table-cell>
          <table:table-cell table:style-name="ce9" table:formula="of:=IF(AND([.E254] = 0; DAY([.B254] &lt;&gt; 1)); [.F25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1" calcext:value-type="date">
            <text:p>2022-09-11</text:p>
          </table:table-cell>
          <table:table-cell table:style-name="ce8" table:formula="of:=MONTH([.A255])" office:value-type="float" office:value="9" calcext:value-type="float">
            <text:p>9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IF(AND([.D255] = 0; DAY([.A255] &lt;&gt; 1)); [.E254] + 1; 0)" office:value-type="float" office:value="11" calcext:value-type="float">
            <text:p>11</text:p>
          </table:table-cell>
          <table:table-cell table:style-name="ce9" table:formula="of:=IF(AND([.E255] = 0; DAY([.B255] &lt;&gt; 1)); [.F25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2" calcext:value-type="date">
            <text:p>2022-09-12</text:p>
          </table:table-cell>
          <table:table-cell table:style-name="ce8" table:formula="of:=MONTH([.A256])"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formula="of:=IF(AND([.D256] = 0; DAY([.A256] &lt;&gt; 1)); [.E255] + 1; 0)" office:value-type="float" office:value="12" calcext:value-type="float">
            <text:p>12</text:p>
          </table:table-cell>
          <table:table-cell table:style-name="ce9" table:formula="of:=IF(AND([.E256] = 0; DAY([.B256] &lt;&gt; 1)); [.F25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3" calcext:value-type="date">
            <text:p>2022-09-13</text:p>
          </table:table-cell>
          <table:table-cell table:style-name="ce8" table:formula="of:=MONTH([.A257])" office:value-type="float" office:value="9" calcext:value-type="float">
            <text:p>9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formula="of:=IF(AND([.D257] = 0; DAY([.A257] &lt;&gt; 1)); [.E256] + 1; 0)" office:value-type="float" office:value="13" calcext:value-type="float">
            <text:p>13</text:p>
          </table:table-cell>
          <table:table-cell table:style-name="ce9" table:formula="of:=IF(AND([.E257] = 0; DAY([.B257] &lt;&gt; 1)); [.F25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4" calcext:value-type="date">
            <text:p>2022-09-14</text:p>
          </table:table-cell>
          <table:table-cell table:style-name="ce8" table:formula="of:=MONTH([.A258])" office:value-type="float" office:value="9" calcext:value-type="float">
            <text:p>9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IF(AND([.D258] = 0; DAY([.A258] &lt;&gt; 1)); [.E257] + 1; 0)" office:value-type="float" office:value="14" calcext:value-type="float">
            <text:p>14</text:p>
          </table:table-cell>
          <table:table-cell table:style-name="ce9" table:formula="of:=IF(AND([.E258] = 0; DAY([.B258] &lt;&gt; 1)); [.F25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5" calcext:value-type="date">
            <text:p>2022-09-15</text:p>
          </table:table-cell>
          <table:table-cell table:style-name="ce8" table:formula="of:=MONTH([.A259])" office:value-type="float" office:value="9" calcext:value-type="float">
            <text:p>9</text:p>
          </table:table-cell>
          <table:table-cell office:value-type="float" office:value="16.6" calcext:value-type="float">
            <text:p>16,6</text:p>
          </table:table-cell>
          <table:table-cell office:value-type="float" office:value="6" calcext:value-type="float">
            <text:p>6</text:p>
          </table:table-cell>
          <table:table-cell table:formula="of:=IF(AND([.D259] = 0; DAY([.A259] &lt;&gt; 1)); [.E258] + 1; 0)" office:value-type="float" office:value="0" calcext:value-type="float">
            <text:p>0</text:p>
          </table:table-cell>
          <table:table-cell table:style-name="ce9" table:formula="of:=IF(AND([.E259] = 0; DAY([.B259] &lt;&gt; 1)); [.F25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6" calcext:value-type="date">
            <text:p>2022-09-16</text:p>
          </table:table-cell>
          <table:table-cell table:style-name="ce8" table:formula="of:=MONTH([.A260])" office:value-type="float" office:value="9" calcext:value-type="float">
            <text:p>9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formula="of:=IF(AND([.D260] = 0; DAY([.A260] &lt;&gt; 1)); [.E259] + 1; 0)" office:value-type="float" office:value="1" calcext:value-type="float">
            <text:p>1</text:p>
          </table:table-cell>
          <table:table-cell table:style-name="ce9" table:formula="of:=IF(AND([.E260] = 0; DAY([.B260] &lt;&gt; 1)); [.F25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7" calcext:value-type="date">
            <text:p>2022-09-17</text:p>
          </table:table-cell>
          <table:table-cell table:style-name="ce8" table:formula="of:=MONTH([.A261])"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formula="of:=IF(AND([.D261] = 0; DAY([.A261] &lt;&gt; 1)); [.E260] + 1; 0)" office:value-type="float" office:value="2" calcext:value-type="float">
            <text:p>2</text:p>
          </table:table-cell>
          <table:table-cell table:style-name="ce9" table:formula="of:=IF(AND([.E261] = 0; DAY([.B261] &lt;&gt; 1)); [.F26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8" calcext:value-type="date">
            <text:p>2022-09-18</text:p>
          </table:table-cell>
          <table:table-cell table:style-name="ce8" table:formula="of:=MONTH([.A262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8" calcext:value-type="float">
            <text:p>8</text:p>
          </table:table-cell>
          <table:table-cell table:formula="of:=IF(AND([.D262] = 0; DAY([.A262] &lt;&gt; 1)); [.E261] + 1; 0)" office:value-type="float" office:value="0" calcext:value-type="float">
            <text:p>0</text:p>
          </table:table-cell>
          <table:table-cell table:style-name="ce9" table:formula="of:=IF(AND([.E262] = 0; DAY([.B262] &lt;&gt; 1)); [.F261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19" calcext:value-type="date">
            <text:p>2022-09-19</text:p>
          </table:table-cell>
          <table:table-cell table:style-name="ce8" table:formula="of:=MONTH([.A263])" office:value-type="float" office:value="9" calcext:value-type="float">
            <text:p>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  <table:table-cell table:formula="of:=IF(AND([.D263] = 0; DAY([.A263] &lt;&gt; 1)); [.E262] + 1; 0)" office:value-type="float" office:value="0" calcext:value-type="float">
            <text:p>0</text:p>
          </table:table-cell>
          <table:table-cell table:style-name="ce9" table:formula="of:=IF(AND([.E263] = 0; DAY([.B263] &lt;&gt; 1)); [.F262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0" calcext:value-type="date">
            <text:p>2022-09-20</text:p>
          </table:table-cell>
          <table:table-cell table:style-name="ce8" table:formula="of:=MONTH([.A264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  <table:table-cell table:formula="of:=IF(AND([.D264] = 0; DAY([.A264] &lt;&gt; 1)); [.E263] + 1; 0)" office:value-type="float" office:value="0" calcext:value-type="float">
            <text:p>0</text:p>
          </table:table-cell>
          <table:table-cell table:style-name="ce9" table:formula="of:=IF(AND([.E264] = 0; DAY([.B264] &lt;&gt; 1)); [.F263] + 1; 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1" calcext:value-type="date">
            <text:p>2022-09-21</text:p>
          </table:table-cell>
          <table:table-cell table:style-name="ce8" table:formula="of:=MONTH([.A265])"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formula="of:=IF(AND([.D265] = 0; DAY([.A265] &lt;&gt; 1)); [.E264] + 1; 0)" office:value-type="float" office:value="1" calcext:value-type="float">
            <text:p>1</text:p>
          </table:table-cell>
          <table:table-cell table:style-name="ce9" table:formula="of:=IF(AND([.E265] = 0; DAY([.B265] &lt;&gt; 1)); [.F26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2" calcext:value-type="date">
            <text:p>2022-09-22</text:p>
          </table:table-cell>
          <table:table-cell table:style-name="ce8" table:formula="of:=MONTH([.A266])"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office:value-type="float" office:value="2" calcext:value-type="float">
            <text:p>2</text:p>
          </table:table-cell>
          <table:table-cell table:formula="of:=IF(AND([.D266] = 0; DAY([.A266] &lt;&gt; 1)); [.E265] + 1; 0)" office:value-type="float" office:value="0" calcext:value-type="float">
            <text:p>0</text:p>
          </table:table-cell>
          <table:table-cell table:style-name="ce9" table:formula="of:=IF(AND([.E266] = 0; DAY([.B266] &lt;&gt; 1)); [.F26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3" calcext:value-type="date">
            <text:p>2022-09-23</text:p>
          </table:table-cell>
          <table:table-cell table:style-name="ce8" table:formula="of:=MONTH([.A267]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formula="of:=IF(AND([.D267] = 0; DAY([.A267] &lt;&gt; 1)); [.E266] + 1; 0)" office:value-type="float" office:value="1" calcext:value-type="float">
            <text:p>1</text:p>
          </table:table-cell>
          <table:table-cell table:style-name="ce9" table:formula="of:=IF(AND([.E267] = 0; DAY([.B267] &lt;&gt; 1)); [.F26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4" calcext:value-type="date">
            <text:p>2022-09-24</text:p>
          </table:table-cell>
          <table:table-cell table:style-name="ce8" table:formula="of:=MONTH([.A268])" office:value-type="float" office:value="9" calcext:value-type="float">
            <text:p>9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formula="of:=IF(AND([.D268] = 0; DAY([.A268] &lt;&gt; 1)); [.E267] + 1; 0)" office:value-type="float" office:value="2" calcext:value-type="float">
            <text:p>2</text:p>
          </table:table-cell>
          <table:table-cell table:style-name="ce9" table:formula="of:=IF(AND([.E268] = 0; DAY([.B268] &lt;&gt; 1)); [.F26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5" calcext:value-type="date">
            <text:p>2022-09-25</text:p>
          </table:table-cell>
          <table:table-cell table:style-name="ce8" table:formula="of:=MONTH([.A269])"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IF(AND([.D269] = 0; DAY([.A269] &lt;&gt; 1)); [.E268] + 1; 0)" office:value-type="float" office:value="3" calcext:value-type="float">
            <text:p>3</text:p>
          </table:table-cell>
          <table:table-cell table:style-name="ce9" table:formula="of:=IF(AND([.E269] = 0; DAY([.B269] &lt;&gt; 1)); [.F26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6" calcext:value-type="date">
            <text:p>2022-09-26</text:p>
          </table:table-cell>
          <table:table-cell table:style-name="ce8" table:formula="of:=MONTH([.A270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AND([.D270] = 0; DAY([.A270] &lt;&gt; 1)); [.E269] + 1; 0)" office:value-type="float" office:value="0" calcext:value-type="float">
            <text:p>0</text:p>
          </table:table-cell>
          <table:table-cell table:style-name="ce9" table:formula="of:=IF(AND([.E270] = 0; DAY([.B270] &lt;&gt; 1)); [.F269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7" calcext:value-type="date">
            <text:p>2022-09-27</text:p>
          </table:table-cell>
          <table:table-cell table:style-name="ce8" table:formula="of:=MONTH([.A271])"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office:value-type="float" office:value="2" calcext:value-type="float">
            <text:p>2</text:p>
          </table:table-cell>
          <table:table-cell table:formula="of:=IF(AND([.D271] = 0; DAY([.A271] &lt;&gt; 1)); [.E270] + 1; 0)" office:value-type="float" office:value="0" calcext:value-type="float">
            <text:p>0</text:p>
          </table:table-cell>
          <table:table-cell table:style-name="ce9" table:formula="of:=IF(AND([.E271] = 0; DAY([.B271] &lt;&gt; 1)); [.F270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8" calcext:value-type="date">
            <text:p>2022-09-28</text:p>
          </table:table-cell>
          <table:table-cell table:style-name="ce8" table:formula="of:=MONTH([.A272])" office:value-type="float" office:value="9" calcext:value-type="float">
            <text:p>9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formula="of:=IF(AND([.D272] = 0; DAY([.A272] &lt;&gt; 1)); [.E271] + 1; 0)" office:value-type="float" office:value="1" calcext:value-type="float">
            <text:p>1</text:p>
          </table:table-cell>
          <table:table-cell table:style-name="ce9" table:formula="of:=IF(AND([.E272] = 0; DAY([.B272] &lt;&gt; 1)); [.F27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29" calcext:value-type="date">
            <text:p>2022-09-29</text:p>
          </table:table-cell>
          <table:table-cell table:style-name="ce8" table:formula="of:=MONTH([.A273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IF(AND([.D273] = 0; DAY([.A273] &lt;&gt; 1)); [.E272] + 1; 0)" office:value-type="float" office:value="0" calcext:value-type="float">
            <text:p>0</text:p>
          </table:table-cell>
          <table:table-cell table:style-name="ce9" table:formula="of:=IF(AND([.E273] = 0; DAY([.B273] &lt;&gt; 1)); [.F272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9-30" calcext:value-type="date">
            <text:p>2022-09-30</text:p>
          </table:table-cell>
          <table:table-cell table:style-name="ce8" table:formula="of:=MONTH([.A274])"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10" calcext:value-type="float">
            <text:p>10</text:p>
          </table:table-cell>
          <table:table-cell table:formula="of:=IF(AND([.D274] = 0; DAY([.A274] &lt;&gt; 1)); [.E273] + 1; 0)" office:value-type="float" office:value="0" calcext:value-type="float">
            <text:p>0</text:p>
          </table:table-cell>
          <table:table-cell table:style-name="ce9" table:formula="of:=IF(AND([.E274] = 0; DAY([.B274] &lt;&gt; 1)); [.F273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1" calcext:value-type="date">
            <text:p>2022-10-01</text:p>
          </table:table-cell>
          <table:table-cell table:style-name="ce8" table:formula="of:=MONTH([.A275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AND([.D275] = 0; DAY([.A275] &lt;&gt; 1)); [.E274] + 1; 0)" office:value-type="float" office:value="0" calcext:value-type="float">
            <text:p>0</text:p>
          </table:table-cell>
          <table:table-cell table:style-name="ce9" table:formula="of:=IF(AND([.E275] = 0; DAY([.B275] &lt;&gt; 1)); [.F274] + 1; 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2" calcext:value-type="date">
            <text:p>2022-10-02</text:p>
          </table:table-cell>
          <table:table-cell table:style-name="ce8" table:formula="of:=MONTH([.A276])" office:value-type="float" office:value="10" calcext:value-type="float">
            <text:p>10</text:p>
          </table:table-cell>
          <table:table-cell office:value-type="float" office:value="12.1" calcext:value-type="float">
            <text:p>12,1</text:p>
          </table:table-cell>
          <table:table-cell office:value-type="float" office:value="8" calcext:value-type="float">
            <text:p>8</text:p>
          </table:table-cell>
          <table:table-cell table:formula="of:=IF(AND([.D276] = 0; DAY([.A276] &lt;&gt; 1)); [.E275] + 1; 0)" office:value-type="float" office:value="0" calcext:value-type="float">
            <text:p>0</text:p>
          </table:table-cell>
          <table:table-cell table:style-name="ce9" table:formula="of:=IF(AND([.E276] = 0; DAY([.B276] &lt;&gt; 1)); [.F275] + 1; 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3" calcext:value-type="date">
            <text:p>2022-10-03</text:p>
          </table:table-cell>
          <table:table-cell table:style-name="ce8" table:formula="of:=MONTH([.A277])"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2" calcext:value-type="float">
            <text:p>2</text:p>
          </table:table-cell>
          <table:table-cell table:formula="of:=IF(AND([.D277] = 0; DAY([.A277] &lt;&gt; 1)); [.E276] + 1; 0)" office:value-type="float" office:value="0" calcext:value-type="float">
            <text:p>0</text:p>
          </table:table-cell>
          <table:table-cell table:style-name="ce9" table:formula="of:=IF(AND([.E277] = 0; DAY([.B277] &lt;&gt; 1)); [.F276] + 1; 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4" calcext:value-type="date">
            <text:p>2022-10-04</text:p>
          </table:table-cell>
          <table:table-cell table:style-name="ce8" table:formula="of:=MONTH([.A278])"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formula="of:=IF(AND([.D278] = 0; DAY([.A278] &lt;&gt; 1)); [.E277] + 1; 0)" office:value-type="float" office:value="1" calcext:value-type="float">
            <text:p>1</text:p>
          </table:table-cell>
          <table:table-cell table:style-name="ce9" table:formula="of:=IF(AND([.E278] = 0; DAY([.B278] &lt;&gt; 1)); [.F27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5" calcext:value-type="date">
            <text:p>2022-10-05</text:p>
          </table:table-cell>
          <table:table-cell table:style-name="ce8" table:formula="of:=MONTH([.A279])" office:value-type="float" office:value="10" calcext:value-type="float">
            <text:p>10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formula="of:=IF(AND([.D279] = 0; DAY([.A279] &lt;&gt; 1)); [.E278] + 1; 0)" office:value-type="float" office:value="2" calcext:value-type="float">
            <text:p>2</text:p>
          </table:table-cell>
          <table:table-cell table:style-name="ce9" table:formula="of:=IF(AND([.E279] = 0; DAY([.B279] &lt;&gt; 1)); [.F27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6" calcext:value-type="date">
            <text:p>2022-10-06</text:p>
          </table:table-cell>
          <table:table-cell table:style-name="ce8" table:formula="of:=MONTH([.A280])" office:value-type="float" office:value="10" calcext:value-type="float">
            <text:p>10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formula="of:=IF(AND([.D280] = 0; DAY([.A280] &lt;&gt; 1)); [.E279] + 1; 0)" office:value-type="float" office:value="3" calcext:value-type="float">
            <text:p>3</text:p>
          </table:table-cell>
          <table:table-cell table:style-name="ce9" table:formula="of:=IF(AND([.E280] = 0; DAY([.B280] &lt;&gt; 1)); [.F27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7" calcext:value-type="date">
            <text:p>2022-10-07</text:p>
          </table:table-cell>
          <table:table-cell table:style-name="ce8" table:formula="of:=MONTH([.A281])" office:value-type="float" office:value="10" calcext:value-type="float">
            <text:p>10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formula="of:=IF(AND([.D281] = 0; DAY([.A281] &lt;&gt; 1)); [.E280] + 1; 0)" office:value-type="float" office:value="4" calcext:value-type="float">
            <text:p>4</text:p>
          </table:table-cell>
          <table:table-cell table:style-name="ce9" table:formula="of:=IF(AND([.E281] = 0; DAY([.B281] &lt;&gt; 1)); [.F28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8" calcext:value-type="date">
            <text:p>2022-10-08</text:p>
          </table:table-cell>
          <table:table-cell table:style-name="ce8" table:formula="of:=MONTH([.A282])"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IF(AND([.D282] = 0; DAY([.A282] &lt;&gt; 1)); [.E281] + 1; 0)" office:value-type="float" office:value="5" calcext:value-type="float">
            <text:p>5</text:p>
          </table:table-cell>
          <table:table-cell table:style-name="ce9" table:formula="of:=IF(AND([.E282] = 0; DAY([.B282] &lt;&gt; 1)); [.F28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09" calcext:value-type="date">
            <text:p>2022-10-09</text:p>
          </table:table-cell>
          <table:table-cell table:style-name="ce8" table:formula="of:=MONTH([.A283])" office:value-type="float" office:value="10" calcext:value-type="float">
            <text:p>10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table:formula="of:=IF(AND([.D283] = 0; DAY([.A283] &lt;&gt; 1)); [.E282] + 1; 0)" office:value-type="float" office:value="6" calcext:value-type="float">
            <text:p>6</text:p>
          </table:table-cell>
          <table:table-cell table:style-name="ce9" table:formula="of:=IF(AND([.E283] = 0; DAY([.B283] &lt;&gt; 1)); [.F28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table:style-name="ce8" table:formula="of:=MONTH([.A284])"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formula="of:=IF(AND([.D284] = 0; DAY([.A284] &lt;&gt; 1)); [.E283] + 1; 0)" office:value-type="float" office:value="7" calcext:value-type="float">
            <text:p>7</text:p>
          </table:table-cell>
          <table:table-cell table:style-name="ce9" table:formula="of:=IF(AND([.E284] = 0; DAY([.B284] &lt;&gt; 1)); [.F28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1" calcext:value-type="date">
            <text:p>2022-10-11</text:p>
          </table:table-cell>
          <table:table-cell table:style-name="ce8" table:formula="of:=MONTH([.A285])"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formula="of:=IF(AND([.D285] = 0; DAY([.A285] &lt;&gt; 1)); [.E284] + 1; 0)" office:value-type="float" office:value="8" calcext:value-type="float">
            <text:p>8</text:p>
          </table:table-cell>
          <table:table-cell table:style-name="ce9" table:formula="of:=IF(AND([.E285] = 0; DAY([.B285] &lt;&gt; 1)); [.F28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2" calcext:value-type="date">
            <text:p>2022-10-12</text:p>
          </table:table-cell>
          <table:table-cell table:style-name="ce8" table:formula="of:=MONTH([.A286])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IF(AND([.D286] = 0; DAY([.A286] &lt;&gt; 1)); [.E285] + 1; 0)" office:value-type="float" office:value="9" calcext:value-type="float">
            <text:p>9</text:p>
          </table:table-cell>
          <table:table-cell table:style-name="ce9" table:formula="of:=IF(AND([.E286] = 0; DAY([.B286] &lt;&gt; 1)); [.F28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3" calcext:value-type="date">
            <text:p>2022-10-13</text:p>
          </table:table-cell>
          <table:table-cell table:style-name="ce8" table:formula="of:=MONTH([.A287])"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formula="of:=IF(AND([.D287] = 0; DAY([.A287] &lt;&gt; 1)); [.E286] + 1; 0)" office:value-type="float" office:value="10" calcext:value-type="float">
            <text:p>10</text:p>
          </table:table-cell>
          <table:table-cell table:style-name="ce9" table:formula="of:=IF(AND([.E287] = 0; DAY([.B287] &lt;&gt; 1)); [.F28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4" calcext:value-type="date">
            <text:p>2022-10-14</text:p>
          </table:table-cell>
          <table:table-cell table:style-name="ce8" table:formula="of:=MONTH([.A288])"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formula="of:=IF(AND([.D288] = 0; DAY([.A288] &lt;&gt; 1)); [.E287] + 1; 0)" office:value-type="float" office:value="11" calcext:value-type="float">
            <text:p>11</text:p>
          </table:table-cell>
          <table:table-cell table:style-name="ce9" table:formula="of:=IF(AND([.E288] = 0; DAY([.B288] &lt;&gt; 1)); [.F28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5" calcext:value-type="date">
            <text:p>2022-10-15</text:p>
          </table:table-cell>
          <table:table-cell table:style-name="ce8" table:formula="of:=MONTH([.A289])" office:value-type="float" office:value="10" calcext:value-type="float">
            <text:p>10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formula="of:=IF(AND([.D289] = 0; DAY([.A289] &lt;&gt; 1)); [.E288] + 1; 0)" office:value-type="float" office:value="12" calcext:value-type="float">
            <text:p>12</text:p>
          </table:table-cell>
          <table:table-cell table:style-name="ce9" table:formula="of:=IF(AND([.E289] = 0; DAY([.B289] &lt;&gt; 1)); [.F28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6" calcext:value-type="date">
            <text:p>2022-10-16</text:p>
          </table:table-cell>
          <table:table-cell table:style-name="ce8" table:formula="of:=MONTH([.A290])" office:value-type="float" office:value="10" calcext:value-type="float">
            <text:p>10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IF(AND([.D290] = 0; DAY([.A290] &lt;&gt; 1)); [.E289] + 1; 0)" office:value-type="float" office:value="13" calcext:value-type="float">
            <text:p>13</text:p>
          </table:table-cell>
          <table:table-cell table:style-name="ce9" table:formula="of:=IF(AND([.E290] = 0; DAY([.B290] &lt;&gt; 1)); [.F28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7" calcext:value-type="date">
            <text:p>2022-10-17</text:p>
          </table:table-cell>
          <table:table-cell table:style-name="ce8" table:formula="of:=MONTH([.A291])" office:value-type="float" office:value="10" calcext:value-type="float">
            <text:p>10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formula="of:=IF(AND([.D291] = 0; DAY([.A291] &lt;&gt; 1)); [.E290] + 1; 0)" office:value-type="float" office:value="14" calcext:value-type="float">
            <text:p>14</text:p>
          </table:table-cell>
          <table:table-cell table:style-name="ce9" table:formula="of:=IF(AND([.E291] = 0; DAY([.B291] &lt;&gt; 1)); [.F29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8" calcext:value-type="date">
            <text:p>2022-10-18</text:p>
          </table:table-cell>
          <table:table-cell table:style-name="ce8" table:formula="of:=MONTH([.A292])" office:value-type="float" office:value="10" calcext:value-type="float">
            <text:p>10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formula="of:=IF(AND([.D292] = 0; DAY([.A292] &lt;&gt; 1)); [.E291] + 1; 0)" office:value-type="float" office:value="15" calcext:value-type="float">
            <text:p>15</text:p>
          </table:table-cell>
          <table:table-cell table:style-name="ce9" table:formula="of:=IF(AND([.E292] = 0; DAY([.B292] &lt;&gt; 1)); [.F29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9" calcext:value-type="date">
            <text:p>2022-10-19</text:p>
          </table:table-cell>
          <table:table-cell table:style-name="ce8" table:formula="of:=MONTH([.A293])"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formula="of:=IF(AND([.D293] = 0; DAY([.A293] &lt;&gt; 1)); [.E292] + 1; 0)" office:value-type="float" office:value="0" calcext:value-type="float">
            <text:p>0</text:p>
          </table:table-cell>
          <table:table-cell table:style-name="ce9" table:formula="of:=IF(AND([.E293] = 0; DAY([.B293] &lt;&gt; 1)); [.F292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0" calcext:value-type="date">
            <text:p>2022-10-20</text:p>
          </table:table-cell>
          <table:table-cell table:style-name="ce8" table:formula="of:=MONTH([.A294])"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IF(AND([.D294] = 0; DAY([.A294] &lt;&gt; 1)); [.E293] + 1; 0)" office:value-type="float" office:value="1" calcext:value-type="float">
            <text:p>1</text:p>
          </table:table-cell>
          <table:table-cell table:style-name="ce9" table:formula="of:=IF(AND([.E294] = 0; DAY([.B294] &lt;&gt; 1)); [.F29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1" calcext:value-type="date">
            <text:p>2022-10-21</text:p>
          </table:table-cell>
          <table:table-cell table:style-name="ce8" table:formula="of:=MONTH([.A295])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IF(AND([.D295] = 0; DAY([.A295] &lt;&gt; 1)); [.E294] + 1; 0)" office:value-type="float" office:value="2" calcext:value-type="float">
            <text:p>2</text:p>
          </table:table-cell>
          <table:table-cell table:style-name="ce9" table:formula="of:=IF(AND([.E295] = 0; DAY([.B295] &lt;&gt; 1)); [.F29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2" calcext:value-type="date">
            <text:p>2022-10-22</text:p>
          </table:table-cell>
          <table:table-cell table:style-name="ce8" table:formula="of:=MONTH([.A296])"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formula="of:=IF(AND([.D296] = 0; DAY([.A296] &lt;&gt; 1)); [.E295] + 1; 0)" office:value-type="float" office:value="3" calcext:value-type="float">
            <text:p>3</text:p>
          </table:table-cell>
          <table:table-cell table:style-name="ce9" table:formula="of:=IF(AND([.E296] = 0; DAY([.B296] &lt;&gt; 1)); [.F29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3" calcext:value-type="date">
            <text:p>2022-10-23</text:p>
          </table:table-cell>
          <table:table-cell table:style-name="ce8" table:formula="of:=MONTH([.A297])" office:value-type="float" office:value="10" calcext:value-type="float">
            <text:p>10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formula="of:=IF(AND([.D297] = 0; DAY([.A297] &lt;&gt; 1)); [.E296] + 1; 0)" office:value-type="float" office:value="4" calcext:value-type="float">
            <text:p>4</text:p>
          </table:table-cell>
          <table:table-cell table:style-name="ce9" table:formula="of:=IF(AND([.E297] = 0; DAY([.B297] &lt;&gt; 1)); [.F29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4" calcext:value-type="date">
            <text:p>2022-10-24</text:p>
          </table:table-cell>
          <table:table-cell table:style-name="ce8" table:formula="of:=MONTH([.A298])" office:value-type="float" office:value="10" calcext:value-type="float">
            <text:p>10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formula="of:=IF(AND([.D298] = 0; DAY([.A298] &lt;&gt; 1)); [.E297] + 1; 0)" office:value-type="float" office:value="5" calcext:value-type="float">
            <text:p>5</text:p>
          </table:table-cell>
          <table:table-cell table:style-name="ce9" table:formula="of:=IF(AND([.E298] = 0; DAY([.B298] &lt;&gt; 1)); [.F29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5" calcext:value-type="date">
            <text:p>2022-10-25</text:p>
          </table:table-cell>
          <table:table-cell table:style-name="ce8" table:formula="of:=MONTH([.A299])" office:value-type="float" office:value="10" calcext:value-type="float">
            <text:p>10</text:p>
          </table:table-cell>
          <table:table-cell office:value-type="float" office:value="14.3" calcext:value-type="float">
            <text:p>14,3</text:p>
          </table:table-cell>
          <table:table-cell office:value-type="float" office:value="12" calcext:value-type="float">
            <text:p>12</text:p>
          </table:table-cell>
          <table:table-cell table:formula="of:=IF(AND([.D299] = 0; DAY([.A299] &lt;&gt; 1)); [.E298] + 1; 0)" office:value-type="float" office:value="0" calcext:value-type="float">
            <text:p>0</text:p>
          </table:table-cell>
          <table:table-cell table:style-name="ce9" table:formula="of:=IF(AND([.E299] = 0; DAY([.B299] &lt;&gt; 1)); [.F29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6" calcext:value-type="date">
            <text:p>2022-10-26</text:p>
          </table:table-cell>
          <table:table-cell table:style-name="ce8" table:formula="of:=MONTH([.A300])"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formula="of:=IF(AND([.D300] = 0; DAY([.A300] &lt;&gt; 1)); [.E299] + 1; 0)" office:value-type="float" office:value="1" calcext:value-type="float">
            <text:p>1</text:p>
          </table:table-cell>
          <table:table-cell table:style-name="ce9" table:formula="of:=IF(AND([.E300] = 0; DAY([.B300] &lt;&gt; 1)); [.F29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7" calcext:value-type="date">
            <text:p>2022-10-27</text:p>
          </table:table-cell>
          <table:table-cell table:style-name="ce8" table:formula="of:=MONTH([.A30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AND([.D301] = 0; DAY([.A301] &lt;&gt; 1)); [.E300] + 1; 0)" office:value-type="float" office:value="2" calcext:value-type="float">
            <text:p>2</text:p>
          </table:table-cell>
          <table:table-cell table:style-name="ce9" table:formula="of:=IF(AND([.E301] = 0; DAY([.B301] &lt;&gt; 1)); [.F30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8" calcext:value-type="date">
            <text:p>2022-10-28</text:p>
          </table:table-cell>
          <table:table-cell table:style-name="ce8" table:formula="of:=MONTH([.A302])" office:value-type="float" office:value="10" calcext:value-type="float">
            <text:p>10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formula="of:=IF(AND([.D302] = 0; DAY([.A302] &lt;&gt; 1)); [.E301] + 1; 0)" office:value-type="float" office:value="3" calcext:value-type="float">
            <text:p>3</text:p>
          </table:table-cell>
          <table:table-cell table:style-name="ce9" table:formula="of:=IF(AND([.E302] = 0; DAY([.B302] &lt;&gt; 1)); [.F30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29" calcext:value-type="date">
            <text:p>2022-10-29</text:p>
          </table:table-cell>
          <table:table-cell table:style-name="ce8" table:formula="of:=MONTH([.A303])" office:value-type="float" office:value="10" calcext:value-type="float">
            <text:p>10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IF(AND([.D303] = 0; DAY([.A303] &lt;&gt; 1)); [.E302] + 1; 0)" office:value-type="float" office:value="4" calcext:value-type="float">
            <text:p>4</text:p>
          </table:table-cell>
          <table:table-cell table:style-name="ce9" table:formula="of:=IF(AND([.E303] = 0; DAY([.B303] &lt;&gt; 1)); [.F30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30" calcext:value-type="date">
            <text:p>2022-10-30</text:p>
          </table:table-cell>
          <table:table-cell table:style-name="ce8" table:formula="of:=MONTH([.A304])"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formula="of:=IF(AND([.D304] = 0; DAY([.A304] &lt;&gt; 1)); [.E303] + 1; 0)" office:value-type="float" office:value="5" calcext:value-type="float">
            <text:p>5</text:p>
          </table:table-cell>
          <table:table-cell table:style-name="ce9" table:formula="of:=IF(AND([.E304] = 0; DAY([.B304] &lt;&gt; 1)); [.F30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31" calcext:value-type="date">
            <text:p>2022-10-31</text:p>
          </table:table-cell>
          <table:table-cell table:style-name="ce8" table:formula="of:=MONTH([.A305])" office:value-type="float" office:value="10" calcext:value-type="float">
            <text:p>10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formula="of:=IF(AND([.D305] = 0; DAY([.A305] &lt;&gt; 1)); [.E304] + 1; 0)" office:value-type="float" office:value="6" calcext:value-type="float">
            <text:p>6</text:p>
          </table:table-cell>
          <table:table-cell table:style-name="ce9" table:formula="of:=IF(AND([.E305] = 0; DAY([.B305] &lt;&gt; 1)); [.F30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1" calcext:value-type="date">
            <text:p>2022-11-01</text:p>
          </table:table-cell>
          <table:table-cell table:style-name="ce8" table:formula="of:=MONTH([.A306])"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formula="of:=IF(AND([.D306] = 0; DAY([.A306] &lt;&gt; 1)); [.E305] + 1; 0)" office:value-type="float" office:value="7" calcext:value-type="float">
            <text:p>7</text:p>
          </table:table-cell>
          <table:table-cell table:style-name="ce9" table:formula="of:=IF(AND([.E306] = 0; DAY([.B306] &lt;&gt; 1)); [.F30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2" calcext:value-type="date">
            <text:p>2022-11-02</text:p>
          </table:table-cell>
          <table:table-cell table:style-name="ce8" table:formula="of:=MONTH([.A307])" office:value-type="float" office:value="11" calcext:value-type="float">
            <text:p>11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formula="of:=IF(AND([.D307] = 0; DAY([.A307] &lt;&gt; 1)); [.E306] + 1; 0)" office:value-type="float" office:value="8" calcext:value-type="float">
            <text:p>8</text:p>
          </table:table-cell>
          <table:table-cell table:style-name="ce9" table:formula="of:=IF(AND([.E307] = 0; DAY([.B307] &lt;&gt; 1)); [.F30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3" calcext:value-type="date">
            <text:p>2022-11-03</text:p>
          </table:table-cell>
          <table:table-cell table:style-name="ce8" table:formula="of:=MONTH([.A30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AND([.D308] = 0; DAY([.A308] &lt;&gt; 1)); [.E307] + 1; 0)" office:value-type="float" office:value="9" calcext:value-type="float">
            <text:p>9</text:p>
          </table:table-cell>
          <table:table-cell table:style-name="ce9" table:formula="of:=IF(AND([.E308] = 0; DAY([.B308] &lt;&gt; 1)); [.F30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4" calcext:value-type="date">
            <text:p>2022-11-04</text:p>
          </table:table-cell>
          <table:table-cell table:style-name="ce8" table:formula="of:=MONTH([.A309])"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IF(AND([.D309] = 0; DAY([.A309] &lt;&gt; 1)); [.E308] + 1; 0)" office:value-type="float" office:value="10" calcext:value-type="float">
            <text:p>10</text:p>
          </table:table-cell>
          <table:table-cell table:style-name="ce9" table:formula="of:=IF(AND([.E309] = 0; DAY([.B309] &lt;&gt; 1)); [.F30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5" calcext:value-type="date">
            <text:p>2022-11-05</text:p>
          </table:table-cell>
          <table:table-cell table:style-name="ce8" table:formula="of:=MONTH([.A310])"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table:formula="of:=IF(AND([.D310] = 0; DAY([.A310] &lt;&gt; 1)); [.E309] + 1; 0)" office:value-type="float" office:value="0" calcext:value-type="float">
            <text:p>0</text:p>
          </table:table-cell>
          <table:table-cell table:style-name="ce9" table:formula="of:=IF(AND([.E310] = 0; DAY([.B310] &lt;&gt; 1)); [.F309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6" calcext:value-type="date">
            <text:p>2022-11-06</text:p>
          </table:table-cell>
          <table:table-cell table:style-name="ce8" table:formula="of:=MONTH([.A311])"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formula="of:=IF(AND([.D311] = 0; DAY([.A311] &lt;&gt; 1)); [.E310] + 1; 0)" office:value-type="float" office:value="1" calcext:value-type="float">
            <text:p>1</text:p>
          </table:table-cell>
          <table:table-cell table:style-name="ce9" table:formula="of:=IF(AND([.E311] = 0; DAY([.B311] &lt;&gt; 1)); [.F31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7" calcext:value-type="date">
            <text:p>2022-11-07</text:p>
          </table:table-cell>
          <table:table-cell table:style-name="ce8" table:formula="of:=MONTH([.A312])" office:value-type="float" office:value="11" calcext:value-type="float">
            <text:p>1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formula="of:=IF(AND([.D312] = 0; DAY([.A312] &lt;&gt; 1)); [.E311] + 1; 0)" office:value-type="float" office:value="2" calcext:value-type="float">
            <text:p>2</text:p>
          </table:table-cell>
          <table:table-cell table:style-name="ce9" table:formula="of:=IF(AND([.E312] = 0; DAY([.B312] &lt;&gt; 1)); [.F31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8" calcext:value-type="date">
            <text:p>2022-11-08</text:p>
          </table:table-cell>
          <table:table-cell table:style-name="ce8" table:formula="of:=MONTH([.A313])" office:value-type="float" office:value="11" calcext:value-type="float">
            <text:p>1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formula="of:=IF(AND([.D313] = 0; DAY([.A313] &lt;&gt; 1)); [.E312] + 1; 0)" office:value-type="float" office:value="3" calcext:value-type="float">
            <text:p>3</text:p>
          </table:table-cell>
          <table:table-cell table:style-name="ce9" table:formula="of:=IF(AND([.E313] = 0; DAY([.B313] &lt;&gt; 1)); [.F31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09" calcext:value-type="date">
            <text:p>2022-11-09</text:p>
          </table:table-cell>
          <table:table-cell table:style-name="ce8" table:formula="of:=MONTH([.A314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D314] = 0; DAY([.A314] &lt;&gt; 1)); [.E313] + 1; 0)" office:value-type="float" office:value="4" calcext:value-type="float">
            <text:p>4</text:p>
          </table:table-cell>
          <table:table-cell table:style-name="ce9" table:formula="of:=IF(AND([.E314] = 0; DAY([.B314] &lt;&gt; 1)); [.F31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0" calcext:value-type="date">
            <text:p>2022-11-10</text:p>
          </table:table-cell>
          <table:table-cell table:style-name="ce8" table:formula="of:=MONTH([.A315])" office:value-type="float" office:value="11" calcext:value-type="float">
            <text:p>1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formula="of:=IF(AND([.D315] = 0; DAY([.A315] &lt;&gt; 1)); [.E314] + 1; 0)" office:value-type="float" office:value="5" calcext:value-type="float">
            <text:p>5</text:p>
          </table:table-cell>
          <table:table-cell table:style-name="ce9" table:formula="of:=IF(AND([.E315] = 0; DAY([.B315] &lt;&gt; 1)); [.F31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1" calcext:value-type="date">
            <text:p>2022-11-11</text:p>
          </table:table-cell>
          <table:table-cell table:style-name="ce8" table:formula="of:=MONTH([.A316])"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formula="of:=IF(AND([.D316] = 0; DAY([.A316] &lt;&gt; 1)); [.E315] + 1; 0)" office:value-type="float" office:value="6" calcext:value-type="float">
            <text:p>6</text:p>
          </table:table-cell>
          <table:table-cell table:style-name="ce9" table:formula="of:=IF(AND([.E316] = 0; DAY([.B316] &lt;&gt; 1)); [.F31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2" calcext:value-type="date">
            <text:p>2022-11-12</text:p>
          </table:table-cell>
          <table:table-cell table:style-name="ce8" table:formula="of:=MONTH([.A317])" office:value-type="float" office:value="11" calcext:value-type="float">
            <text:p>11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formula="of:=IF(AND([.D317] = 0; DAY([.A317] &lt;&gt; 1)); [.E316] + 1; 0)" office:value-type="float" office:value="7" calcext:value-type="float">
            <text:p>7</text:p>
          </table:table-cell>
          <table:table-cell table:style-name="ce9" table:formula="of:=IF(AND([.E317] = 0; DAY([.B317] &lt;&gt; 1)); [.F31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3" calcext:value-type="date">
            <text:p>2022-11-13</text:p>
          </table:table-cell>
          <table:table-cell table:style-name="ce8" table:formula="of:=MONTH([.A318])" office:value-type="float" office:value="11" calcext:value-type="float">
            <text:p>11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formula="of:=IF(AND([.D318] = 0; DAY([.A318] &lt;&gt; 1)); [.E317] + 1; 0)" office:value-type="float" office:value="8" calcext:value-type="float">
            <text:p>8</text:p>
          </table:table-cell>
          <table:table-cell table:style-name="ce9" table:formula="of:=IF(AND([.E318] = 0; DAY([.B318] &lt;&gt; 1)); [.F31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4" calcext:value-type="date">
            <text:p>2022-11-14</text:p>
          </table:table-cell>
          <table:table-cell table:style-name="ce8" table:formula="of:=MONTH([.A31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AND([.D319] = 0; DAY([.A319] &lt;&gt; 1)); [.E318] + 1; 0)" office:value-type="float" office:value="9" calcext:value-type="float">
            <text:p>9</text:p>
          </table:table-cell>
          <table:table-cell table:style-name="ce9" table:formula="of:=IF(AND([.E319] = 0; DAY([.B319] &lt;&gt; 1)); [.F31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5" calcext:value-type="date">
            <text:p>2022-11-15</text:p>
          </table:table-cell>
          <table:table-cell table:style-name="ce8" table:formula="of:=MONTH([.A320])"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IF(AND([.D320] = 0; DAY([.A320] &lt;&gt; 1)); [.E319] + 1; 0)" office:value-type="float" office:value="10" calcext:value-type="float">
            <text:p>10</text:p>
          </table:table-cell>
          <table:table-cell table:style-name="ce9" table:formula="of:=IF(AND([.E320] = 0; DAY([.B320] &lt;&gt; 1)); [.F31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6" calcext:value-type="date">
            <text:p>2022-11-16</text:p>
          </table:table-cell>
          <table:table-cell table:style-name="ce8" table:formula="of:=MONTH([.A321])" office:value-type="float" office:value="11" calcext:value-type="float">
            <text:p>11</text:p>
          </table:table-cell>
          <table:table-cell office:value-type="float" office:value="5.9" calcext:value-type="float">
            <text:p>5,9</text:p>
          </table:table-cell>
          <table:table-cell office:value-type="float" office:value="7" calcext:value-type="float">
            <text:p>7</text:p>
          </table:table-cell>
          <table:table-cell table:formula="of:=IF(AND([.D321] = 0; DAY([.A321] &lt;&gt; 1)); [.E320] + 1; 0)" office:value-type="float" office:value="0" calcext:value-type="float">
            <text:p>0</text:p>
          </table:table-cell>
          <table:table-cell table:style-name="ce9" table:formula="of:=IF(AND([.E321] = 0; DAY([.B321] &lt;&gt; 1)); [.F320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7" calcext:value-type="date">
            <text:p>2022-11-17</text:p>
          </table:table-cell>
          <table:table-cell table:style-name="ce8" table:formula="of:=MONTH([.A322])"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table:formula="of:=IF(AND([.D322] = 0; DAY([.A322] &lt;&gt; 1)); [.E321] + 1; 0)" office:value-type="float" office:value="0" calcext:value-type="float">
            <text:p>0</text:p>
          </table:table-cell>
          <table:table-cell table:style-name="ce9" table:formula="of:=IF(AND([.E322] = 0; DAY([.B322] &lt;&gt; 1)); [.F321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8" calcext:value-type="date">
            <text:p>2022-11-18</text:p>
          </table:table-cell>
          <table:table-cell table:style-name="ce8" table:formula="of:=MONTH([.A323])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IF(AND([.D323] = 0; DAY([.A323] &lt;&gt; 1)); [.E322] + 1; 0)" office:value-type="float" office:value="1" calcext:value-type="float">
            <text:p>1</text:p>
          </table:table-cell>
          <table:table-cell table:style-name="ce9" table:formula="of:=IF(AND([.E323] = 0; DAY([.B323] &lt;&gt; 1)); [.F32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19" calcext:value-type="date">
            <text:p>2022-11-19</text:p>
          </table:table-cell>
          <table:table-cell table:style-name="ce8" table:formula="of:=MONTH([.A324])" office:value-type="float" office:value="11" calcext:value-type="float">
            <text:p>11</text:p>
          </table:table-cell>
          <table:table-cell office:value-type="float" office:value="-2.3" calcext:value-type="float">
            <text:p>-2,3</text:p>
          </table:table-cell>
          <table:table-cell office:value-type="float" office:value="0" calcext:value-type="float">
            <text:p>0</text:p>
          </table:table-cell>
          <table:table-cell table:formula="of:=IF(AND([.D324] = 0; DAY([.A324] &lt;&gt; 1)); [.E323] + 1; 0)" office:value-type="float" office:value="2" calcext:value-type="float">
            <text:p>2</text:p>
          </table:table-cell>
          <table:table-cell table:style-name="ce9" table:formula="of:=IF(AND([.E324] = 0; DAY([.B324] &lt;&gt; 1)); [.F32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0" calcext:value-type="date">
            <text:p>2022-11-20</text:p>
          </table:table-cell>
          <table:table-cell table:style-name="ce8" table:formula="of:=MONTH([.A325])" office:value-type="float" office:value="11" calcext:value-type="float">
            <text:p>11</text:p>
          </table:table-cell>
          <table:table-cell office:value-type="float" office:value="-2.8" calcext:value-type="float">
            <text:p>-2,8</text:p>
          </table:table-cell>
          <table:table-cell office:value-type="float" office:value="0" calcext:value-type="float">
            <text:p>0</text:p>
          </table:table-cell>
          <table:table-cell table:formula="of:=IF(AND([.D325] = 0; DAY([.A325] &lt;&gt; 1)); [.E324] + 1; 0)" office:value-type="float" office:value="3" calcext:value-type="float">
            <text:p>3</text:p>
          </table:table-cell>
          <table:table-cell table:style-name="ce9" table:formula="of:=IF(AND([.E325] = 0; DAY([.B325] &lt;&gt; 1)); [.F32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1" calcext:value-type="date">
            <text:p>2022-11-21</text:p>
          </table:table-cell>
          <table:table-cell table:style-name="ce8" table:formula="of:=MONTH([.A326])"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IF(AND([.D326] = 0; DAY([.A326] &lt;&gt; 1)); [.E325] + 1; 0)" office:value-type="float" office:value="0" calcext:value-type="float">
            <text:p>0</text:p>
          </table:table-cell>
          <table:table-cell table:style-name="ce9" table:formula="of:=IF(AND([.E326] = 0; DAY([.B326] &lt;&gt; 1)); [.F325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2" calcext:value-type="date">
            <text:p>2022-11-22</text:p>
          </table:table-cell>
          <table:table-cell table:style-name="ce8" table:formula="of:=MONTH([.A327])"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IF(AND([.D327] = 0; DAY([.A327] &lt;&gt; 1)); [.E326] + 1; 0)" office:value-type="float" office:value="1" calcext:value-type="float">
            <text:p>1</text:p>
          </table:table-cell>
          <table:table-cell table:style-name="ce9" table:formula="of:=IF(AND([.E327] = 0; DAY([.B327] &lt;&gt; 1)); [.F32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3" calcext:value-type="date">
            <text:p>2022-11-23</text:p>
          </table:table-cell>
          <table:table-cell table:style-name="ce8" table:formula="of:=MONTH([.A328])" office:value-type="float" office:value="11" calcext:value-type="float">
            <text:p>1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formula="of:=IF(AND([.D328] = 0; DAY([.A328] &lt;&gt; 1)); [.E327] + 1; 0)" office:value-type="float" office:value="2" calcext:value-type="float">
            <text:p>2</text:p>
          </table:table-cell>
          <table:table-cell table:style-name="ce9" table:formula="of:=IF(AND([.E328] = 0; DAY([.B328] &lt;&gt; 1)); [.F32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4" calcext:value-type="date">
            <text:p>2022-11-24</text:p>
          </table:table-cell>
          <table:table-cell table:style-name="ce8" table:formula="of:=MONTH([.A329])"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IF(AND([.D329] = 0; DAY([.A329] &lt;&gt; 1)); [.E328] + 1; 0)" office:value-type="float" office:value="0" calcext:value-type="float">
            <text:p>0</text:p>
          </table:table-cell>
          <table:table-cell table:style-name="ce9" table:formula="of:=IF(AND([.E329] = 0; DAY([.B329] &lt;&gt; 1)); [.F32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5" calcext:value-type="date">
            <text:p>2022-11-25</text:p>
          </table:table-cell>
          <table:table-cell table:style-name="ce8" table:formula="of:=MONTH([.A330])"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IF(AND([.D330] = 0; DAY([.A330] &lt;&gt; 1)); [.E329] + 1; 0)" office:value-type="float" office:value="1" calcext:value-type="float">
            <text:p>1</text:p>
          </table:table-cell>
          <table:table-cell table:style-name="ce9" table:formula="of:=IF(AND([.E330] = 0; DAY([.B330] &lt;&gt; 1)); [.F32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6" calcext:value-type="date">
            <text:p>2022-11-26</text:p>
          </table:table-cell>
          <table:table-cell table:style-name="ce8" table:formula="of:=MONTH([.A331])"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AND([.D331] = 0; DAY([.A331] &lt;&gt; 1)); [.E330] + 1; 0)" office:value-type="float" office:value="2" calcext:value-type="float">
            <text:p>2</text:p>
          </table:table-cell>
          <table:table-cell table:style-name="ce9" table:formula="of:=IF(AND([.E331] = 0; DAY([.B331] &lt;&gt; 1)); [.F33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7" calcext:value-type="date">
            <text:p>2022-11-27</text:p>
          </table:table-cell>
          <table:table-cell table:style-name="ce8" table:formula="of:=MONTH([.A332])"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formula="of:=IF(AND([.D332] = 0; DAY([.A332] &lt;&gt; 1)); [.E331] + 1; 0)" office:value-type="float" office:value="3" calcext:value-type="float">
            <text:p>3</text:p>
          </table:table-cell>
          <table:table-cell table:style-name="ce9" table:formula="of:=IF(AND([.E332] = 0; DAY([.B332] &lt;&gt; 1)); [.F33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8" calcext:value-type="date">
            <text:p>2022-11-28</text:p>
          </table:table-cell>
          <table:table-cell table:style-name="ce8" table:formula="of:=MONTH([.A333])"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IF(AND([.D333] = 0; DAY([.A333] &lt;&gt; 1)); [.E332] + 1; 0)" office:value-type="float" office:value="4" calcext:value-type="float">
            <text:p>4</text:p>
          </table:table-cell>
          <table:table-cell table:style-name="ce9" table:formula="of:=IF(AND([.E333] = 0; DAY([.B333] &lt;&gt; 1)); [.F33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29" calcext:value-type="date">
            <text:p>2022-11-29</text:p>
          </table:table-cell>
          <table:table-cell table:style-name="ce8" table:formula="of:=MONTH([.A334])"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IF(AND([.D334] = 0; DAY([.A334] &lt;&gt; 1)); [.E333] + 1; 0)" office:value-type="float" office:value="5" calcext:value-type="float">
            <text:p>5</text:p>
          </table:table-cell>
          <table:table-cell table:style-name="ce9" table:formula="of:=IF(AND([.E334] = 0; DAY([.B334] &lt;&gt; 1)); [.F33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1-30" calcext:value-type="date">
            <text:p>2022-11-30</text:p>
          </table:table-cell>
          <table:table-cell table:style-name="ce8" table:formula="of:=MONTH([.A335])" office:value-type="float" office:value="11" calcext:value-type="float">
            <text:p>1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formula="of:=IF(AND([.D335] = 0; DAY([.A335] &lt;&gt; 1)); [.E334] + 1; 0)" office:value-type="float" office:value="6" calcext:value-type="float">
            <text:p>6</text:p>
          </table:table-cell>
          <table:table-cell table:style-name="ce9" table:formula="of:=IF(AND([.E335] = 0; DAY([.B335] &lt;&gt; 1)); [.F33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1" calcext:value-type="date">
            <text:p>2022-12-01</text:p>
          </table:table-cell>
          <table:table-cell table:style-name="ce8" table:formula="of:=MONTH([.A336])"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formula="of:=IF(AND([.D336] = 0; DAY([.A336] &lt;&gt; 1)); [.E335] + 1; 0)" office:value-type="float" office:value="7" calcext:value-type="float">
            <text:p>7</text:p>
          </table:table-cell>
          <table:table-cell table:style-name="ce9" table:formula="of:=IF(AND([.E336] = 0; DAY([.B336] &lt;&gt; 1)); [.F33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2" calcext:value-type="date">
            <text:p>2022-12-02</text:p>
          </table:table-cell>
          <table:table-cell table:style-name="ce8" table:formula="of:=MONTH([.A337])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IF(AND([.D337] = 0; DAY([.A337] &lt;&gt; 1)); [.E336] + 1; 0)" office:value-type="float" office:value="8" calcext:value-type="float">
            <text:p>8</text:p>
          </table:table-cell>
          <table:table-cell table:style-name="ce9" table:formula="of:=IF(AND([.E337] = 0; DAY([.B337] &lt;&gt; 1)); [.F33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3" calcext:value-type="date">
            <text:p>2022-12-03</text:p>
          </table:table-cell>
          <table:table-cell table:style-name="ce8" table:formula="of:=MONTH([.A338])"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IF(AND([.D338] = 0; DAY([.A338] &lt;&gt; 1)); [.E337] + 1; 0)" office:value-type="float" office:value="9" calcext:value-type="float">
            <text:p>9</text:p>
          </table:table-cell>
          <table:table-cell table:style-name="ce9" table:formula="of:=IF(AND([.E338] = 0; DAY([.B338] &lt;&gt; 1)); [.F33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4" calcext:value-type="date">
            <text:p>2022-12-04</text:p>
          </table:table-cell>
          <table:table-cell table:style-name="ce8" table:formula="of:=MONTH([.A339])"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IF(AND([.D339] = 0; DAY([.A339] &lt;&gt; 1)); [.E338] + 1; 0)" office:value-type="float" office:value="10" calcext:value-type="float">
            <text:p>10</text:p>
          </table:table-cell>
          <table:table-cell table:style-name="ce9" table:formula="of:=IF(AND([.E339] = 0; DAY([.B339] &lt;&gt; 1)); [.F33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5" calcext:value-type="date">
            <text:p>2022-12-05</text:p>
          </table:table-cell>
          <table:table-cell table:style-name="ce8" table:formula="of:=MONTH([.A340])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AND([.D340] = 0; DAY([.A340] &lt;&gt; 1)); [.E339] + 1; 0)" office:value-type="float" office:value="11" calcext:value-type="float">
            <text:p>11</text:p>
          </table:table-cell>
          <table:table-cell table:style-name="ce9" table:formula="of:=IF(AND([.E340] = 0; DAY([.B340] &lt;&gt; 1)); [.F33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6" calcext:value-type="date">
            <text:p>2022-12-06</text:p>
          </table:table-cell>
          <table:table-cell table:style-name="ce8" table:formula="of:=MONTH([.A341])"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office:value-type="float" office:value="7" calcext:value-type="float">
            <text:p>7</text:p>
          </table:table-cell>
          <table:table-cell table:formula="of:=IF(AND([.D341] = 0; DAY([.A341] &lt;&gt; 1)); [.E340] + 1; 0)" office:value-type="float" office:value="0" calcext:value-type="float">
            <text:p>0</text:p>
          </table:table-cell>
          <table:table-cell table:style-name="ce9" table:formula="of:=IF(AND([.E341] = 0; DAY([.B341] &lt;&gt; 1)); [.F340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7" calcext:value-type="date">
            <text:p>2022-12-07</text:p>
          </table:table-cell>
          <table:table-cell table:style-name="ce8" table:formula="of:=MONTH([.A342])"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formula="of:=IF(AND([.D342] = 0; DAY([.A342] &lt;&gt; 1)); [.E341] + 1; 0)" office:value-type="float" office:value="0" calcext:value-type="float">
            <text:p>0</text:p>
          </table:table-cell>
          <table:table-cell table:style-name="ce9" table:formula="of:=IF(AND([.E342] = 0; DAY([.B342] &lt;&gt; 1)); [.F341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8" calcext:value-type="date">
            <text:p>2022-12-08</text:p>
          </table:table-cell>
          <table:table-cell table:style-name="ce8" table:formula="of:=MONTH([.A343])"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formula="of:=IF(AND([.D343] = 0; DAY([.A343] &lt;&gt; 1)); [.E342] + 1; 0)" office:value-type="float" office:value="1" calcext:value-type="float">
            <text:p>1</text:p>
          </table:table-cell>
          <table:table-cell table:style-name="ce9" table:formula="of:=IF(AND([.E343] = 0; DAY([.B343] &lt;&gt; 1)); [.F34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09" calcext:value-type="date">
            <text:p>2022-12-09</text:p>
          </table:table-cell>
          <table:table-cell table:style-name="ce8" table:formula="of:=MONTH([.A344])"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office:value-type="float" office:value="14" calcext:value-type="float">
            <text:p>14</text:p>
          </table:table-cell>
          <table:table-cell table:formula="of:=IF(AND([.D344] = 0; DAY([.A344] &lt;&gt; 1)); [.E343] + 1; 0)" office:value-type="float" office:value="0" calcext:value-type="float">
            <text:p>0</text:p>
          </table:table-cell>
          <table:table-cell table:style-name="ce9" table:formula="of:=IF(AND([.E344] = 0; DAY([.B344] &lt;&gt; 1)); [.F343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0" calcext:value-type="date">
            <text:p>2022-12-10</text:p>
          </table:table-cell>
          <table:table-cell table:style-name="ce8" table:formula="of:=MONTH([.A345])"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formula="of:=IF(AND([.D345] = 0; DAY([.A345] &lt;&gt; 1)); [.E344] + 1; 0)" office:value-type="float" office:value="1" calcext:value-type="float">
            <text:p>1</text:p>
          </table:table-cell>
          <table:table-cell table:style-name="ce9" table:formula="of:=IF(AND([.E345] = 0; DAY([.B345] &lt;&gt; 1)); [.F34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1" calcext:value-type="date">
            <text:p>2022-12-11</text:p>
          </table:table-cell>
          <table:table-cell table:style-name="ce8" table:formula="of:=MONTH([.A346])" office:value-type="float" office:value="12" calcext:value-type="float">
            <text:p>12</text:p>
          </table:table-cell>
          <table:table-cell office:value-type="float" office:value="-1.9" calcext:value-type="float">
            <text:p>-1,9</text:p>
          </table:table-cell>
          <table:table-cell office:value-type="float" office:value="0" calcext:value-type="float">
            <text:p>0</text:p>
          </table:table-cell>
          <table:table-cell table:formula="of:=IF(AND([.D346] = 0; DAY([.A346] &lt;&gt; 1)); [.E345] + 1; 0)" office:value-type="float" office:value="2" calcext:value-type="float">
            <text:p>2</text:p>
          </table:table-cell>
          <table:table-cell table:style-name="ce9" table:formula="of:=IF(AND([.E346] = 0; DAY([.B346] &lt;&gt; 1)); [.F34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2" calcext:value-type="date">
            <text:p>2022-12-12</text:p>
          </table:table-cell>
          <table:table-cell table:style-name="ce8" table:formula="of:=MONTH([.A347])"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table:formula="of:=IF(AND([.D347] = 0; DAY([.A347] &lt;&gt; 1)); [.E346] + 1; 0)" office:value-type="float" office:value="3" calcext:value-type="float">
            <text:p>3</text:p>
          </table:table-cell>
          <table:table-cell table:style-name="ce9" table:formula="of:=IF(AND([.E347] = 0; DAY([.B347] &lt;&gt; 1)); [.F34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3" calcext:value-type="date">
            <text:p>2022-12-13</text:p>
          </table:table-cell>
          <table:table-cell table:style-name="ce8" table:formula="of:=MONTH([.A348])" office:value-type="float" office:value="12" calcext:value-type="float">
            <text:p>12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table:formula="of:=IF(AND([.D348] = 0; DAY([.A348] &lt;&gt; 1)); [.E347] + 1; 0)" office:value-type="float" office:value="4" calcext:value-type="float">
            <text:p>4</text:p>
          </table:table-cell>
          <table:table-cell table:style-name="ce9" table:formula="of:=IF(AND([.E348] = 0; DAY([.B348] &lt;&gt; 1)); [.F34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4" calcext:value-type="date">
            <text:p>2022-12-14</text:p>
          </table:table-cell>
          <table:table-cell table:style-name="ce8" table:formula="of:=MONTH([.A349])" office:value-type="float" office:value="12" calcext:value-type="float">
            <text:p>12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table:formula="of:=IF(AND([.D349] = 0; DAY([.A349] &lt;&gt; 1)); [.E348] + 1; 0)" office:value-type="float" office:value="5" calcext:value-type="float">
            <text:p>5</text:p>
          </table:table-cell>
          <table:table-cell table:style-name="ce9" table:formula="of:=IF(AND([.E349] = 0; DAY([.B349] &lt;&gt; 1)); [.F348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5" calcext:value-type="date">
            <text:p>2022-12-15</text:p>
          </table:table-cell>
          <table:table-cell table:style-name="ce8" table:formula="of:=MONTH([.A350])" office:value-type="float" office:value="12" calcext:value-type="float">
            <text:p>12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  <table:table-cell table:formula="of:=IF(AND([.D350] = 0; DAY([.A350] &lt;&gt; 1)); [.E349] + 1; 0)" office:value-type="float" office:value="6" calcext:value-type="float">
            <text:p>6</text:p>
          </table:table-cell>
          <table:table-cell table:style-name="ce9" table:formula="of:=IF(AND([.E350] = 0; DAY([.B350] &lt;&gt; 1)); [.F34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6" calcext:value-type="date">
            <text:p>2022-12-16</text:p>
          </table:table-cell>
          <table:table-cell table:style-name="ce8" table:formula="of:=MONTH([.A351])" office:value-type="float" office:value="12" calcext:value-type="float">
            <text:p>12</text:p>
          </table:table-cell>
          <table:table-cell office:value-type="float" office:value="-0.7" calcext:value-type="float">
            <text:p>-0,7</text:p>
          </table:table-cell>
          <table:table-cell office:value-type="float" office:value="0" calcext:value-type="float">
            <text:p>0</text:p>
          </table:table-cell>
          <table:table-cell table:formula="of:=IF(AND([.D351] = 0; DAY([.A351] &lt;&gt; 1)); [.E350] + 1; 0)" office:value-type="float" office:value="7" calcext:value-type="float">
            <text:p>7</text:p>
          </table:table-cell>
          <table:table-cell table:style-name="ce9" table:formula="of:=IF(AND([.E351] = 0; DAY([.B351] &lt;&gt; 1)); [.F35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7" calcext:value-type="date">
            <text:p>2022-12-17</text:p>
          </table:table-cell>
          <table:table-cell table:style-name="ce8" table:formula="of:=MONTH([.A352])" office:value-type="float" office:value="12" calcext:value-type="float">
            <text:p>12</text:p>
          </table:table-cell>
          <table:table-cell office:value-type="float" office:value="-3.3" calcext:value-type="float">
            <text:p>-3,3</text:p>
          </table:table-cell>
          <table:table-cell office:value-type="float" office:value="0" calcext:value-type="float">
            <text:p>0</text:p>
          </table:table-cell>
          <table:table-cell table:formula="of:=IF(AND([.D352] = 0; DAY([.A352] &lt;&gt; 1)); [.E351] + 1; 0)" office:value-type="float" office:value="8" calcext:value-type="float">
            <text:p>8</text:p>
          </table:table-cell>
          <table:table-cell table:style-name="ce9" table:formula="of:=IF(AND([.E352] = 0; DAY([.B352] &lt;&gt; 1)); [.F35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8" calcext:value-type="date">
            <text:p>2022-12-18</text:p>
          </table:table-cell>
          <table:table-cell table:style-name="ce8" table:formula="of:=MONTH([.A353])" office:value-type="float" office:value="12" calcext:value-type="float">
            <text:p>12</text:p>
          </table:table-cell>
          <table:table-cell office:value-type="float" office:value="-4.9" calcext:value-type="float">
            <text:p>-4,9</text:p>
          </table:table-cell>
          <table:table-cell office:value-type="float" office:value="0" calcext:value-type="float">
            <text:p>0</text:p>
          </table:table-cell>
          <table:table-cell table:formula="of:=IF(AND([.D353] = 0; DAY([.A353] &lt;&gt; 1)); [.E352] + 1; 0)" office:value-type="float" office:value="9" calcext:value-type="float">
            <text:p>9</text:p>
          </table:table-cell>
          <table:table-cell table:style-name="ce9" table:formula="of:=IF(AND([.E353] = 0; DAY([.B353] &lt;&gt; 1)); [.F35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19" calcext:value-type="date">
            <text:p>2022-12-19</text:p>
          </table:table-cell>
          <table:table-cell table:style-name="ce8" table:formula="of:=MONTH([.A354])" office:value-type="float" office:value="12" calcext:value-type="float">
            <text:p>12</text:p>
          </table:table-cell>
          <table:table-cell office:value-type="float" office:value="-5.6" calcext:value-type="float">
            <text:p>-5,6</text:p>
          </table:table-cell>
          <table:table-cell office:value-type="float" office:value="0" calcext:value-type="float">
            <text:p>0</text:p>
          </table:table-cell>
          <table:table-cell table:formula="of:=IF(AND([.D354] = 0; DAY([.A354] &lt;&gt; 1)); [.E353] + 1; 0)" office:value-type="float" office:value="10" calcext:value-type="float">
            <text:p>10</text:p>
          </table:table-cell>
          <table:table-cell table:style-name="ce9" table:formula="of:=IF(AND([.E354] = 0; DAY([.B354] &lt;&gt; 1)); [.F35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0" calcext:value-type="date">
            <text:p>2022-12-20</text:p>
          </table:table-cell>
          <table:table-cell table:style-name="ce8" table:formula="of:=MONTH([.A355])"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</text:p>
          </table:table-cell>
          <table:table-cell table:formula="of:=IF(AND([.D355] = 0; DAY([.A355] &lt;&gt; 1)); [.E354] + 1; 0)" office:value-type="float" office:value="0" calcext:value-type="float">
            <text:p>0</text:p>
          </table:table-cell>
          <table:table-cell table:style-name="ce9" table:formula="of:=IF(AND([.E355] = 0; DAY([.B355] &lt;&gt; 1)); [.F354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1" calcext:value-type="date">
            <text:p>2022-12-21</text:p>
          </table:table-cell>
          <table:table-cell table:style-name="ce8" table:formula="of:=MONTH([.A356])"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office:value-type="float" office:value="8" calcext:value-type="float">
            <text:p>8</text:p>
          </table:table-cell>
          <table:table-cell table:formula="of:=IF(AND([.D356] = 0; DAY([.A356] &lt;&gt; 1)); [.E355] + 1; 0)" office:value-type="float" office:value="0" calcext:value-type="float">
            <text:p>0</text:p>
          </table:table-cell>
          <table:table-cell table:style-name="ce9" table:formula="of:=IF(AND([.E356] = 0; DAY([.B356] &lt;&gt; 1)); [.F355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2" calcext:value-type="date">
            <text:p>2022-12-22</text:p>
          </table:table-cell>
          <table:table-cell table:style-name="ce8" table:formula="of:=MONTH([.A357])"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formula="of:=IF(AND([.D357] = 0; DAY([.A357] &lt;&gt; 1)); [.E356] + 1; 0)" office:value-type="float" office:value="1" calcext:value-type="float">
            <text:p>1</text:p>
          </table:table-cell>
          <table:table-cell table:style-name="ce9" table:formula="of:=IF(AND([.E357] = 0; DAY([.B357] &lt;&gt; 1)); [.F356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3" calcext:value-type="date">
            <text:p>2022-12-23</text:p>
          </table:table-cell>
          <table:table-cell table:style-name="ce8" table:formula="of:=MONTH([.A358])"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IF(AND([.D358] = 0; DAY([.A358] &lt;&gt; 1)); [.E357] + 1; 0)" office:value-type="float" office:value="2" calcext:value-type="float">
            <text:p>2</text:p>
          </table:table-cell>
          <table:table-cell table:style-name="ce9" table:formula="of:=IF(AND([.E358] = 0; DAY([.B358] &lt;&gt; 1)); [.F357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4" calcext:value-type="date">
            <text:p>2022-12-24</text:p>
          </table:table-cell>
          <table:table-cell table:style-name="ce8" table:formula="of:=MONTH([.A359])"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</text:p>
          </table:table-cell>
          <table:table-cell table:formula="of:=IF(AND([.D359] = 0; DAY([.A359] &lt;&gt; 1)); [.E358] + 1; 0)" office:value-type="float" office:value="0" calcext:value-type="float">
            <text:p>0</text:p>
          </table:table-cell>
          <table:table-cell table:style-name="ce9" table:formula="of:=IF(AND([.E359] = 0; DAY([.B359] &lt;&gt; 1)); [.F358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5" calcext:value-type="date">
            <text:p>2022-12-25</text:p>
          </table:table-cell>
          <table:table-cell table:style-name="ce8" table:formula="of:=MONTH([.A360])"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formula="of:=IF(AND([.D360] = 0; DAY([.A360] &lt;&gt; 1)); [.E359] + 1; 0)" office:value-type="float" office:value="1" calcext:value-type="float">
            <text:p>1</text:p>
          </table:table-cell>
          <table:table-cell table:style-name="ce9" table:formula="of:=IF(AND([.E360] = 0; DAY([.B360] &lt;&gt; 1)); [.F359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6" calcext:value-type="date">
            <text:p>2022-12-26</text:p>
          </table:table-cell>
          <table:table-cell table:style-name="ce8" table:formula="of:=MONTH([.A361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AND([.D361] = 0; DAY([.A361] &lt;&gt; 1)); [.E360] + 1; 0)" office:value-type="float" office:value="2" calcext:value-type="float">
            <text:p>2</text:p>
          </table:table-cell>
          <table:table-cell table:style-name="ce9" table:formula="of:=IF(AND([.E361] = 0; DAY([.B361] &lt;&gt; 1)); [.F360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7" calcext:value-type="date">
            <text:p>2022-12-27</text:p>
          </table:table-cell>
          <table:table-cell table:style-name="ce8" table:formula="of:=MONTH([.A362])" office:value-type="float" office:value="12" calcext:value-type="float">
            <text:p>12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formula="of:=IF(AND([.D362] = 0; DAY([.A362] &lt;&gt; 1)); [.E361] + 1; 0)" office:value-type="float" office:value="3" calcext:value-type="float">
            <text:p>3</text:p>
          </table:table-cell>
          <table:table-cell table:style-name="ce9" table:formula="of:=IF(AND([.E362] = 0; DAY([.B362] &lt;&gt; 1)); [.F361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8" calcext:value-type="date">
            <text:p>2022-12-28</text:p>
          </table:table-cell>
          <table:table-cell table:style-name="ce8" table:formula="of:=MONTH([.A363])"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IF(AND([.D363] = 0; DAY([.A363] &lt;&gt; 1)); [.E362] + 1; 0)" office:value-type="float" office:value="4" calcext:value-type="float">
            <text:p>4</text:p>
          </table:table-cell>
          <table:table-cell table:style-name="ce9" table:formula="of:=IF(AND([.E363] = 0; DAY([.B363] &lt;&gt; 1)); [.F362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29" calcext:value-type="date">
            <text:p>2022-12-29</text:p>
          </table:table-cell>
          <table:table-cell table:style-name="ce8" table:formula="of:=MONTH([.A364])" office:value-type="float" office:value="12" calcext:value-type="float">
            <text:p>12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formula="of:=IF(AND([.D364] = 0; DAY([.A364] &lt;&gt; 1)); [.E363] + 1; 0)" office:value-type="float" office:value="5" calcext:value-type="float">
            <text:p>5</text:p>
          </table:table-cell>
          <table:table-cell table:style-name="ce9" table:formula="of:=IF(AND([.E364] = 0; DAY([.B364] &lt;&gt; 1)); [.F363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30" calcext:value-type="date">
            <text:p>2022-12-30</text:p>
          </table:table-cell>
          <table:table-cell table:style-name="ce8" table:formula="of:=MONTH([.A365])"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formula="of:=IF(AND([.D365] = 0; DAY([.A365] &lt;&gt; 1)); [.E364] + 1; 0)" office:value-type="float" office:value="6" calcext:value-type="float">
            <text:p>6</text:p>
          </table:table-cell>
          <table:table-cell table:style-name="ce9" table:formula="of:=IF(AND([.E365] = 0; DAY([.B365] &lt;&gt; 1)); [.F364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2-31" calcext:value-type="date">
            <text:p>2022-12-31</text:p>
          </table:table-cell>
          <table:table-cell table:style-name="ce8" table:formula="of:=MONTH([.A366])" office:value-type="float" office:value="12" calcext:value-type="float">
            <text:p>12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formula="of:=IF(AND([.D366] = 0; DAY([.A366] &lt;&gt; 1)); [.E365] + 1; 0)" office:value-type="float" office:value="7" calcext:value-type="float">
            <text:p>7</text:p>
          </table:table-cell>
          <table:table-cell table:style-name="ce9" table:formula="of:=IF(AND([.E366] = 0; DAY([.B366] &lt;&gt; 1)); [.F365] +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67] = 0; DAY([.B367] &lt;&gt; 1)); [.F366] +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68] = 0; DAY([.B368] &lt;&gt; 1)); [.F367] + 1; 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69] = 0; DAY([.B369] &lt;&gt; 1)); [.F368] + 1; 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0] = 0; DAY([.B370] &lt;&gt; 1)); [.F369] + 1; 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1] = 0; DAY([.B371] &lt;&gt; 1)); [.F370] + 1; 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2] = 0; DAY([.B372] &lt;&gt; 1)); [.F371] + 1; 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3] = 0; DAY([.B373] &lt;&gt; 1)); [.F372] + 1; 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4] = 0; DAY([.B374] &lt;&gt; 1)); [.F373] + 1; 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5] = 0; DAY([.B375] &lt;&gt; 1)); [.F374] + 1; 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6] = 0; DAY([.B376] &lt;&gt; 1)); [.F375] + 1; 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7] = 0; DAY([.B377] &lt;&gt; 1)); [.F376] + 1; 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8] = 0; DAY([.B378] &lt;&gt; 1)); [.F377] + 1; 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79] = 0; DAY([.B379] &lt;&gt; 1)); [.F378] + 1; 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0] = 0; DAY([.B380] &lt;&gt; 1)); [.F379] + 1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1] = 0; DAY([.B381] &lt;&gt; 1)); [.F380] + 1; 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2] = 0; DAY([.B382] &lt;&gt; 1)); [.F381] + 1; 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3] = 0; DAY([.B383] &lt;&gt; 1)); [.F382] + 1; 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4] = 0; DAY([.B384] &lt;&gt; 1)); [.F383] + 1; 0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5] = 0; DAY([.B385] &lt;&gt; 1)); [.F384] + 1; 0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6] = 0; DAY([.B386] &lt;&gt; 1)); [.F385] + 1; 0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7] = 0; DAY([.B387] &lt;&gt; 1)); [.F386] + 1; 0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8] = 0; DAY([.B388] &lt;&gt; 1)); [.F387] + 1; 0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89] = 0; DAY([.B389] &lt;&gt; 1)); [.F388] + 1; 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0] = 0; DAY([.B390] &lt;&gt; 1)); [.F389] + 1; 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1] = 0; DAY([.B391] &lt;&gt; 1)); [.F390] + 1; 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2] = 0; DAY([.B392] &lt;&gt; 1)); [.F391] + 1; 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3] = 0; DAY([.B393] &lt;&gt; 1)); [.F392] + 1; 0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4] = 0; DAY([.B394] &lt;&gt; 1)); [.F393] + 1; 0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5] = 0; DAY([.B395] &lt;&gt; 1)); [.F394] + 1; 0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6] = 0; DAY([.B396] &lt;&gt; 1)); [.F395] + 1; 0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7] = 0; DAY([.B397] &lt;&gt; 1)); [.F396] + 1; 0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8] = 0; DAY([.B398] &lt;&gt; 1)); [.F397] + 1; 0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399] = 0; DAY([.B399] &lt;&gt; 1)); [.F398] + 1; 0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0] = 0; DAY([.B400] &lt;&gt; 1)); [.F399] + 1; 0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1] = 0; DAY([.B401] &lt;&gt; 1)); [.F400] + 1; 0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2] = 0; DAY([.B402] &lt;&gt; 1)); [.F401] + 1; 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3] = 0; DAY([.B403] &lt;&gt; 1)); [.F402] + 1; 0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4] = 0; DAY([.B404] &lt;&gt; 1)); [.F403] + 1; 0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5] = 0; DAY([.B405] &lt;&gt; 1)); [.F404] + 1; 0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6] = 0; DAY([.B406] &lt;&gt; 1)); [.F405] + 1; 0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7] = 0; DAY([.B407] &lt;&gt; 1)); [.F406] + 1; 0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8] = 0; DAY([.B408] &lt;&gt; 1)); [.F407] + 1; 0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09] = 0; DAY([.B409] &lt;&gt; 1)); [.F408] + 1; 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0] = 0; DAY([.B410] &lt;&gt; 1)); [.F409] + 1; 0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1] = 0; DAY([.B411] &lt;&gt; 1)); [.F410] + 1; 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2] = 0; DAY([.B412] &lt;&gt; 1)); [.F411] + 1; 0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3] = 0; DAY([.B413] &lt;&gt; 1)); [.F412] + 1; 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4] = 0; DAY([.B414] &lt;&gt; 1)); [.F413] + 1; 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5] = 0; DAY([.B415] &lt;&gt; 1)); [.F414] + 1; 0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6] = 0; DAY([.B416] &lt;&gt; 1)); [.F415] + 1; 0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7] = 0; DAY([.B417] &lt;&gt; 1)); [.F416] + 1; 0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8] = 0; DAY([.B418] &lt;&gt; 1)); [.F417] + 1; 0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19] = 0; DAY([.B419] &lt;&gt; 1)); [.F418] + 1; 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0] = 0; DAY([.B420] &lt;&gt; 1)); [.F419] + 1; 0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1] = 0; DAY([.B421] &lt;&gt; 1)); [.F420] + 1; 0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2] = 0; DAY([.B422] &lt;&gt; 1)); [.F421] + 1; 0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3] = 0; DAY([.B423] &lt;&gt; 1)); [.F422] + 1; 0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4] = 0; DAY([.B424] &lt;&gt; 1)); [.F423] + 1; 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5] = 0; DAY([.B425] &lt;&gt; 1)); [.F424] + 1; 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6] = 0; DAY([.B426] &lt;&gt; 1)); [.F425] + 1; 0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7] = 0; DAY([.B427] &lt;&gt; 1)); [.F426] + 1; 0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8] = 0; DAY([.B428] &lt;&gt; 1)); [.F427] + 1; 0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29] = 0; DAY([.B429] &lt;&gt; 1)); [.F428] + 1; 0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0] = 0; DAY([.B430] &lt;&gt; 1)); [.F429] + 1; 0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1] = 0; DAY([.B431] &lt;&gt; 1)); [.F430] + 1; 0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2] = 0; DAY([.B432] &lt;&gt; 1)); [.F431] + 1; 0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3] = 0; DAY([.B433] &lt;&gt; 1)); [.F432] + 1; 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4] = 0; DAY([.B434] &lt;&gt; 1)); [.F433] + 1; 0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5] = 0; DAY([.B435] &lt;&gt; 1)); [.F434] + 1; 0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6] = 0; DAY([.B436] &lt;&gt; 1)); [.F435] + 1; 0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7] = 0; DAY([.B437] &lt;&gt; 1)); [.F436] + 1; 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8] = 0; DAY([.B438] &lt;&gt; 1)); [.F437] + 1; 0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39] = 0; DAY([.B439] &lt;&gt; 1)); [.F438] + 1; 0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0] = 0; DAY([.B440] &lt;&gt; 1)); [.F439] + 1; 0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1] = 0; DAY([.B441] &lt;&gt; 1)); [.F440] + 1; 0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2] = 0; DAY([.B442] &lt;&gt; 1)); [.F441] + 1; 0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3] = 0; DAY([.B443] &lt;&gt; 1)); [.F442] + 1; 0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4] = 0; DAY([.B444] &lt;&gt; 1)); [.F443] + 1; 0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5] = 0; DAY([.B445] &lt;&gt; 1)); [.F444] + 1; 0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6] = 0; DAY([.B446] &lt;&gt; 1)); [.F445] + 1; 0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7] = 0; DAY([.B447] &lt;&gt; 1)); [.F446] + 1; 0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8] = 0; DAY([.B448] &lt;&gt; 1)); [.F447] + 1; 0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49] = 0; DAY([.B449] &lt;&gt; 1)); [.F448] + 1; 0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0] = 0; DAY([.B450] &lt;&gt; 1)); [.F449] + 1; 0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1] = 0; DAY([.B451] &lt;&gt; 1)); [.F450] + 1; 0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2] = 0; DAY([.B452] &lt;&gt; 1)); [.F451] + 1; 0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3] = 0; DAY([.B453] &lt;&gt; 1)); [.F452] + 1; 0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4] = 0; DAY([.B454] &lt;&gt; 1)); [.F453] + 1; 0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5] = 0; DAY([.B455] &lt;&gt; 1)); [.F454] + 1; 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6] = 0; DAY([.B456] &lt;&gt; 1)); [.F455] + 1; 0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7] = 0; DAY([.B457] &lt;&gt; 1)); [.F456] + 1; 0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8] = 0; DAY([.B458] &lt;&gt; 1)); [.F457] + 1; 0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59] = 0; DAY([.B459] &lt;&gt; 1)); [.F458] + 1; 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0] = 0; DAY([.B460] &lt;&gt; 1)); [.F459] + 1; 0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1] = 0; DAY([.B461] &lt;&gt; 1)); [.F460] + 1; 0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2] = 0; DAY([.B462] &lt;&gt; 1)); [.F461] + 1; 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3] = 0; DAY([.B463] &lt;&gt; 1)); [.F462] + 1; 0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4] = 0; DAY([.B464] &lt;&gt; 1)); [.F463] + 1; 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5] = 0; DAY([.B465] &lt;&gt; 1)); [.F464] + 1; 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6] = 0; DAY([.B466] &lt;&gt; 1)); [.F465] + 1; 0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7] = 0; DAY([.B467] &lt;&gt; 1)); [.F466] + 1; 0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8] = 0; DAY([.B468] &lt;&gt; 1)); [.F467] + 1; 0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69] = 0; DAY([.B469] &lt;&gt; 1)); [.F468] + 1; 0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0] = 0; DAY([.B470] &lt;&gt; 1)); [.F469] + 1; 0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1] = 0; DAY([.B471] &lt;&gt; 1)); [.F470] + 1; 0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2] = 0; DAY([.B472] &lt;&gt; 1)); [.F471] + 1; 0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3] = 0; DAY([.B473] &lt;&gt; 1)); [.F472] + 1; 0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4] = 0; DAY([.B474] &lt;&gt; 1)); [.F473] + 1; 0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5] = 0; DAY([.B475] &lt;&gt; 1)); [.F474] + 1; 0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6] = 0; DAY([.B476] &lt;&gt; 1)); [.F475] + 1; 0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7] = 0; DAY([.B477] &lt;&gt; 1)); [.F476] + 1; 0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8] = 0; DAY([.B478] &lt;&gt; 1)); [.F477] + 1; 0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79] = 0; DAY([.B479] &lt;&gt; 1)); [.F478] + 1; 0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0] = 0; DAY([.B480] &lt;&gt; 1)); [.F479] + 1; 0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1] = 0; DAY([.B481] &lt;&gt; 1)); [.F480] + 1; 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2] = 0; DAY([.B482] &lt;&gt; 1)); [.F481] + 1; 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3] = 0; DAY([.B483] &lt;&gt; 1)); [.F482] + 1; 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4] = 0; DAY([.B484] &lt;&gt; 1)); [.F483] + 1; 0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5] = 0; DAY([.B485] &lt;&gt; 1)); [.F484] + 1; 0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6] = 0; DAY([.B486] &lt;&gt; 1)); [.F485] + 1; 0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7] = 0; DAY([.B487] &lt;&gt; 1)); [.F486] + 1; 0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8] = 0; DAY([.B488] &lt;&gt; 1)); [.F487] + 1; 0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89] = 0; DAY([.B489] &lt;&gt; 1)); [.F488] + 1; 0)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0] = 0; DAY([.B490] &lt;&gt; 1)); [.F489] + 1; 0)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1] = 0; DAY([.B491] &lt;&gt; 1)); [.F490] + 1; 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2] = 0; DAY([.B492] &lt;&gt; 1)); [.F491] + 1; 0)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3] = 0; DAY([.B493] &lt;&gt; 1)); [.F492] + 1; 0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4] = 0; DAY([.B494] &lt;&gt; 1)); [.F493] + 1; 0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5] = 0; DAY([.B495] &lt;&gt; 1)); [.F494] + 1; 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6] = 0; DAY([.B496] &lt;&gt; 1)); [.F495] + 1; 0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7] = 0; DAY([.B497] &lt;&gt; 1)); [.F496] + 1; 0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8] = 0; DAY([.B498] &lt;&gt; 1)); [.F497] + 1; 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499] = 0; DAY([.B499] &lt;&gt; 1)); [.F498] + 1; 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500] = 0; DAY([.B500] &lt;&gt; 1)); [.F499] + 1; 0)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501] = 0; DAY([.B501] &lt;&gt; 1)); [.F500] + 1; 0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table:formula="of:=IF(AND([.E502] = 0; DAY([.B502] &lt;&gt; 1)); [.F501] + 1; 0)" office:value-type="float" office:value="136" calcext:value-type="float">
            <text:p>136</text:p>
          </table:table-cell>
          <table:table-cell table:number-columns-repeated="2"/>
        </table:table-row>
        <table:table-row table:style-name="ro1" table:number-rows-repeated="1048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3" table:style-name="ta1">
        <table:table-column table:style-name="co4" table:default-cell-style-name="Default"/>
        <table:table-column table:style-name="co4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 d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wierzchnia (rano)</text:p>
          </table:table-cell>
          <table:table-cell office:value-type="string" calcext:value-type="string">
            <text:p>Powierzchnia (wieczorem)</text:p>
          </table:table-cell>
          <table:table-cell office:value-type="string" calcext:value-type="string">
            <text:p>Procent zarośnięt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3-01" calcext:value-type="date">
            <text:p>1.03.2023</text:p>
          </table:table-cell>
          <table:table-cell table:formula="of:=2000" office:value-type="float" office:value="2000" calcext:value-type="float">
            <text:p>2000</text:p>
          </table:table-cell>
          <table:table-cell table:formula="of:=[.C2]- (0.25 * 80) - IF(WEEKDAY([.B2]; 2) = 5; 60; 0)" office:value-type="float" office:value="1980" calcext:value-type="float">
            <text:p>1980</text:p>
          </table:table-cell>
          <table:table-cell table:style-name="ce14" table:formula="of:=[.C2] / 10000"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3-02" calcext:value-type="date">
            <text:p>2.03.2023</text:p>
          </table:table-cell>
          <table:table-cell table:formula="of:=([.D2] + ([.D2] * 0.0175))" office:value-type="float" office:value="2014.65" calcext:value-type="float">
            <text:p>2014,65</text:p>
          </table:table-cell>
          <table:table-cell table:formula="of:=[.C3]- (0.25 * 80) - IF(WEEKDAY([.B3]; 2) = 5; 60; 0)" office:value-type="float" office:value="1994.65" calcext:value-type="float">
            <text:p>1994,65</text:p>
          </table:table-cell>
          <table:table-cell table:style-name="ce14" table:formula="of:=[.C3] / 10000" office:value-type="percentage" office:value="0.201465" calcext:value-type="percentage">
            <text:p>20,15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3" calcext:value-type="date">
            <text:p>3.03.2023</text:p>
          </table:table-cell>
          <table:table-cell table:formula="of:=([.D3] + ([.D3] * 0.0175))" office:value-type="float" office:value="2029.556375" calcext:value-type="float">
            <text:p>2029,556375</text:p>
          </table:table-cell>
          <table:table-cell table:formula="of:=[.C4]- (0.25 * 80) - IF(WEEKDAY([.B4]; 2) = 5; 60; 0)" office:value-type="float" office:value="1949.556375" calcext:value-type="float">
            <text:p>1949,556375</text:p>
          </table:table-cell>
          <table:table-cell table:style-name="ce14" table:formula="of:=[.C4] / 10000" office:value-type="percentage" office:value="0.2029556375" calcext:value-type="percentage">
            <text:p>20,30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3-04" calcext:value-type="date">
            <text:p>4.03.2023</text:p>
          </table:table-cell>
          <table:table-cell table:formula="of:=([.D4] + ([.D4] * 0.0175))" office:value-type="float" office:value="1983.6736115625" calcext:value-type="float">
            <text:p>1983,6736115625</text:p>
          </table:table-cell>
          <table:table-cell table:formula="of:=[.C5]- (0.25 * 80) - IF(WEEKDAY([.B5]; 2) = 5; 60; 0)" office:value-type="float" office:value="1963.6736115625" calcext:value-type="float">
            <text:p>1963,6736115625</text:p>
          </table:table-cell>
          <table:table-cell table:style-name="ce14" table:formula="of:=[.C5] / 10000" office:value-type="percentage" office:value="0.19836736115625" calcext:value-type="percentage">
            <text:p>19,84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3-05" calcext:value-type="date">
            <text:p>5.03.2023</text:p>
          </table:table-cell>
          <table:table-cell table:formula="of:=([.D5] + ([.D5] * 0.0175))" office:value-type="float" office:value="1998.03789976484" calcext:value-type="float">
            <text:p>1998,03789976484</text:p>
          </table:table-cell>
          <table:table-cell table:formula="of:=[.C6]- (0.25 * 80) - IF(WEEKDAY([.B6]; 2) = 5; 60; 0)" office:value-type="float" office:value="1978.03789976484" calcext:value-type="float">
            <text:p>1978,03789976484</text:p>
          </table:table-cell>
          <table:table-cell table:style-name="ce14" table:formula="of:=[.C6] / 10000" office:value-type="percentage" office:value="0.199803789976484" calcext:value-type="percentage">
            <text:p>19,98%</text:p>
          </table:table-cell>
          <table:table-cell/>
          <table:table-cell table:style-name="ce15" office:value-type="string" calcext:value-type="string" table:number-columns-spanned="3" table:number-rows-spanned="1">
            <text:p>Dzień, w którym rzęsa zajęłą powyżej 75%</text:p>
          </table:table-cell>
          <table:covered-table-cell table:number-columns-repeated="2" table:style-name="ce16"/>
          <table:table-cell table:style-name="ce3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3-06" calcext:value-type="date">
            <text:p>6.03.2023</text:p>
          </table:table-cell>
          <table:table-cell table:formula="of:=([.D6] + ([.D6] * 0.0175))" office:value-type="float" office:value="2012.65356301073" calcext:value-type="float">
            <text:p>2012,65356301073</text:p>
          </table:table-cell>
          <table:table-cell table:formula="of:=[.C7]- (0.25 * 80) - IF(WEEKDAY([.B7]; 2) = 5; 60; 0)" office:value-type="float" office:value="1992.65356301073" calcext:value-type="float">
            <text:p>1992,65356301073</text:p>
          </table:table-cell>
          <table:table-cell table:style-name="ce14" table:formula="of:=[.C7] / 10000" office:value-type="percentage" office:value="0.201265356301073" calcext:value-type="percentage">
            <text:p>20,13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3-07" calcext:value-type="date">
            <text:p>7.03.2023</text:p>
          </table:table-cell>
          <table:table-cell table:formula="of:=([.D7] + ([.D7] * 0.0175))" office:value-type="float" office:value="2027.52500036342" calcext:value-type="float">
            <text:p>2027,52500036342</text:p>
          </table:table-cell>
          <table:table-cell table:formula="of:=[.C8]- (0.25 * 80) - IF(WEEKDAY([.B8]; 2) = 5; 60; 0)" office:value-type="float" office:value="2007.52500036342" calcext:value-type="float">
            <text:p>2007,52500036342</text:p>
          </table:table-cell>
          <table:table-cell table:style-name="ce14" table:formula="of:=[.C8] / 10000" office:value-type="percentage" office:value="0.202752500036342" calcext:value-type="percentage">
            <text:p>20,28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3-08" calcext:value-type="date">
            <text:p>8.03.2023</text:p>
          </table:table-cell>
          <table:table-cell table:formula="of:=([.D8] + ([.D8] * 0.0175))" office:value-type="float" office:value="2042.65668786978" calcext:value-type="float">
            <text:p>2042,65668786978</text:p>
          </table:table-cell>
          <table:table-cell table:formula="of:=[.C9]- (0.25 * 80) - IF(WEEKDAY([.B9]; 2) = 5; 60; 0)" office:value-type="float" office:value="2022.65668786978" calcext:value-type="float">
            <text:p>2022,65668786978</text:p>
          </table:table-cell>
          <table:table-cell table:style-name="ce14" table:formula="of:=[.C9] / 10000" office:value-type="percentage" office:value="0.204265668786978" calcext:value-type="percentage">
            <text:p>20,43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3-09" calcext:value-type="date">
            <text:p>9.03.2023</text:p>
          </table:table-cell>
          <table:table-cell table:formula="of:=([.D9] + ([.D9] * 0.0175))" office:value-type="float" office:value="2058.0531799075" calcext:value-type="float">
            <text:p>2058,0531799075</text:p>
          </table:table-cell>
          <table:table-cell table:formula="of:=[.C10]- (0.25 * 80) - IF(WEEKDAY([.B10]; 2) = 5; 60; 0)" office:value-type="float" office:value="2038.0531799075" calcext:value-type="float">
            <text:p>2038,0531799075</text:p>
          </table:table-cell>
          <table:table-cell table:style-name="ce14" table:formula="of:=[.C10] / 10000" office:value-type="percentage" office:value="0.20580531799075" calcext:value-type="percentage">
            <text:p>20,58%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3-10" calcext:value-type="date">
            <text:p>10.03.2023</text:p>
          </table:table-cell>
          <table:table-cell table:formula="of:=([.D10] + ([.D10] * 0.0175))" office:value-type="float" office:value="2073.71911055588" calcext:value-type="float">
            <text:p>2073,71911055588</text:p>
          </table:table-cell>
          <table:table-cell table:formula="of:=[.C11]- (0.25 * 80) - IF(WEEKDAY([.B11]; 2) = 5; 60; 0)" office:value-type="float" office:value="1993.71911055588" calcext:value-type="float">
            <text:p>1993,71911055588</text:p>
          </table:table-cell>
          <table:table-cell table:style-name="ce14" table:formula="of:=[.C11] / 10000" office:value-type="percentage" office:value="0.207371911055588" calcext:value-type="percentage">
            <text:p>20,74%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3-11" calcext:value-type="date">
            <text:p>11.03.2023</text:p>
          </table:table-cell>
          <table:table-cell table:formula="of:=([.D11] + ([.D11] * 0.0175))" office:value-type="float" office:value="2028.60919499061" calcext:value-type="float">
            <text:p>2028,60919499061</text:p>
          </table:table-cell>
          <table:table-cell table:formula="of:=[.C12]- (0.25 * 80) - IF(WEEKDAY([.B12]; 2) = 5; 60; 0)" office:value-type="float" office:value="2008.60919499061" calcext:value-type="float">
            <text:p>2008,60919499061</text:p>
          </table:table-cell>
          <table:table-cell table:style-name="ce14" table:formula="of:=[.C12] / 10000" office:value-type="percentage" office:value="0.202860919499061" calcext:value-type="percentage">
            <text:p>20,29%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3-12" calcext:value-type="date">
            <text:p>12.03.2023</text:p>
          </table:table-cell>
          <table:table-cell table:formula="of:=([.D12] + ([.D12] * 0.0175))" office:value-type="float" office:value="2043.75985590294" calcext:value-type="float">
            <text:p>2043,75985590294</text:p>
          </table:table-cell>
          <table:table-cell table:formula="of:=[.C13]- (0.25 * 80) - IF(WEEKDAY([.B13]; 2) = 5; 60; 0)" office:value-type="float" office:value="2023.75985590294" calcext:value-type="float">
            <text:p>2023,75985590294</text:p>
          </table:table-cell>
          <table:table-cell table:style-name="ce14" table:formula="of:=[.C13] / 10000" office:value-type="percentage" office:value="0.204375985590294" calcext:value-type="percentage">
            <text:p>20,44%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3-13" calcext:value-type="date">
            <text:p>13.03.2023</text:p>
          </table:table-cell>
          <table:table-cell table:formula="of:=([.D13] + ([.D13] * 0.0175))" office:value-type="float" office:value="2059.17565338124" calcext:value-type="float">
            <text:p>2059,17565338124</text:p>
          </table:table-cell>
          <table:table-cell table:formula="of:=[.C14]- (0.25 * 80) - IF(WEEKDAY([.B14]; 2) = 5; 60; 0)" office:value-type="float" office:value="2039.17565338124" calcext:value-type="float">
            <text:p>2039,17565338124</text:p>
          </table:table-cell>
          <table:table-cell table:style-name="ce14" table:formula="of:=[.C14] / 10000" office:value-type="percentage" office:value="0.205917565338124" calcext:value-type="percentage">
            <text:p>20,59%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3-14" calcext:value-type="date">
            <text:p>14.03.2023</text:p>
          </table:table-cell>
          <table:table-cell table:formula="of:=([.D14] + ([.D14] * 0.0175))" office:value-type="float" office:value="2074.86122731542" calcext:value-type="float">
            <text:p>2074,86122731542</text:p>
          </table:table-cell>
          <table:table-cell table:formula="of:=[.C15]- (0.25 * 80) - IF(WEEKDAY([.B15]; 2) = 5; 60; 0)" office:value-type="float" office:value="2054.86122731542" calcext:value-type="float">
            <text:p>2054,86122731542</text:p>
          </table:table-cell>
          <table:table-cell table:style-name="ce14" table:formula="of:=[.C15] / 10000" office:value-type="percentage" office:value="0.207486122731542" calcext:value-type="percentage">
            <text:p>20,75%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3-15" calcext:value-type="date">
            <text:p>15.03.2023</text:p>
          </table:table-cell>
          <table:table-cell table:formula="of:=([.D15] + ([.D15] * 0.0175))" office:value-type="float" office:value="2090.82129879344" calcext:value-type="float">
            <text:p>2090,82129879344</text:p>
          </table:table-cell>
          <table:table-cell table:formula="of:=[.C16]- (0.25 * 80) - IF(WEEKDAY([.B16]; 2) = 5; 60; 0)" office:value-type="float" office:value="2070.82129879344" calcext:value-type="float">
            <text:p>2070,82129879344</text:p>
          </table:table-cell>
          <table:table-cell table:style-name="ce14" table:formula="of:=[.C16] / 10000" office:value-type="percentage" office:value="0.209082129879344" calcext:value-type="percentage">
            <text:p>20,91%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3-16" calcext:value-type="date">
            <text:p>16.03.2023</text:p>
          </table:table-cell>
          <table:table-cell table:formula="of:=([.D16] + ([.D16] * 0.0175))" office:value-type="float" office:value="2107.06067152232" calcext:value-type="float">
            <text:p>2107,06067152232</text:p>
          </table:table-cell>
          <table:table-cell table:formula="of:=[.C17]- (0.25 * 80) - IF(WEEKDAY([.B17]; 2) = 5; 60; 0)" office:value-type="float" office:value="2087.06067152232" calcext:value-type="float">
            <text:p>2087,06067152232</text:p>
          </table:table-cell>
          <table:table-cell table:style-name="ce14" table:formula="of:=[.C17] / 10000" office:value-type="percentage" office:value="0.210706067152232" calcext:value-type="percentage">
            <text:p>21,07%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3-17" calcext:value-type="date">
            <text:p>17.03.2023</text:p>
          </table:table-cell>
          <table:table-cell table:formula="of:=([.D17] + ([.D17] * 0.0175))" office:value-type="float" office:value="2123.58423327396" calcext:value-type="float">
            <text:p>2123,58423327396</text:p>
          </table:table-cell>
          <table:table-cell table:formula="of:=[.C18]- (0.25 * 80) - IF(WEEKDAY([.B18]; 2) = 5; 60; 0)" office:value-type="float" office:value="2043.58423327396" calcext:value-type="float">
            <text:p>2043,58423327396</text:p>
          </table:table-cell>
          <table:table-cell table:style-name="ce14" table:formula="of:=[.C18] / 10000" office:value-type="percentage" office:value="0.212358423327396" calcext:value-type="percentage">
            <text:p>21,24%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03-18" calcext:value-type="date">
            <text:p>18.03.2023</text:p>
          </table:table-cell>
          <table:table-cell table:formula="of:=([.D18] + ([.D18] * 0.0175))" office:value-type="float" office:value="2079.34695735625" calcext:value-type="float">
            <text:p>2079,34695735625</text:p>
          </table:table-cell>
          <table:table-cell table:formula="of:=[.C19]- (0.25 * 80) - IF(WEEKDAY([.B19]; 2) = 5; 60; 0)" office:value-type="float" office:value="2059.34695735625" calcext:value-type="float">
            <text:p>2059,34695735625</text:p>
          </table:table-cell>
          <table:table-cell table:style-name="ce14" table:formula="of:=[.C19] / 10000" office:value-type="percentage" office:value="0.207934695735625" calcext:value-type="percentage">
            <text:p>20,79%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3-03-19" calcext:value-type="date">
            <text:p>19.03.2023</text:p>
          </table:table-cell>
          <table:table-cell table:formula="of:=([.D19] + ([.D19] * 0.0175))" office:value-type="float" office:value="2095.38552910999" calcext:value-type="float">
            <text:p>2095,38552910999</text:p>
          </table:table-cell>
          <table:table-cell table:formula="of:=[.C20]- (0.25 * 80) - IF(WEEKDAY([.B20]; 2) = 5; 60; 0)" office:value-type="float" office:value="2075.38552910999" calcext:value-type="float">
            <text:p>2075,38552910999</text:p>
          </table:table-cell>
          <table:table-cell table:style-name="ce14" table:formula="of:=[.C20] / 10000" office:value-type="percentage" office:value="0.209538552910999" calcext:value-type="percentage">
            <text:p>20,95%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03-20" calcext:value-type="date">
            <text:p>20.03.2023</text:p>
          </table:table-cell>
          <table:table-cell table:formula="of:=([.D20] + ([.D20] * 0.0175))" office:value-type="float" office:value="2111.70477586941" calcext:value-type="float">
            <text:p>2111,70477586941</text:p>
          </table:table-cell>
          <table:table-cell table:formula="of:=[.C21]- (0.25 * 80) - IF(WEEKDAY([.B21]; 2) = 5; 60; 0)" office:value-type="float" office:value="2091.70477586941" calcext:value-type="float">
            <text:p>2091,70477586941</text:p>
          </table:table-cell>
          <table:table-cell table:style-name="ce14" table:formula="of:=[.C21] / 10000" office:value-type="percentage" office:value="0.211170477586941" calcext:value-type="percentage">
            <text:p>21,12%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3-21" calcext:value-type="date">
            <text:p>21.03.2023</text:p>
          </table:table-cell>
          <table:table-cell table:formula="of:=([.D21] + ([.D21] * 0.0175))" office:value-type="float" office:value="2128.30960944713" calcext:value-type="float">
            <text:p>2128,30960944713</text:p>
          </table:table-cell>
          <table:table-cell table:formula="of:=[.C22]- (0.25 * 80) - IF(WEEKDAY([.B22]; 2) = 5; 60; 0)" office:value-type="float" office:value="2108.30960944713" calcext:value-type="float">
            <text:p>2108,30960944713</text:p>
          </table:table-cell>
          <table:table-cell table:style-name="ce14" table:formula="of:=[.C22] / 10000" office:value-type="percentage" office:value="0.212830960944713" calcext:value-type="percentage">
            <text:p>21,28%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3-03-22" calcext:value-type="date">
            <text:p>22.03.2023</text:p>
          </table:table-cell>
          <table:table-cell table:formula="of:=([.D22] + ([.D22] * 0.0175))" office:value-type="float" office:value="2145.20502761245" calcext:value-type="float">
            <text:p>2145,20502761245</text:p>
          </table:table-cell>
          <table:table-cell table:formula="of:=[.C23]- (0.25 * 80) - IF(WEEKDAY([.B23]; 2) = 5; 60; 0)" office:value-type="float" office:value="2125.20502761245" calcext:value-type="float">
            <text:p>2125,20502761245</text:p>
          </table:table-cell>
          <table:table-cell table:style-name="ce14" table:formula="of:=[.C23] / 10000" office:value-type="percentage" office:value="0.214520502761245" calcext:value-type="percentage">
            <text:p>21,45%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3-23" calcext:value-type="date">
            <text:p>23.03.2023</text:p>
          </table:table-cell>
          <table:table-cell table:formula="of:=([.D23] + ([.D23] * 0.0175))" office:value-type="float" office:value="2162.39611559567" calcext:value-type="float">
            <text:p>2162,39611559567</text:p>
          </table:table-cell>
          <table:table-cell table:formula="of:=[.C24]- (0.25 * 80) - IF(WEEKDAY([.B24]; 2) = 5; 60; 0)" office:value-type="float" office:value="2142.39611559567" calcext:value-type="float">
            <text:p>2142,39611559567</text:p>
          </table:table-cell>
          <table:table-cell table:style-name="ce14" table:formula="of:=[.C24] / 10000" office:value-type="percentage" office:value="0.216239611559567" calcext:value-type="percentage">
            <text:p>21,62%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3-24" calcext:value-type="date">
            <text:p>24.03.2023</text:p>
          </table:table-cell>
          <table:table-cell table:formula="of:=([.D24] + ([.D24] * 0.0175))" office:value-type="float" office:value="2179.8880476186" calcext:value-type="float">
            <text:p>2179,8880476186</text:p>
          </table:table-cell>
          <table:table-cell table:formula="of:=[.C25]- (0.25 * 80) - IF(WEEKDAY([.B25]; 2) = 5; 60; 0)" office:value-type="float" office:value="2099.8880476186" calcext:value-type="float">
            <text:p>2099,8880476186</text:p>
          </table:table-cell>
          <table:table-cell table:style-name="ce14" table:formula="of:=[.C25] / 10000" office:value-type="percentage" office:value="0.21798880476186" calcext:value-type="percentage">
            <text:p>21,80%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3-25" calcext:value-type="date">
            <text:p>25.03.2023</text:p>
          </table:table-cell>
          <table:table-cell table:formula="of:=([.D25] + ([.D25] * 0.0175))" office:value-type="float" office:value="2136.63608845192" calcext:value-type="float">
            <text:p>2136,63608845192</text:p>
          </table:table-cell>
          <table:table-cell table:formula="of:=[.C26]- (0.25 * 80) - IF(WEEKDAY([.B26]; 2) = 5; 60; 0)" office:value-type="float" office:value="2116.63608845192" calcext:value-type="float">
            <text:p>2116,63608845192</text:p>
          </table:table-cell>
          <table:table-cell table:style-name="ce14" table:formula="of:=[.C26] / 10000" office:value-type="percentage" office:value="0.213663608845192" calcext:value-type="percentage">
            <text:p>21,37%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3-26" calcext:value-type="date">
            <text:p>26.03.2023</text:p>
          </table:table-cell>
          <table:table-cell table:formula="of:=([.D26] + ([.D26] * 0.0175))" office:value-type="float" office:value="2153.67721999983" calcext:value-type="float">
            <text:p>2153,67721999983</text:p>
          </table:table-cell>
          <table:table-cell table:formula="of:=[.C27]- (0.25 * 80) - IF(WEEKDAY([.B27]; 2) = 5; 60; 0)" office:value-type="float" office:value="2133.67721999983" calcext:value-type="float">
            <text:p>2133,67721999983</text:p>
          </table:table-cell>
          <table:table-cell table:style-name="ce14" table:formula="of:=[.C27] / 10000" office:value-type="percentage" office:value="0.215367721999983" calcext:value-type="percentage">
            <text:p>21,54%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3-27" calcext:value-type="date">
            <text:p>27.03.2023</text:p>
          </table:table-cell>
          <table:table-cell table:formula="of:=([.D27] + ([.D27] * 0.0175))" office:value-type="float" office:value="2171.01657134983" calcext:value-type="float">
            <text:p>2171,01657134983</text:p>
          </table:table-cell>
          <table:table-cell table:formula="of:=[.C28]- (0.25 * 80) - IF(WEEKDAY([.B28]; 2) = 5; 60; 0)" office:value-type="float" office:value="2151.01657134983" calcext:value-type="float">
            <text:p>2151,01657134983</text:p>
          </table:table-cell>
          <table:table-cell table:style-name="ce14" table:formula="of:=[.C28] / 10000" office:value-type="percentage" office:value="0.217101657134983" calcext:value-type="percentage">
            <text:p>21,71%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3-03-28" calcext:value-type="date">
            <text:p>28.03.2023</text:p>
          </table:table-cell>
          <table:table-cell table:formula="of:=([.D28] + ([.D28] * 0.0175))" office:value-type="float" office:value="2188.65936134845" calcext:value-type="float">
            <text:p>2188,65936134845</text:p>
          </table:table-cell>
          <table:table-cell table:formula="of:=[.C29]- (0.25 * 80) - IF(WEEKDAY([.B29]; 2) = 5; 60; 0)" office:value-type="float" office:value="2168.65936134845" calcext:value-type="float">
            <text:p>2168,65936134845</text:p>
          </table:table-cell>
          <table:table-cell table:style-name="ce14" table:formula="of:=[.C29] / 10000" office:value-type="percentage" office:value="0.218865936134845" calcext:value-type="percentage">
            <text:p>21,89%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03-29" calcext:value-type="date">
            <text:p>29.03.2023</text:p>
          </table:table-cell>
          <table:table-cell table:formula="of:=([.D29] + ([.D29] * 0.0175))" office:value-type="float" office:value="2206.61090017205" calcext:value-type="float">
            <text:p>2206,61090017205</text:p>
          </table:table-cell>
          <table:table-cell table:formula="of:=[.C30]- (0.25 * 80) - IF(WEEKDAY([.B30]; 2) = 5; 60; 0)" office:value-type="float" office:value="2186.61090017205" calcext:value-type="float">
            <text:p>2186,61090017205</text:p>
          </table:table-cell>
          <table:table-cell table:style-name="ce14" table:formula="of:=[.C30] / 10000" office:value-type="percentage" office:value="0.220661090017205" calcext:value-type="percentage">
            <text:p>22,07%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03-30" calcext:value-type="date">
            <text:p>30.03.2023</text:p>
          </table:table-cell>
          <table:table-cell table:formula="of:=([.D30] + ([.D30] * 0.0175))" office:value-type="float" office:value="2224.87659092506" calcext:value-type="float">
            <text:p>2224,87659092506</text:p>
          </table:table-cell>
          <table:table-cell table:formula="of:=[.C31]- (0.25 * 80) - IF(WEEKDAY([.B31]; 2) = 5; 60; 0)" office:value-type="float" office:value="2204.87659092506" calcext:value-type="float">
            <text:p>2204,87659092506</text:p>
          </table:table-cell>
          <table:table-cell table:style-name="ce14" table:formula="of:=[.C31] / 10000" office:value-type="percentage" office:value="0.222487659092506" calcext:value-type="percentage">
            <text:p>22,25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3-03-31" calcext:value-type="date">
            <text:p>31.03.2023</text:p>
          </table:table-cell>
          <table:table-cell table:formula="of:=([.D31] + ([.D31] * 0.0175))" office:value-type="float" office:value="2243.46193126625" calcext:value-type="float">
            <text:p>2243,46193126625</text:p>
          </table:table-cell>
          <table:table-cell table:formula="of:=[.C32]- (0.25 * 80) - IF(WEEKDAY([.B32]; 2) = 5; 60; 0)" office:value-type="float" office:value="2163.46193126625" calcext:value-type="float">
            <text:p>2163,46193126625</text:p>
          </table:table-cell>
          <table:table-cell table:style-name="ce14" table:formula="of:=[.C32] / 10000" office:value-type="percentage" office:value="0.224346193126625" calcext:value-type="percentage">
            <text:p>22,43%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04-01" calcext:value-type="date">
            <text:p>1.04.2023</text:p>
          </table:table-cell>
          <table:table-cell table:formula="of:=([.D32] + ([.D32] * 0.0175))" office:value-type="float" office:value="2201.32251506341" calcext:value-type="float">
            <text:p>2201,32251506341</text:p>
          </table:table-cell>
          <table:table-cell table:formula="of:=[.C33]- (0.25 * 80) - IF(WEEKDAY([.B33]; 2) = 5; 60; 0)" office:value-type="float" office:value="2181.32251506341" calcext:value-type="float">
            <text:p>2181,32251506341</text:p>
          </table:table-cell>
          <table:table-cell table:style-name="ce14" table:formula="of:=[.C33] / 10000" office:value-type="percentage" office:value="0.22013225150634" calcext:value-type="percentage">
            <text:p>22,01%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04-02" calcext:value-type="date">
            <text:p>2.04.2023</text:p>
          </table:table-cell>
          <table:table-cell table:formula="of:=([.D33] + ([.D33] * 0.0175))" office:value-type="float" office:value="2219.49565907701" calcext:value-type="float">
            <text:p>2219,49565907701</text:p>
          </table:table-cell>
          <table:table-cell table:formula="of:=[.C34]- (0.25 * 80) - IF(WEEKDAY([.B34]; 2) = 5; 60; 0)" office:value-type="float" office:value="2199.49565907701" calcext:value-type="float">
            <text:p>2199,49565907701</text:p>
          </table:table-cell>
          <table:table-cell table:style-name="ce14" table:formula="of:=[.C34] / 10000" office:value-type="percentage" office:value="0.221949565907701" calcext:value-type="percentage">
            <text:p>22,19%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04-03" calcext:value-type="date">
            <text:p>3.04.2023</text:p>
          </table:table-cell>
          <table:table-cell table:formula="of:=([.D34] + ([.D34] * 0.0175))" office:value-type="float" office:value="2237.98683311086" calcext:value-type="float">
            <text:p>2237,98683311086</text:p>
          </table:table-cell>
          <table:table-cell table:formula="of:=[.C35]- (0.25 * 80) - IF(WEEKDAY([.B35]; 2) = 5; 60; 0)" office:value-type="float" office:value="2217.98683311086" calcext:value-type="float">
            <text:p>2217,98683311086</text:p>
          </table:table-cell>
          <table:table-cell table:style-name="ce14" table:formula="of:=[.C35] / 10000" office:value-type="percentage" office:value="0.223798683311086" calcext:value-type="percentage">
            <text:p>22,38%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04-04" calcext:value-type="date">
            <text:p>4.04.2023</text:p>
          </table:table-cell>
          <table:table-cell table:formula="of:=([.D35] + ([.D35] * 0.0175))" office:value-type="float" office:value="2256.8016026903" calcext:value-type="float">
            <text:p>2256,8016026903</text:p>
          </table:table-cell>
          <table:table-cell table:formula="of:=[.C36]- (0.25 * 80) - IF(WEEKDAY([.B36]; 2) = 5; 60; 0)" office:value-type="float" office:value="2236.8016026903" calcext:value-type="float">
            <text:p>2236,8016026903</text:p>
          </table:table-cell>
          <table:table-cell table:style-name="ce14" table:formula="of:=[.C36] / 10000" office:value-type="percentage" office:value="0.22568016026903" calcext:value-type="percentage">
            <text:p>22,57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04-05" calcext:value-type="date">
            <text:p>5.04.2023</text:p>
          </table:table-cell>
          <table:table-cell table:formula="of:=([.D36] + ([.D36] * 0.0175))" office:value-type="float" office:value="2275.94563073738" calcext:value-type="float">
            <text:p>2275,94563073738</text:p>
          </table:table-cell>
          <table:table-cell table:formula="of:=[.C37]- (0.25 * 80) - IF(WEEKDAY([.B37]; 2) = 5; 60; 0)" office:value-type="float" office:value="2255.94563073738" calcext:value-type="float">
            <text:p>2255,94563073738</text:p>
          </table:table-cell>
          <table:table-cell table:style-name="ce14" table:formula="of:=[.C37] / 10000" office:value-type="percentage" office:value="0.227594563073738" calcext:value-type="percentage">
            <text:p>22,76%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04-06" calcext:value-type="date">
            <text:p>6.04.2023</text:p>
          </table:table-cell>
          <table:table-cell table:formula="of:=([.D37] + ([.D37] * 0.0175))" office:value-type="float" office:value="2295.42467927529" calcext:value-type="float">
            <text:p>2295,42467927529</text:p>
          </table:table-cell>
          <table:table-cell table:formula="of:=[.C38]- (0.25 * 80) - IF(WEEKDAY([.B38]; 2) = 5; 60; 0)" office:value-type="float" office:value="2275.42467927529" calcext:value-type="float">
            <text:p>2275,42467927529</text:p>
          </table:table-cell>
          <table:table-cell table:style-name="ce14" table:formula="of:=[.C38] / 10000" office:value-type="percentage" office:value="0.229542467927529" calcext:value-type="percentage">
            <text:p>22,95%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04-07" calcext:value-type="date">
            <text:p>7.04.2023</text:p>
          </table:table-cell>
          <table:table-cell table:formula="of:=([.D38] + ([.D38] * 0.0175))" office:value-type="float" office:value="2315.2446111626" calcext:value-type="float">
            <text:p>2315,2446111626</text:p>
          </table:table-cell>
          <table:table-cell table:formula="of:=[.C39]- (0.25 * 80) - IF(WEEKDAY([.B39]; 2) = 5; 60; 0)" office:value-type="float" office:value="2235.2446111626" calcext:value-type="float">
            <text:p>2235,2446111626</text:p>
          </table:table-cell>
          <table:table-cell table:style-name="ce14" table:formula="of:=[.C39] / 10000" office:value-type="percentage" office:value="0.23152446111626" calcext:value-type="percentage">
            <text:p>23,15%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04-08" calcext:value-type="date">
            <text:p>8.04.2023</text:p>
          </table:table-cell>
          <table:table-cell table:formula="of:=([.D39] + ([.D39] * 0.0175))" office:value-type="float" office:value="2274.36139185795" calcext:value-type="float">
            <text:p>2274,36139185795</text:p>
          </table:table-cell>
          <table:table-cell table:formula="of:=[.C40]- (0.25 * 80) - IF(WEEKDAY([.B40]; 2) = 5; 60; 0)" office:value-type="float" office:value="2254.36139185795" calcext:value-type="float">
            <text:p>2254,36139185795</text:p>
          </table:table-cell>
          <table:table-cell table:style-name="ce14" table:formula="of:=[.C40] / 10000" office:value-type="percentage" office:value="0.227436139185795" calcext:value-type="percentage">
            <text:p>22,74%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04-09" calcext:value-type="date">
            <text:p>9.04.2023</text:p>
          </table:table-cell>
          <table:table-cell table:formula="of:=([.D40] + ([.D40] * 0.0175))" office:value-type="float" office:value="2293.81271621546" calcext:value-type="float">
            <text:p>2293,81271621546</text:p>
          </table:table-cell>
          <table:table-cell table:formula="of:=[.C41]- (0.25 * 80) - IF(WEEKDAY([.B41]; 2) = 5; 60; 0)" office:value-type="float" office:value="2273.81271621546" calcext:value-type="float">
            <text:p>2273,81271621546</text:p>
          </table:table-cell>
          <table:table-cell table:style-name="ce14" table:formula="of:=[.C41] / 10000" office:value-type="percentage" office:value="0.229381271621546" calcext:value-type="percentage">
            <text:p>22,94%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4-10" calcext:value-type="date">
            <text:p>10.04.2023</text:p>
          </table:table-cell>
          <table:table-cell table:formula="of:=([.D41] + ([.D41] * 0.0175))" office:value-type="float" office:value="2313.60443874923" calcext:value-type="float">
            <text:p>2313,60443874923</text:p>
          </table:table-cell>
          <table:table-cell table:formula="of:=[.C42]- (0.25 * 80) - IF(WEEKDAY([.B42]; 2) = 5; 60; 0)" office:value-type="float" office:value="2293.60443874923" calcext:value-type="float">
            <text:p>2293,60443874923</text:p>
          </table:table-cell>
          <table:table-cell table:style-name="ce14" table:formula="of:=[.C42] / 10000" office:value-type="percentage" office:value="0.231360443874923" calcext:value-type="percentage">
            <text:p>23,14%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04-11" calcext:value-type="date">
            <text:p>11.04.2023</text:p>
          </table:table-cell>
          <table:table-cell table:formula="of:=([.D42] + ([.D42] * 0.0175))" office:value-type="float" office:value="2333.74251642735" calcext:value-type="float">
            <text:p>2333,74251642735</text:p>
          </table:table-cell>
          <table:table-cell table:formula="of:=[.C43]- (0.25 * 80) - IF(WEEKDAY([.B43]; 2) = 5; 60; 0)" office:value-type="float" office:value="2313.74251642735" calcext:value-type="float">
            <text:p>2313,74251642735</text:p>
          </table:table-cell>
          <table:table-cell table:style-name="ce14" table:formula="of:=[.C43] / 10000" office:value-type="percentage" office:value="0.233374251642735" calcext:value-type="percentage">
            <text:p>23,34%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4-12" calcext:value-type="date">
            <text:p>12.04.2023</text:p>
          </table:table-cell>
          <table:table-cell table:formula="of:=([.D43] + ([.D43] * 0.0175))" office:value-type="float" office:value="2354.23301046482" calcext:value-type="float">
            <text:p>2354,23301046482</text:p>
          </table:table-cell>
          <table:table-cell table:formula="of:=[.C44]- (0.25 * 80) - IF(WEEKDAY([.B44]; 2) = 5; 60; 0)" office:value-type="float" office:value="2334.23301046482" calcext:value-type="float">
            <text:p>2334,23301046482</text:p>
          </table:table-cell>
          <table:table-cell table:style-name="ce14" table:formula="of:=[.C44] / 10000" office:value-type="percentage" office:value="0.235423301046482" calcext:value-type="percentage">
            <text:p>23,54%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13" calcext:value-type="date">
            <text:p>13.04.2023</text:p>
          </table:table-cell>
          <table:table-cell table:formula="of:=([.D44] + ([.D44] * 0.0175))" office:value-type="float" office:value="2375.08208814796" calcext:value-type="float">
            <text:p>2375,08208814796</text:p>
          </table:table-cell>
          <table:table-cell table:formula="of:=[.C45]- (0.25 * 80) - IF(WEEKDAY([.B45]; 2) = 5; 60; 0)" office:value-type="float" office:value="2355.08208814796" calcext:value-type="float">
            <text:p>2355,08208814796</text:p>
          </table:table-cell>
          <table:table-cell table:style-name="ce14" table:formula="of:=[.C45] / 10000" office:value-type="percentage" office:value="0.237508208814796" calcext:value-type="percentage">
            <text:p>23,75%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04-14" calcext:value-type="date">
            <text:p>14.04.2023</text:p>
          </table:table-cell>
          <table:table-cell table:formula="of:=([.D45] + ([.D45] * 0.0175))" office:value-type="float" office:value="2396.29602469055" calcext:value-type="float">
            <text:p>2396,29602469055</text:p>
          </table:table-cell>
          <table:table-cell table:formula="of:=[.C46]- (0.25 * 80) - IF(WEEKDAY([.B46]; 2) = 5; 60; 0)" office:value-type="float" office:value="2316.29602469055" calcext:value-type="float">
            <text:p>2316,29602469055</text:p>
          </table:table-cell>
          <table:table-cell table:style-name="ce14" table:formula="of:=[.C46] / 10000" office:value-type="percentage" office:value="0.239629602469055" calcext:value-type="percentage">
            <text:p>23,96%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04-15" calcext:value-type="date">
            <text:p>15.04.2023</text:p>
          </table:table-cell>
          <table:table-cell table:formula="of:=([.D46] + ([.D46] * 0.0175))" office:value-type="float" office:value="2356.83120512263" calcext:value-type="float">
            <text:p>2356,83120512263</text:p>
          </table:table-cell>
          <table:table-cell table:formula="of:=[.C47]- (0.25 * 80) - IF(WEEKDAY([.B47]; 2) = 5; 60; 0)" office:value-type="float" office:value="2336.83120512263" calcext:value-type="float">
            <text:p>2336,83120512263</text:p>
          </table:table-cell>
          <table:table-cell table:style-name="ce14" table:formula="of:=[.C47] / 10000" office:value-type="percentage" office:value="0.235683120512263" calcext:value-type="percentage">
            <text:p>23,57%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3-04-16" calcext:value-type="date">
            <text:p>16.04.2023</text:p>
          </table:table-cell>
          <table:table-cell table:formula="of:=([.D47] + ([.D47] * 0.0175))" office:value-type="float" office:value="2377.72575121228" calcext:value-type="float">
            <text:p>2377,72575121228</text:p>
          </table:table-cell>
          <table:table-cell table:formula="of:=[.C48]- (0.25 * 80) - IF(WEEKDAY([.B48]; 2) = 5; 60; 0)" office:value-type="float" office:value="2357.72575121228" calcext:value-type="float">
            <text:p>2357,72575121228</text:p>
          </table:table-cell>
          <table:table-cell table:style-name="ce14" table:formula="of:=[.C48] / 10000" office:value-type="percentage" office:value="0.237772575121228" calcext:value-type="percentage">
            <text:p>23,78%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04-17" calcext:value-type="date">
            <text:p>17.04.2023</text:p>
          </table:table-cell>
          <table:table-cell table:formula="of:=([.D48] + ([.D48] * 0.0175))" office:value-type="float" office:value="2398.98595185849" calcext:value-type="float">
            <text:p>2398,98595185849</text:p>
          </table:table-cell>
          <table:table-cell table:formula="of:=[.C49]- (0.25 * 80) - IF(WEEKDAY([.B49]; 2) = 5; 60; 0)" office:value-type="float" office:value="2378.98595185849" calcext:value-type="float">
            <text:p>2378,98595185849</text:p>
          </table:table-cell>
          <table:table-cell table:style-name="ce14" table:formula="of:=[.C49] / 10000" office:value-type="percentage" office:value="0.239898595185849" calcext:value-type="percentage">
            <text:p>23,99%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04-18" calcext:value-type="date">
            <text:p>18.04.2023</text:p>
          </table:table-cell>
          <table:table-cell table:formula="of:=([.D49] + ([.D49] * 0.0175))" office:value-type="float" office:value="2420.61820601602" calcext:value-type="float">
            <text:p>2420,61820601602</text:p>
          </table:table-cell>
          <table:table-cell table:formula="of:=[.C50]- (0.25 * 80) - IF(WEEKDAY([.B50]; 2) = 5; 60; 0)" office:value-type="float" office:value="2400.61820601602" calcext:value-type="float">
            <text:p>2400,61820601602</text:p>
          </table:table-cell>
          <table:table-cell table:style-name="ce14" table:formula="of:=[.C50] / 10000" office:value-type="percentage" office:value="0.242061820601602" calcext:value-type="percentage">
            <text:p>24,21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04-19" calcext:value-type="date">
            <text:p>19.04.2023</text:p>
          </table:table-cell>
          <table:table-cell table:formula="of:=([.D50] + ([.D50] * 0.0175))" office:value-type="float" office:value="2442.6290246213" calcext:value-type="float">
            <text:p>2442,6290246213</text:p>
          </table:table-cell>
          <table:table-cell table:formula="of:=[.C51]- (0.25 * 80) - IF(WEEKDAY([.B51]; 2) = 5; 60; 0)" office:value-type="float" office:value="2422.6290246213" calcext:value-type="float">
            <text:p>2422,6290246213</text:p>
          </table:table-cell>
          <table:table-cell table:style-name="ce14" table:formula="of:=[.C51] / 10000" office:value-type="percentage" office:value="0.24426290246213" calcext:value-type="percentage">
            <text:p>24,43%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04-20" calcext:value-type="date">
            <text:p>20.04.2023</text:p>
          </table:table-cell>
          <table:table-cell table:formula="of:=([.D51] + ([.D51] * 0.0175))" office:value-type="float" office:value="2465.02503255217" calcext:value-type="float">
            <text:p>2465,02503255217</text:p>
          </table:table-cell>
          <table:table-cell table:formula="of:=[.C52]- (0.25 * 80) - IF(WEEKDAY([.B52]; 2) = 5; 60; 0)" office:value-type="float" office:value="2445.02503255217" calcext:value-type="float">
            <text:p>2445,02503255217</text:p>
          </table:table-cell>
          <table:table-cell table:style-name="ce14" table:formula="of:=[.C52] / 10000" office:value-type="percentage" office:value="0.246502503255217" calcext:value-type="percentage">
            <text:p>24,65%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04-21" calcext:value-type="date">
            <text:p>21.04.2023</text:p>
          </table:table-cell>
          <table:table-cell table:formula="of:=([.D52] + ([.D52] * 0.0175))" office:value-type="float" office:value="2487.81297062183" calcext:value-type="float">
            <text:p>2487,81297062183</text:p>
          </table:table-cell>
          <table:table-cell table:formula="of:=[.C53]- (0.25 * 80) - IF(WEEKDAY([.B53]; 2) = 5; 60; 0)" office:value-type="float" office:value="2407.81297062183" calcext:value-type="float">
            <text:p>2407,81297062183</text:p>
          </table:table-cell>
          <table:table-cell table:style-name="ce14" table:formula="of:=[.C53] / 10000" office:value-type="percentage" office:value="0.248781297062183" calcext:value-type="percentage">
            <text:p>24,88%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3-04-22" calcext:value-type="date">
            <text:p>22.04.2023</text:p>
          </table:table-cell>
          <table:table-cell table:formula="of:=([.D53] + ([.D53] * 0.0175))" office:value-type="float" office:value="2449.94969760772" calcext:value-type="float">
            <text:p>2449,94969760772</text:p>
          </table:table-cell>
          <table:table-cell table:formula="of:=[.C54]- (0.25 * 80) - IF(WEEKDAY([.B54]; 2) = 5; 60; 0)" office:value-type="float" office:value="2429.94969760772" calcext:value-type="float">
            <text:p>2429,94969760772</text:p>
          </table:table-cell>
          <table:table-cell table:style-name="ce14" table:formula="of:=[.C54] / 10000" office:value-type="percentage" office:value="0.244994969760772" calcext:value-type="percentage">
            <text:p>24,50%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3-04-23" calcext:value-type="date">
            <text:p>23.04.2023</text:p>
          </table:table-cell>
          <table:table-cell table:formula="of:=([.D54] + ([.D54] * 0.0175))" office:value-type="float" office:value="2472.47381731585" calcext:value-type="float">
            <text:p>2472,47381731585</text:p>
          </table:table-cell>
          <table:table-cell table:formula="of:=[.C55]- (0.25 * 80) - IF(WEEKDAY([.B55]; 2) = 5; 60; 0)" office:value-type="float" office:value="2452.47381731585" calcext:value-type="float">
            <text:p>2452,47381731585</text:p>
          </table:table-cell>
          <table:table-cell table:style-name="ce14" table:formula="of:=[.C55] / 10000" office:value-type="percentage" office:value="0.247247381731585" calcext:value-type="percentage">
            <text:p>24,72%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3-04-24" calcext:value-type="date">
            <text:p>24.04.2023</text:p>
          </table:table-cell>
          <table:table-cell table:formula="of:=([.D55] + ([.D55] * 0.0175))" office:value-type="float" office:value="2495.39210911888" calcext:value-type="float">
            <text:p>2495,39210911888</text:p>
          </table:table-cell>
          <table:table-cell table:formula="of:=[.C56]- (0.25 * 80) - IF(WEEKDAY([.B56]; 2) = 5; 60; 0)" office:value-type="float" office:value="2475.39210911888" calcext:value-type="float">
            <text:p>2475,39210911888</text:p>
          </table:table-cell>
          <table:table-cell table:style-name="ce14" table:formula="of:=[.C56] / 10000" office:value-type="percentage" office:value="0.249539210911888" calcext:value-type="percentage">
            <text:p>24,95%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3-04-25" calcext:value-type="date">
            <text:p>25.04.2023</text:p>
          </table:table-cell>
          <table:table-cell table:formula="of:=([.D56] + ([.D56] * 0.0175))" office:value-type="float" office:value="2518.71147102846" calcext:value-type="float">
            <text:p>2518,71147102846</text:p>
          </table:table-cell>
          <table:table-cell table:formula="of:=[.C57]- (0.25 * 80) - IF(WEEKDAY([.B57]; 2) = 5; 60; 0)" office:value-type="float" office:value="2498.71147102846" calcext:value-type="float">
            <text:p>2498,71147102846</text:p>
          </table:table-cell>
          <table:table-cell table:style-name="ce14" table:formula="of:=[.C57] / 10000" office:value-type="percentage" office:value="0.251871147102846" calcext:value-type="percentage">
            <text:p>25,19%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3-04-26" calcext:value-type="date">
            <text:p>26.04.2023</text:p>
          </table:table-cell>
          <table:table-cell table:formula="of:=([.D57] + ([.D57] * 0.0175))" office:value-type="float" office:value="2542.43892177146" calcext:value-type="float">
            <text:p>2542,43892177146</text:p>
          </table:table-cell>
          <table:table-cell table:formula="of:=[.C58]- (0.25 * 80) - IF(WEEKDAY([.B58]; 2) = 5; 60; 0)" office:value-type="float" office:value="2522.43892177146" calcext:value-type="float">
            <text:p>2522,43892177146</text:p>
          </table:table-cell>
          <table:table-cell table:style-name="ce14" table:formula="of:=[.C58] / 10000" office:value-type="percentage" office:value="0.254243892177146" calcext:value-type="percentage">
            <text:p>25,42%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3-04-27" calcext:value-type="date">
            <text:p>27.04.2023</text:p>
          </table:table-cell>
          <table:table-cell table:formula="of:=([.D58] + ([.D58] * 0.0175))" office:value-type="float" office:value="2566.58160290246" calcext:value-type="float">
            <text:p>2566,58160290246</text:p>
          </table:table-cell>
          <table:table-cell table:formula="of:=[.C59]- (0.25 * 80) - IF(WEEKDAY([.B59]; 2) = 5; 60; 0)" office:value-type="float" office:value="2546.58160290246" calcext:value-type="float">
            <text:p>2546,58160290246</text:p>
          </table:table-cell>
          <table:table-cell table:style-name="ce14" table:formula="of:=[.C59] / 10000" office:value-type="percentage" office:value="0.256658160290246" calcext:value-type="percentage">
            <text:p>25,67%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3-04-28" calcext:value-type="date">
            <text:p>28.04.2023</text:p>
          </table:table-cell>
          <table:table-cell table:formula="of:=([.D59] + ([.D59] * 0.0175))" office:value-type="float" office:value="2591.14678095325" calcext:value-type="float">
            <text:p>2591,14678095325</text:p>
          </table:table-cell>
          <table:table-cell table:formula="of:=[.C60]- (0.25 * 80) - IF(WEEKDAY([.B60]; 2) = 5; 60; 0)" office:value-type="float" office:value="2511.14678095325" calcext:value-type="float">
            <text:p>2511,14678095325</text:p>
          </table:table-cell>
          <table:table-cell table:style-name="ce14" table:formula="of:=[.C60] / 10000" office:value-type="percentage" office:value="0.259114678095325" calcext:value-type="percentage">
            <text:p>25,91%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3-04-29" calcext:value-type="date">
            <text:p>29.04.2023</text:p>
          </table:table-cell>
          <table:table-cell table:formula="of:=([.D60] + ([.D60] * 0.0175))" office:value-type="float" office:value="2555.09184961993" calcext:value-type="float">
            <text:p>2555,09184961993</text:p>
          </table:table-cell>
          <table:table-cell table:formula="of:=[.C61]- (0.25 * 80) - IF(WEEKDAY([.B61]; 2) = 5; 60; 0)" office:value-type="float" office:value="2535.09184961993" calcext:value-type="float">
            <text:p>2535,09184961993</text:p>
          </table:table-cell>
          <table:table-cell table:style-name="ce14" table:formula="of:=[.C61] / 10000" office:value-type="percentage" office:value="0.255509184961993" calcext:value-type="percentage">
            <text:p>25,55%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3-04-30" calcext:value-type="date">
            <text:p>30.04.2023</text:p>
          </table:table-cell>
          <table:table-cell table:formula="of:=([.D61] + ([.D61] * 0.0175))" office:value-type="float" office:value="2579.45595698828" calcext:value-type="float">
            <text:p>2579,45595698828</text:p>
          </table:table-cell>
          <table:table-cell table:formula="of:=[.C62]- (0.25 * 80) - IF(WEEKDAY([.B62]; 2) = 5; 60; 0)" office:value-type="float" office:value="2559.45595698828" calcext:value-type="float">
            <text:p>2559,45595698828</text:p>
          </table:table-cell>
          <table:table-cell table:style-name="ce14" table:formula="of:=[.C62] / 10000" office:value-type="percentage" office:value="0.257945595698828" calcext:value-type="percentage">
            <text:p>25,79%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3-05-01" calcext:value-type="date">
            <text:p>1.05.2023</text:p>
          </table:table-cell>
          <table:table-cell table:formula="of:=([.D62] + ([.D62] * 0.0175))" office:value-type="float" office:value="2604.24643623558" calcext:value-type="float">
            <text:p>2604,24643623558</text:p>
          </table:table-cell>
          <table:table-cell table:formula="of:=[.C63]- (0.25 * 80) - IF(WEEKDAY([.B63]; 2) = 5; 60; 0)" office:value-type="float" office:value="2584.24643623558" calcext:value-type="float">
            <text:p>2584,24643623558</text:p>
          </table:table-cell>
          <table:table-cell table:style-name="ce14" table:formula="of:=[.C63] / 10000" office:value-type="percentage" office:value="0.260424643623558" calcext:value-type="percentage">
            <text:p>26,04%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3-05-02" calcext:value-type="date">
            <text:p>2.05.2023</text:p>
          </table:table-cell>
          <table:table-cell table:formula="of:=([.D63] + ([.D63] * 0.0175))" office:value-type="float" office:value="2629.4707488697" calcext:value-type="float">
            <text:p>2629,4707488697</text:p>
          </table:table-cell>
          <table:table-cell table:formula="of:=[.C64]- (0.25 * 80) - IF(WEEKDAY([.B64]; 2) = 5; 60; 0)" office:value-type="float" office:value="2609.4707488697" calcext:value-type="float">
            <text:p>2609,4707488697</text:p>
          </table:table-cell>
          <table:table-cell table:style-name="ce14" table:formula="of:=[.C64] / 10000" office:value-type="percentage" office:value="0.26294707488697" calcext:value-type="percentage">
            <text:p>26,29%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3-05-03" calcext:value-type="date">
            <text:p>3.05.2023</text:p>
          </table:table-cell>
          <table:table-cell table:formula="of:=([.D64] + ([.D64] * 0.0175))" office:value-type="float" office:value="2655.13648697492" calcext:value-type="float">
            <text:p>2655,13648697492</text:p>
          </table:table-cell>
          <table:table-cell table:formula="of:=[.C65]- (0.25 * 80) - IF(WEEKDAY([.B65]; 2) = 5; 60; 0)" office:value-type="float" office:value="2635.13648697492" calcext:value-type="float">
            <text:p>2635,13648697492</text:p>
          </table:table-cell>
          <table:table-cell table:style-name="ce14" table:formula="of:=[.C65] / 10000" office:value-type="percentage" office:value="0.265513648697492" calcext:value-type="percentage">
            <text:p>26,55%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3-05-04" calcext:value-type="date">
            <text:p>4.05.2023</text:p>
          </table:table-cell>
          <table:table-cell table:formula="of:=([.D65] + ([.D65] * 0.0175))" office:value-type="float" office:value="2681.25137549698" calcext:value-type="float">
            <text:p>2681,25137549698</text:p>
          </table:table-cell>
          <table:table-cell table:formula="of:=[.C66]- (0.25 * 80) - IF(WEEKDAY([.B66]; 2) = 5; 60; 0)" office:value-type="float" office:value="2661.25137549698" calcext:value-type="float">
            <text:p>2661,25137549698</text:p>
          </table:table-cell>
          <table:table-cell table:style-name="ce14" table:formula="of:=[.C66] / 10000" office:value-type="percentage" office:value="0.268125137549698" calcext:value-type="percentage">
            <text:p>26,81%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3-05-05" calcext:value-type="date">
            <text:p>5.05.2023</text:p>
          </table:table-cell>
          <table:table-cell table:formula="of:=([.D66] + ([.D66] * 0.0175))" office:value-type="float" office:value="2707.82327456818" calcext:value-type="float">
            <text:p>2707,82327456818</text:p>
          </table:table-cell>
          <table:table-cell table:formula="of:=[.C67]- (0.25 * 80) - IF(WEEKDAY([.B67]; 2) = 5; 60; 0)" office:value-type="float" office:value="2627.82327456818" calcext:value-type="float">
            <text:p>2627,82327456818</text:p>
          </table:table-cell>
          <table:table-cell table:style-name="ce14" table:formula="of:=[.C67] / 10000" office:value-type="percentage" office:value="0.270782327456818" calcext:value-type="percentage">
            <text:p>27,08%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3-05-06" calcext:value-type="date">
            <text:p>6.05.2023</text:p>
          </table:table-cell>
          <table:table-cell table:formula="of:=([.D67] + ([.D67] * 0.0175))" office:value-type="float" office:value="2673.81018187312" calcext:value-type="float">
            <text:p>2673,81018187312</text:p>
          </table:table-cell>
          <table:table-cell table:formula="of:=[.C68]- (0.25 * 80) - IF(WEEKDAY([.B68]; 2) = 5; 60; 0)" office:value-type="float" office:value="2653.81018187312" calcext:value-type="float">
            <text:p>2653,81018187312</text:p>
          </table:table-cell>
          <table:table-cell table:style-name="ce14" table:formula="of:=[.C68] / 10000" office:value-type="percentage" office:value="0.267381018187312" calcext:value-type="percentage">
            <text:p>26,74%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3-05-07" calcext:value-type="date">
            <text:p>7.05.2023</text:p>
          </table:table-cell>
          <table:table-cell table:formula="of:=([.D68] + ([.D68] * 0.0175))" office:value-type="float" office:value="2700.2518600559" calcext:value-type="float">
            <text:p>2700,2518600559</text:p>
          </table:table-cell>
          <table:table-cell table:formula="of:=[.C69]- (0.25 * 80) - IF(WEEKDAY([.B69]; 2) = 5; 60; 0)" office:value-type="float" office:value="2680.2518600559" calcext:value-type="float">
            <text:p>2680,2518600559</text:p>
          </table:table-cell>
          <table:table-cell table:style-name="ce14" table:formula="of:=[.C69] / 10000" office:value-type="percentage" office:value="0.27002518600559" calcext:value-type="percentage">
            <text:p>27,00%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3-05-08" calcext:value-type="date">
            <text:p>8.05.2023</text:p>
          </table:table-cell>
          <table:table-cell table:formula="of:=([.D69] + ([.D69] * 0.0175))" office:value-type="float" office:value="2727.15626760688" calcext:value-type="float">
            <text:p>2727,15626760688</text:p>
          </table:table-cell>
          <table:table-cell table:formula="of:=[.C70]- (0.25 * 80) - IF(WEEKDAY([.B70]; 2) = 5; 60; 0)" office:value-type="float" office:value="2707.15626760688" calcext:value-type="float">
            <text:p>2707,15626760688</text:p>
          </table:table-cell>
          <table:table-cell table:style-name="ce14" table:formula="of:=[.C70] / 10000" office:value-type="percentage" office:value="0.272715626760688" calcext:value-type="percentage">
            <text:p>27,27%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3-05-09" calcext:value-type="date">
            <text:p>9.05.2023</text:p>
          </table:table-cell>
          <table:table-cell table:formula="of:=([.D70] + ([.D70] * 0.0175))" office:value-type="float" office:value="2754.53150229" calcext:value-type="float">
            <text:p>2754,53150229</text:p>
          </table:table-cell>
          <table:table-cell table:formula="of:=[.C71]- (0.25 * 80) - IF(WEEKDAY([.B71]; 2) = 5; 60; 0)" office:value-type="float" office:value="2734.53150229" calcext:value-type="float">
            <text:p>2734,53150229</text:p>
          </table:table-cell>
          <table:table-cell table:style-name="ce14" table:formula="of:=[.C71] / 10000" office:value-type="percentage" office:value="0.275453150229" calcext:value-type="percentage">
            <text:p>27,55%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3-05-10" calcext:value-type="date">
            <text:p>10.05.2023</text:p>
          </table:table-cell>
          <table:table-cell table:formula="of:=([.D71] + ([.D71] * 0.0175))" office:value-type="float" office:value="2782.38580358007" calcext:value-type="float">
            <text:p>2782,38580358007</text:p>
          </table:table-cell>
          <table:table-cell table:formula="of:=[.C72]- (0.25 * 80) - IF(WEEKDAY([.B72]; 2) = 5; 60; 0)" office:value-type="float" office:value="2762.38580358007" calcext:value-type="float">
            <text:p>2762,38580358007</text:p>
          </table:table-cell>
          <table:table-cell table:style-name="ce14" table:formula="of:=[.C72] / 10000" office:value-type="percentage" office:value="0.278238580358007" calcext:value-type="percentage">
            <text:p>27,82%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3-05-11" calcext:value-type="date">
            <text:p>11.05.2023</text:p>
          </table:table-cell>
          <table:table-cell table:formula="of:=([.D72] + ([.D72] * 0.0175))" office:value-type="float" office:value="2810.72755514272" calcext:value-type="float">
            <text:p>2810,72755514272</text:p>
          </table:table-cell>
          <table:table-cell table:formula="of:=[.C73]- (0.25 * 80) - IF(WEEKDAY([.B73]; 2) = 5; 60; 0)" office:value-type="float" office:value="2790.72755514272" calcext:value-type="float">
            <text:p>2790,72755514272</text:p>
          </table:table-cell>
          <table:table-cell table:style-name="ce14" table:formula="of:=[.C73] / 10000" office:value-type="percentage" office:value="0.281072755514272" calcext:value-type="percentage">
            <text:p>28,11%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3-05-12" calcext:value-type="date">
            <text:p>12.05.2023</text:p>
          </table:table-cell>
          <table:table-cell table:formula="of:=([.D73] + ([.D73] * 0.0175))" office:value-type="float" office:value="2839.56528735772" calcext:value-type="float">
            <text:p>2839,56528735772</text:p>
          </table:table-cell>
          <table:table-cell table:formula="of:=[.C74]- (0.25 * 80) - IF(WEEKDAY([.B74]; 2) = 5; 60; 0)" office:value-type="float" office:value="2759.56528735772" calcext:value-type="float">
            <text:p>2759,56528735772</text:p>
          </table:table-cell>
          <table:table-cell table:style-name="ce14" table:formula="of:=[.C74] / 10000" office:value-type="percentage" office:value="0.283956528735772" calcext:value-type="percentage">
            <text:p>28,40%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3-05-13" calcext:value-type="date">
            <text:p>13.05.2023</text:p>
          </table:table-cell>
          <table:table-cell table:formula="of:=([.D74] + ([.D74] * 0.0175))" office:value-type="float" office:value="2807.85767988648" calcext:value-type="float">
            <text:p>2807,85767988648</text:p>
          </table:table-cell>
          <table:table-cell table:formula="of:=[.C75]- (0.25 * 80) - IF(WEEKDAY([.B75]; 2) = 5; 60; 0)" office:value-type="float" office:value="2787.85767988648" calcext:value-type="float">
            <text:p>2787,85767988648</text:p>
          </table:table-cell>
          <table:table-cell table:style-name="ce14" table:formula="of:=[.C75] / 10000" office:value-type="percentage" office:value="0.280785767988648" calcext:value-type="percentage">
            <text:p>28,08%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3-05-14" calcext:value-type="date">
            <text:p>14.05.2023</text:p>
          </table:table-cell>
          <table:table-cell table:formula="of:=([.D75] + ([.D75] * 0.0175))" office:value-type="float" office:value="2836.64518928449" calcext:value-type="float">
            <text:p>2836,64518928449</text:p>
          </table:table-cell>
          <table:table-cell table:formula="of:=[.C76]- (0.25 * 80) - IF(WEEKDAY([.B76]; 2) = 5; 60; 0)" office:value-type="float" office:value="2816.64518928449" calcext:value-type="float">
            <text:p>2816,64518928449</text:p>
          </table:table-cell>
          <table:table-cell table:style-name="ce14" table:formula="of:=[.C76] / 10000" office:value-type="percentage" office:value="0.283664518928449" calcext:value-type="percentage">
            <text:p>28,37%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3-05-15" calcext:value-type="date">
            <text:p>15.05.2023</text:p>
          </table:table-cell>
          <table:table-cell table:formula="of:=([.D76] + ([.D76] * 0.0175))" office:value-type="float" office:value="2865.93648009697" calcext:value-type="float">
            <text:p>2865,93648009697</text:p>
          </table:table-cell>
          <table:table-cell table:formula="of:=[.C77]- (0.25 * 80) - IF(WEEKDAY([.B77]; 2) = 5; 60; 0)" office:value-type="float" office:value="2845.93648009697" calcext:value-type="float">
            <text:p>2845,93648009697</text:p>
          </table:table-cell>
          <table:table-cell table:style-name="ce14" table:formula="of:=[.C77] / 10000" office:value-type="percentage" office:value="0.286593648009697" calcext:value-type="percentage">
            <text:p>28,66%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3-05-16" calcext:value-type="date">
            <text:p>16.05.2023</text:p>
          </table:table-cell>
          <table:table-cell table:formula="of:=([.D77] + ([.D77] * 0.0175))" office:value-type="float" office:value="2895.74036849867" calcext:value-type="float">
            <text:p>2895,74036849867</text:p>
          </table:table-cell>
          <table:table-cell table:formula="of:=[.C78]- (0.25 * 80) - IF(WEEKDAY([.B78]; 2) = 5; 60; 0)" office:value-type="float" office:value="2875.74036849867" calcext:value-type="float">
            <text:p>2875,74036849867</text:p>
          </table:table-cell>
          <table:table-cell table:style-name="ce14" table:formula="of:=[.C78] / 10000" office:value-type="percentage" office:value="0.289574036849867" calcext:value-type="percentage">
            <text:p>28,96%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3-05-17" calcext:value-type="date">
            <text:p>17.05.2023</text:p>
          </table:table-cell>
          <table:table-cell table:formula="of:=([.D78] + ([.D78] * 0.0175))" office:value-type="float" office:value="2926.0658249474" calcext:value-type="float">
            <text:p>2926,0658249474</text:p>
          </table:table-cell>
          <table:table-cell table:formula="of:=[.C79]- (0.25 * 80) - IF(WEEKDAY([.B79]; 2) = 5; 60; 0)" office:value-type="float" office:value="2906.0658249474" calcext:value-type="float">
            <text:p>2906,0658249474</text:p>
          </table:table-cell>
          <table:table-cell table:style-name="ce14" table:formula="of:=[.C79] / 10000" office:value-type="percentage" office:value="0.29260658249474" calcext:value-type="percentage">
            <text:p>29,26%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3-05-18" calcext:value-type="date">
            <text:p>18.05.2023</text:p>
          </table:table-cell>
          <table:table-cell table:formula="of:=([.D79] + ([.D79] * 0.0175))" office:value-type="float" office:value="2956.92197688398" calcext:value-type="float">
            <text:p>2956,92197688398</text:p>
          </table:table-cell>
          <table:table-cell table:formula="of:=[.C80]- (0.25 * 80) - IF(WEEKDAY([.B80]; 2) = 5; 60; 0)" office:value-type="float" office:value="2936.92197688398" calcext:value-type="float">
            <text:p>2936,92197688398</text:p>
          </table:table-cell>
          <table:table-cell table:style-name="ce14" table:formula="of:=[.C80] / 10000" office:value-type="percentage" office:value="0.295692197688398" calcext:value-type="percentage">
            <text:p>29,57%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3-05-19" calcext:value-type="date">
            <text:p>19.05.2023</text:p>
          </table:table-cell>
          <table:table-cell table:formula="of:=([.D80] + ([.D80] * 0.0175))" office:value-type="float" office:value="2988.31811147944" calcext:value-type="float">
            <text:p>2988,31811147944</text:p>
          </table:table-cell>
          <table:table-cell table:formula="of:=[.C81]- (0.25 * 80) - IF(WEEKDAY([.B81]; 2) = 5; 60; 0)" office:value-type="float" office:value="2908.31811147944" calcext:value-type="float">
            <text:p>2908,31811147944</text:p>
          </table:table-cell>
          <table:table-cell table:style-name="ce14" table:formula="of:=[.C81] / 10000" office:value-type="percentage" office:value="0.298831811147945" calcext:value-type="percentage">
            <text:p>29,88%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3-05-20" calcext:value-type="date">
            <text:p>20.05.2023</text:p>
          </table:table-cell>
          <table:table-cell table:formula="of:=([.D81] + ([.D81] * 0.0175))" office:value-type="float" office:value="2959.21367843034" calcext:value-type="float">
            <text:p>2959,21367843034</text:p>
          </table:table-cell>
          <table:table-cell table:formula="of:=[.C82]- (0.25 * 80) - IF(WEEKDAY([.B82]; 2) = 5; 60; 0)" office:value-type="float" office:value="2939.21367843034" calcext:value-type="float">
            <text:p>2939,21367843034</text:p>
          </table:table-cell>
          <table:table-cell table:style-name="ce14" table:formula="of:=[.C82] / 10000" office:value-type="percentage" office:value="0.295921367843034" calcext:value-type="percentage">
            <text:p>29,59%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3-05-21" calcext:value-type="date">
            <text:p>21.05.2023</text:p>
          </table:table-cell>
          <table:table-cell table:formula="of:=([.D82] + ([.D82] * 0.0175))" office:value-type="float" office:value="2990.64991780287" calcext:value-type="float">
            <text:p>2990,64991780287</text:p>
          </table:table-cell>
          <table:table-cell table:formula="of:=[.C83]- (0.25 * 80) - IF(WEEKDAY([.B83]; 2) = 5; 60; 0)" office:value-type="float" office:value="2970.64991780287" calcext:value-type="float">
            <text:p>2970,64991780287</text:p>
          </table:table-cell>
          <table:table-cell table:style-name="ce14" table:formula="of:=[.C83] / 10000" office:value-type="percentage" office:value="0.299064991780287" calcext:value-type="percentage">
            <text:p>29,91%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3-05-22" calcext:value-type="date">
            <text:p>22.05.2023</text:p>
          </table:table-cell>
          <table:table-cell table:formula="of:=([.D83] + ([.D83] * 0.0175))" office:value-type="float" office:value="3022.63629136442" calcext:value-type="float">
            <text:p>3022,63629136442</text:p>
          </table:table-cell>
          <table:table-cell table:formula="of:=[.C84]- (0.25 * 80) - IF(WEEKDAY([.B84]; 2) = 5; 60; 0)" office:value-type="float" office:value="3002.63629136442" calcext:value-type="float">
            <text:p>3002,63629136442</text:p>
          </table:table-cell>
          <table:table-cell table:style-name="ce14" table:formula="of:=[.C84] / 10000" office:value-type="percentage" office:value="0.302263629136442" calcext:value-type="percentage">
            <text:p>30,23%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3-05-23" calcext:value-type="date">
            <text:p>23.05.2023</text:p>
          </table:table-cell>
          <table:table-cell table:formula="of:=([.D84] + ([.D84] * 0.0175))" office:value-type="float" office:value="3055.18242646329" calcext:value-type="float">
            <text:p>3055,18242646329</text:p>
          </table:table-cell>
          <table:table-cell table:formula="of:=[.C85]- (0.25 * 80) - IF(WEEKDAY([.B85]; 2) = 5; 60; 0)" office:value-type="float" office:value="3035.18242646329" calcext:value-type="float">
            <text:p>3035,18242646329</text:p>
          </table:table-cell>
          <table:table-cell table:style-name="ce14" table:formula="of:=[.C85] / 10000" office:value-type="percentage" office:value="0.305518242646329" calcext:value-type="percentage">
            <text:p>30,55%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3-05-24" calcext:value-type="date">
            <text:p>24.05.2023</text:p>
          </table:table-cell>
          <table:table-cell table:formula="of:=([.D85] + ([.D85] * 0.0175))" office:value-type="float" office:value="3088.2981189264" calcext:value-type="float">
            <text:p>3088,2981189264</text:p>
          </table:table-cell>
          <table:table-cell table:formula="of:=[.C86]- (0.25 * 80) - IF(WEEKDAY([.B86]; 2) = 5; 60; 0)" office:value-type="float" office:value="3068.2981189264" calcext:value-type="float">
            <text:p>3068,2981189264</text:p>
          </table:table-cell>
          <table:table-cell table:style-name="ce14" table:formula="of:=[.C86] / 10000" office:value-type="percentage" office:value="0.30882981189264" calcext:value-type="percentage">
            <text:p>30,88%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3-05-25" calcext:value-type="date">
            <text:p>25.05.2023</text:p>
          </table:table-cell>
          <table:table-cell table:formula="of:=([.D86] + ([.D86] * 0.0175))" office:value-type="float" office:value="3121.99333600761" calcext:value-type="float">
            <text:p>3121,99333600761</text:p>
          </table:table-cell>
          <table:table-cell table:formula="of:=[.C87]- (0.25 * 80) - IF(WEEKDAY([.B87]; 2) = 5; 60; 0)" office:value-type="float" office:value="3101.99333600761" calcext:value-type="float">
            <text:p>3101,99333600761</text:p>
          </table:table-cell>
          <table:table-cell table:style-name="ce14" table:formula="of:=[.C87] / 10000" office:value-type="percentage" office:value="0.312199333600761" calcext:value-type="percentage">
            <text:p>31,22%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3-05-26" calcext:value-type="date">
            <text:p>26.05.2023</text:p>
          </table:table-cell>
          <table:table-cell table:formula="of:=([.D87] + ([.D87] * 0.0175))" office:value-type="float" office:value="3156.27821938775" calcext:value-type="float">
            <text:p>3156,27821938775</text:p>
          </table:table-cell>
          <table:table-cell table:formula="of:=[.C88]- (0.25 * 80) - IF(WEEKDAY([.B88]; 2) = 5; 60; 0)" office:value-type="float" office:value="3076.27821938775" calcext:value-type="float">
            <text:p>3076,27821938775</text:p>
          </table:table-cell>
          <table:table-cell table:style-name="ce14" table:formula="of:=[.C88] / 10000" office:value-type="percentage" office:value="0.315627821938775" calcext:value-type="percentage">
            <text:p>31,56%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3-05-27" calcext:value-type="date">
            <text:p>27.05.2023</text:p>
          </table:table-cell>
          <table:table-cell table:formula="of:=([.D88] + ([.D88] * 0.0175))" office:value-type="float" office:value="3130.11308822703" calcext:value-type="float">
            <text:p>3130,11308822703</text:p>
          </table:table-cell>
          <table:table-cell table:formula="of:=[.C89]- (0.25 * 80) - IF(WEEKDAY([.B89]; 2) = 5; 60; 0)" office:value-type="float" office:value="3110.11308822703" calcext:value-type="float">
            <text:p>3110,11308822703</text:p>
          </table:table-cell>
          <table:table-cell table:style-name="ce14" table:formula="of:=[.C89] / 10000" office:value-type="percentage" office:value="0.313011308822703" calcext:value-type="percentage">
            <text:p>31,30%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3-05-28" calcext:value-type="date">
            <text:p>28.05.2023</text:p>
          </table:table-cell>
          <table:table-cell table:formula="of:=([.D89] + ([.D89] * 0.0175))" office:value-type="float" office:value="3164.54006727101" calcext:value-type="float">
            <text:p>3164,54006727101</text:p>
          </table:table-cell>
          <table:table-cell table:formula="of:=[.C90]- (0.25 * 80) - IF(WEEKDAY([.B90]; 2) = 5; 60; 0)" office:value-type="float" office:value="3144.54006727101" calcext:value-type="float">
            <text:p>3144,54006727101</text:p>
          </table:table-cell>
          <table:table-cell table:style-name="ce14" table:formula="of:=[.C90] / 10000" office:value-type="percentage" office:value="0.316454006727101" calcext:value-type="percentage">
            <text:p>31,65%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3-05-29" calcext:value-type="date">
            <text:p>29.05.2023</text:p>
          </table:table-cell>
          <table:table-cell table:formula="of:=([.D90] + ([.D90] * 0.0175))" office:value-type="float" office:value="3199.56951844825" calcext:value-type="float">
            <text:p>3199,56951844825</text:p>
          </table:table-cell>
          <table:table-cell table:formula="of:=[.C91]- (0.25 * 80) - IF(WEEKDAY([.B91]; 2) = 5; 60; 0)" office:value-type="float" office:value="3179.56951844825" calcext:value-type="float">
            <text:p>3179,56951844825</text:p>
          </table:table-cell>
          <table:table-cell table:style-name="ce14" table:formula="of:=[.C91] / 10000" office:value-type="percentage" office:value="0.319956951844825" calcext:value-type="percentage">
            <text:p>32,00%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3-05-30" calcext:value-type="date">
            <text:p>30.05.2023</text:p>
          </table:table-cell>
          <table:table-cell table:formula="of:=([.D91] + ([.D91] * 0.0175))" office:value-type="float" office:value="3235.21198502109" calcext:value-type="float">
            <text:p>3235,21198502109</text:p>
          </table:table-cell>
          <table:table-cell table:formula="of:=[.C92]- (0.25 * 80) - IF(WEEKDAY([.B92]; 2) = 5; 60; 0)" office:value-type="float" office:value="3215.21198502109" calcext:value-type="float">
            <text:p>3215,21198502109</text:p>
          </table:table-cell>
          <table:table-cell table:style-name="ce14" table:formula="of:=[.C92] / 10000" office:value-type="percentage" office:value="0.323521198502109" calcext:value-type="percentage">
            <text:p>32,35%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3-05-31" calcext:value-type="date">
            <text:p>31.05.2023</text:p>
          </table:table-cell>
          <table:table-cell table:formula="of:=([.D92] + ([.D92] * 0.0175))" office:value-type="float" office:value="3271.47819475896" calcext:value-type="float">
            <text:p>3271,47819475896</text:p>
          </table:table-cell>
          <table:table-cell table:formula="of:=[.C93]- (0.25 * 80) - IF(WEEKDAY([.B93]; 2) = 5; 60; 0)" office:value-type="float" office:value="3251.47819475896" calcext:value-type="float">
            <text:p>3251,47819475896</text:p>
          </table:table-cell>
          <table:table-cell table:style-name="ce14" table:formula="of:=[.C93] / 10000" office:value-type="percentage" office:value="0.327147819475896" calcext:value-type="percentage">
            <text:p>32,71%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3-06-01" calcext:value-type="date">
            <text:p>1.06.2023</text:p>
          </table:table-cell>
          <table:table-cell table:formula="of:=([.D93] + ([.D93] * 0.0175))" office:value-type="float" office:value="3308.37906316724" calcext:value-type="float">
            <text:p>3308,37906316724</text:p>
          </table:table-cell>
          <table:table-cell table:formula="of:=[.C94]- (0.25 * 80) - IF(WEEKDAY([.B94]; 2) = 5; 60; 0)" office:value-type="float" office:value="3288.37906316724" calcext:value-type="float">
            <text:p>3288,37906316724</text:p>
          </table:table-cell>
          <table:table-cell table:style-name="ce14" table:formula="of:=[.C94] / 10000" office:value-type="percentage" office:value="0.330837906316724" calcext:value-type="percentage">
            <text:p>33,08%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3-06-02" calcext:value-type="date">
            <text:p>2.06.2023</text:p>
          </table:table-cell>
          <table:table-cell table:formula="of:=([.D94] + ([.D94] * 0.0175))" office:value-type="float" office:value="3345.92569677267" calcext:value-type="float">
            <text:p>3345,92569677267</text:p>
          </table:table-cell>
          <table:table-cell table:formula="of:=[.C95]- (0.25 * 80) - IF(WEEKDAY([.B95]; 2) = 5; 60; 0)" office:value-type="float" office:value="3265.92569677267" calcext:value-type="float">
            <text:p>3265,92569677267</text:p>
          </table:table-cell>
          <table:table-cell table:style-name="ce14" table:formula="of:=[.C95] / 10000" office:value-type="percentage" office:value="0.334592569677267" calcext:value-type="percentage">
            <text:p>33,46%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3-06-03" calcext:value-type="date">
            <text:p>3.06.2023</text:p>
          </table:table-cell>
          <table:table-cell table:formula="of:=([.D95] + ([.D95] * 0.0175))" office:value-type="float" office:value="3323.07939646619" calcext:value-type="float">
            <text:p>3323,07939646619</text:p>
          </table:table-cell>
          <table:table-cell table:formula="of:=[.C96]- (0.25 * 80) - IF(WEEKDAY([.B96]; 2) = 5; 60; 0)" office:value-type="float" office:value="3303.07939646619" calcext:value-type="float">
            <text:p>3303,07939646619</text:p>
          </table:table-cell>
          <table:table-cell table:style-name="ce14" table:formula="of:=[.C96] / 10000" office:value-type="percentage" office:value="0.332307939646619" calcext:value-type="percentage">
            <text:p>33,23%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3-06-04" calcext:value-type="date">
            <text:p>4.06.2023</text:p>
          </table:table-cell>
          <table:table-cell table:formula="of:=([.D96] + ([.D96] * 0.0175))" office:value-type="float" office:value="3360.88328590435" calcext:value-type="float">
            <text:p>3360,88328590435</text:p>
          </table:table-cell>
          <table:table-cell table:formula="of:=[.C97]- (0.25 * 80) - IF(WEEKDAY([.B97]; 2) = 5; 60; 0)" office:value-type="float" office:value="3340.88328590435" calcext:value-type="float">
            <text:p>3340,88328590435</text:p>
          </table:table-cell>
          <table:table-cell table:style-name="ce14" table:formula="of:=[.C97] / 10000" office:value-type="percentage" office:value="0.336088328590435" calcext:value-type="percentage">
            <text:p>33,61%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3-06-05" calcext:value-type="date">
            <text:p>5.06.2023</text:p>
          </table:table-cell>
          <table:table-cell table:formula="of:=([.D97] + ([.D97] * 0.0175))" office:value-type="float" office:value="3399.34874340768" calcext:value-type="float">
            <text:p>3399,34874340768</text:p>
          </table:table-cell>
          <table:table-cell table:formula="of:=[.C98]- (0.25 * 80) - IF(WEEKDAY([.B98]; 2) = 5; 60; 0)" office:value-type="float" office:value="3379.34874340768" calcext:value-type="float">
            <text:p>3379,34874340768</text:p>
          </table:table-cell>
          <table:table-cell table:style-name="ce14" table:formula="of:=[.C98] / 10000" office:value-type="percentage" office:value="0.339934874340768" calcext:value-type="percentage">
            <text:p>33,99%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3-06-06" calcext:value-type="date">
            <text:p>6.06.2023</text:p>
          </table:table-cell>
          <table:table-cell table:formula="of:=([.D98] + ([.D98] * 0.0175))" office:value-type="float" office:value="3438.48734641731" calcext:value-type="float">
            <text:p>3438,48734641731</text:p>
          </table:table-cell>
          <table:table-cell table:formula="of:=[.C99]- (0.25 * 80) - IF(WEEKDAY([.B99]; 2) = 5; 60; 0)" office:value-type="float" office:value="3418.48734641731" calcext:value-type="float">
            <text:p>3418,48734641731</text:p>
          </table:table-cell>
          <table:table-cell table:style-name="ce14" table:formula="of:=[.C99] / 10000" office:value-type="percentage" office:value="0.343848734641731" calcext:value-type="percentage">
            <text:p>34,38%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3-06-07" calcext:value-type="date">
            <text:p>7.06.2023</text:p>
          </table:table-cell>
          <table:table-cell table:formula="of:=([.D99] + ([.D99] * 0.0175))" office:value-type="float" office:value="3478.31087497961" calcext:value-type="float">
            <text:p>3478,31087497961</text:p>
          </table:table-cell>
          <table:table-cell table:formula="of:=[.C100]- (0.25 * 80) - IF(WEEKDAY([.B100]; 2) = 5; 60; 0)" office:value-type="float" office:value="3458.31087497961" calcext:value-type="float">
            <text:p>3458,31087497961</text:p>
          </table:table-cell>
          <table:table-cell table:style-name="ce14" table:formula="of:=[.C100] / 10000" office:value-type="percentage" office:value="0.347831087497961" calcext:value-type="percentage">
            <text:p>34,78%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3-06-08" calcext:value-type="date">
            <text:p>8.06.2023</text:p>
          </table:table-cell>
          <table:table-cell table:formula="of:=([.D100] + ([.D100] * 0.0175))" office:value-type="float" office:value="3518.83131529176" calcext:value-type="float">
            <text:p>3518,83131529176</text:p>
          </table:table-cell>
          <table:table-cell table:formula="of:=[.C101]- (0.25 * 80) - IF(WEEKDAY([.B101]; 2) = 5; 60; 0)" office:value-type="float" office:value="3498.83131529176" calcext:value-type="float">
            <text:p>3498,83131529176</text:p>
          </table:table-cell>
          <table:table-cell table:style-name="ce14" table:formula="of:=[.C101] / 10000" office:value-type="percentage" office:value="0.351883131529176" calcext:value-type="percentage">
            <text:p>35,19%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3-06-09" calcext:value-type="date">
            <text:p>9.06.2023</text:p>
          </table:table-cell>
          <table:table-cell table:formula="of:=([.D101] + ([.D101] * 0.0175))" office:value-type="float" office:value="3560.06086330936" calcext:value-type="float">
            <text:p>3560,06086330936</text:p>
          </table:table-cell>
          <table:table-cell table:formula="of:=[.C102]- (0.25 * 80) - IF(WEEKDAY([.B102]; 2) = 5; 60; 0)" office:value-type="float" office:value="3480.06086330936" calcext:value-type="float">
            <text:p>3480,06086330936</text:p>
          </table:table-cell>
          <table:table-cell table:style-name="ce14" table:formula="of:=[.C102] / 10000" office:value-type="percentage" office:value="0.356006086330936" calcext:value-type="percentage">
            <text:p>35,60%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3-06-10" calcext:value-type="date">
            <text:p>10.06.2023</text:p>
          </table:table-cell>
          <table:table-cell table:formula="of:=([.D102] + ([.D102] * 0.0175))" office:value-type="float" office:value="3540.96192841728" calcext:value-type="float">
            <text:p>3540,96192841728</text:p>
          </table:table-cell>
          <table:table-cell table:formula="of:=[.C103]- (0.25 * 80) - IF(WEEKDAY([.B103]; 2) = 5; 60; 0)" office:value-type="float" office:value="3520.96192841728" calcext:value-type="float">
            <text:p>3520,96192841728</text:p>
          </table:table-cell>
          <table:table-cell table:style-name="ce14" table:formula="of:=[.C103] / 10000" office:value-type="percentage" office:value="0.354096192841728" calcext:value-type="percentage">
            <text:p>35,41%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3-06-11" calcext:value-type="date">
            <text:p>11.06.2023</text:p>
          </table:table-cell>
          <table:table-cell table:formula="of:=([.D103] + ([.D103] * 0.0175))" office:value-type="float" office:value="3582.57876216458" calcext:value-type="float">
            <text:p>3582,57876216458</text:p>
          </table:table-cell>
          <table:table-cell table:formula="of:=[.C104]- (0.25 * 80) - IF(WEEKDAY([.B104]; 2) = 5; 60; 0)" office:value-type="float" office:value="3562.57876216458" calcext:value-type="float">
            <text:p>3562,57876216458</text:p>
          </table:table-cell>
          <table:table-cell table:style-name="ce14" table:formula="of:=[.C104] / 10000" office:value-type="percentage" office:value="0.358257876216458" calcext:value-type="percentage">
            <text:p>35,83%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3-06-12" calcext:value-type="date">
            <text:p>12.06.2023</text:p>
          </table:table-cell>
          <table:table-cell table:formula="of:=([.D104] + ([.D104] * 0.0175))" office:value-type="float" office:value="3624.92389050246" calcext:value-type="float">
            <text:p>3624,92389050246</text:p>
          </table:table-cell>
          <table:table-cell table:formula="of:=[.C105]- (0.25 * 80) - IF(WEEKDAY([.B105]; 2) = 5; 60; 0)" office:value-type="float" office:value="3604.92389050246" calcext:value-type="float">
            <text:p>3604,92389050246</text:p>
          </table:table-cell>
          <table:table-cell table:style-name="ce14" table:formula="of:=[.C105] / 10000" office:value-type="percentage" office:value="0.362492389050246" calcext:value-type="percentage">
            <text:p>36,25%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3-06-13" calcext:value-type="date">
            <text:p>13.06.2023</text:p>
          </table:table-cell>
          <table:table-cell table:formula="of:=([.D105] + ([.D105] * 0.0175))" office:value-type="float" office:value="3668.01005858625" calcext:value-type="float">
            <text:p>3668,01005858625</text:p>
          </table:table-cell>
          <table:table-cell table:formula="of:=[.C106]- (0.25 * 80) - IF(WEEKDAY([.B106]; 2) = 5; 60; 0)" office:value-type="float" office:value="3648.01005858625" calcext:value-type="float">
            <text:p>3648,01005858625</text:p>
          </table:table-cell>
          <table:table-cell table:style-name="ce14" table:formula="of:=[.C106] / 10000" office:value-type="percentage" office:value="0.366801005858625" calcext:value-type="percentage">
            <text:p>36,68%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3-06-14" calcext:value-type="date">
            <text:p>14.06.2023</text:p>
          </table:table-cell>
          <table:table-cell table:formula="of:=([.D106] + ([.D106] * 0.0175))" office:value-type="float" office:value="3711.85023461151" calcext:value-type="float">
            <text:p>3711,85023461151</text:p>
          </table:table-cell>
          <table:table-cell table:formula="of:=[.C107]- (0.25 * 80) - IF(WEEKDAY([.B107]; 2) = 5; 60; 0)" office:value-type="float" office:value="3691.85023461151" calcext:value-type="float">
            <text:p>3691,85023461151</text:p>
          </table:table-cell>
          <table:table-cell table:style-name="ce14" table:formula="of:=[.C107] / 10000" office:value-type="percentage" office:value="0.371185023461151" calcext:value-type="percentage">
            <text:p>37,12%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3-06-15" calcext:value-type="date">
            <text:p>15.06.2023</text:p>
          </table:table-cell>
          <table:table-cell table:formula="of:=([.D107] + ([.D107] * 0.0175))" office:value-type="float" office:value="3756.45761371721" calcext:value-type="float">
            <text:p>3756,45761371721</text:p>
          </table:table-cell>
          <table:table-cell table:formula="of:=[.C108]- (0.25 * 80) - IF(WEEKDAY([.B108]; 2) = 5; 60; 0)" office:value-type="float" office:value="3736.45761371721" calcext:value-type="float">
            <text:p>3736,45761371721</text:p>
          </table:table-cell>
          <table:table-cell table:style-name="ce14" table:formula="of:=[.C108] / 10000" office:value-type="percentage" office:value="0.375645761371721" calcext:value-type="percentage">
            <text:p>37,56%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3-06-16" calcext:value-type="date">
            <text:p>16.06.2023</text:p>
          </table:table-cell>
          <table:table-cell table:formula="of:=([.D108] + ([.D108] * 0.0175))" office:value-type="float" office:value="3801.84562195726" calcext:value-type="float">
            <text:p>3801,84562195726</text:p>
          </table:table-cell>
          <table:table-cell table:formula="of:=[.C109]- (0.25 * 80) - IF(WEEKDAY([.B109]; 2) = 5; 60; 0)" office:value-type="float" office:value="3721.84562195726" calcext:value-type="float">
            <text:p>3721,84562195726</text:p>
          </table:table-cell>
          <table:table-cell table:style-name="ce14" table:formula="of:=[.C109] / 10000" office:value-type="percentage" office:value="0.380184562195726" calcext:value-type="percentage">
            <text:p>38,02%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3-06-17" calcext:value-type="date">
            <text:p>17.06.2023</text:p>
          </table:table-cell>
          <table:table-cell table:formula="of:=([.D109] + ([.D109] * 0.0175))" office:value-type="float" office:value="3786.97792034151" calcext:value-type="float">
            <text:p>3786,97792034151</text:p>
          </table:table-cell>
          <table:table-cell table:formula="of:=[.C110]- (0.25 * 80) - IF(WEEKDAY([.B110]; 2) = 5; 60; 0)" office:value-type="float" office:value="3766.97792034151" calcext:value-type="float">
            <text:p>3766,97792034151</text:p>
          </table:table-cell>
          <table:table-cell table:style-name="ce14" table:formula="of:=[.C110] / 10000" office:value-type="percentage" office:value="0.378697792034151" calcext:value-type="percentage">
            <text:p>37,87%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3-06-18" calcext:value-type="date">
            <text:p>18.06.2023</text:p>
          </table:table-cell>
          <table:table-cell table:formula="of:=([.D110] + ([.D110] * 0.0175))" office:value-type="float" office:value="3832.90003394749" calcext:value-type="float">
            <text:p>3832,90003394749</text:p>
          </table:table-cell>
          <table:table-cell table:formula="of:=[.C111]- (0.25 * 80) - IF(WEEKDAY([.B111]; 2) = 5; 60; 0)" office:value-type="float" office:value="3812.90003394749" calcext:value-type="float">
            <text:p>3812,90003394749</text:p>
          </table:table-cell>
          <table:table-cell table:style-name="ce14" table:formula="of:=[.C111] / 10000" office:value-type="percentage" office:value="0.383290003394749" calcext:value-type="percentage">
            <text:p>38,33%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3-06-19" calcext:value-type="date">
            <text:p>19.06.2023</text:p>
          </table:table-cell>
          <table:table-cell table:formula="of:=([.D111] + ([.D111] * 0.0175))" office:value-type="float" office:value="3879.62578454157" calcext:value-type="float">
            <text:p>3879,62578454157</text:p>
          </table:table-cell>
          <table:table-cell table:formula="of:=[.C112]- (0.25 * 80) - IF(WEEKDAY([.B112]; 2) = 5; 60; 0)" office:value-type="float" office:value="3859.62578454157" calcext:value-type="float">
            <text:p>3859,62578454157</text:p>
          </table:table-cell>
          <table:table-cell table:style-name="ce14" table:formula="of:=[.C112] / 10000" office:value-type="percentage" office:value="0.387962578454157" calcext:value-type="percentage">
            <text:p>38,80%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3-06-20" calcext:value-type="date">
            <text:p>20.06.2023</text:p>
          </table:table-cell>
          <table:table-cell table:formula="of:=([.D112] + ([.D112] * 0.0175))" office:value-type="float" office:value="3927.16923577105" calcext:value-type="float">
            <text:p>3927,16923577105</text:p>
          </table:table-cell>
          <table:table-cell table:formula="of:=[.C113]- (0.25 * 80) - IF(WEEKDAY([.B113]; 2) = 5; 60; 0)" office:value-type="float" office:value="3907.16923577105" calcext:value-type="float">
            <text:p>3907,16923577105</text:p>
          </table:table-cell>
          <table:table-cell table:style-name="ce14" table:formula="of:=[.C113] / 10000" office:value-type="percentage" office:value="0.392716923577105" calcext:value-type="percentage">
            <text:p>39,27%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3-06-21" calcext:value-type="date">
            <text:p>21.06.2023</text:p>
          </table:table-cell>
          <table:table-cell table:formula="of:=([.D113] + ([.D113] * 0.0175))" office:value-type="float" office:value="3975.54469739704" calcext:value-type="float">
            <text:p>3975,54469739704</text:p>
          </table:table-cell>
          <table:table-cell table:formula="of:=[.C114]- (0.25 * 80) - IF(WEEKDAY([.B114]; 2) = 5; 60; 0)" office:value-type="float" office:value="3955.54469739704" calcext:value-type="float">
            <text:p>3955,54469739704</text:p>
          </table:table-cell>
          <table:table-cell table:style-name="ce14" table:formula="of:=[.C114] / 10000" office:value-type="percentage" office:value="0.397554469739704" calcext:value-type="percentage">
            <text:p>39,76%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3-06-22" calcext:value-type="date">
            <text:p>22.06.2023</text:p>
          </table:table-cell>
          <table:table-cell table:formula="of:=([.D114] + ([.D114] * 0.0175))" office:value-type="float" office:value="4024.76672960149" calcext:value-type="float">
            <text:p>4024,76672960149</text:p>
          </table:table-cell>
          <table:table-cell table:formula="of:=[.C115]- (0.25 * 80) - IF(WEEKDAY([.B115]; 2) = 5; 60; 0)" office:value-type="float" office:value="4004.76672960149" calcext:value-type="float">
            <text:p>4004,76672960149</text:p>
          </table:table-cell>
          <table:table-cell table:style-name="ce14" table:formula="of:=[.C115] / 10000" office:value-type="percentage" office:value="0.402476672960149" calcext:value-type="percentage">
            <text:p>40,25%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3-06-23" calcext:value-type="date">
            <text:p>23.06.2023</text:p>
          </table:table-cell>
          <table:table-cell table:formula="of:=([.D115] + ([.D115] * 0.0175))" office:value-type="float" office:value="4074.85014736952" calcext:value-type="float">
            <text:p>4074,85014736952</text:p>
          </table:table-cell>
          <table:table-cell table:formula="of:=[.C116]- (0.25 * 80) - IF(WEEKDAY([.B116]; 2) = 5; 60; 0)" office:value-type="float" office:value="3994.85014736952" calcext:value-type="float">
            <text:p>3994,85014736952</text:p>
          </table:table-cell>
          <table:table-cell table:style-name="ce14" table:formula="of:=[.C116] / 10000" office:value-type="percentage" office:value="0.407485014736952" calcext:value-type="percentage">
            <text:p>40,75%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3-06-24" calcext:value-type="date">
            <text:p>24.06.2023</text:p>
          </table:table-cell>
          <table:table-cell table:formula="of:=([.D116] + ([.D116] * 0.0175))" office:value-type="float" office:value="4064.76002494848" calcext:value-type="float">
            <text:p>4064,76002494848</text:p>
          </table:table-cell>
          <table:table-cell table:formula="of:=[.C117]- (0.25 * 80) - IF(WEEKDAY([.B117]; 2) = 5; 60; 0)" office:value-type="float" office:value="4044.76002494848" calcext:value-type="float">
            <text:p>4044,76002494848</text:p>
          </table:table-cell>
          <table:table-cell table:style-name="ce14" table:formula="of:=[.C117] / 10000" office:value-type="percentage" office:value="0.406476002494848" calcext:value-type="percentage">
            <text:p>40,65%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3-06-25" calcext:value-type="date">
            <text:p>25.06.2023</text:p>
          </table:table-cell>
          <table:table-cell table:formula="of:=([.D117] + ([.D117] * 0.0175))" office:value-type="float" office:value="4115.54332538508" calcext:value-type="float">
            <text:p>4115,54332538508</text:p>
          </table:table-cell>
          <table:table-cell table:formula="of:=[.C118]- (0.25 * 80) - IF(WEEKDAY([.B118]; 2) = 5; 60; 0)" office:value-type="float" office:value="4095.54332538508" calcext:value-type="float">
            <text:p>4095,54332538508</text:p>
          </table:table-cell>
          <table:table-cell table:style-name="ce14" table:formula="of:=[.C118] / 10000" office:value-type="percentage" office:value="0.411554332538508" calcext:value-type="percentage">
            <text:p>41,16%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3-06-26" calcext:value-type="date">
            <text:p>26.06.2023</text:p>
          </table:table-cell>
          <table:table-cell table:formula="of:=([.D118] + ([.D118] * 0.0175))" office:value-type="float" office:value="4167.21533357932" calcext:value-type="float">
            <text:p>4167,21533357932</text:p>
          </table:table-cell>
          <table:table-cell table:formula="of:=[.C119]- (0.25 * 80) - IF(WEEKDAY([.B119]; 2) = 5; 60; 0)" office:value-type="float" office:value="4147.21533357932" calcext:value-type="float">
            <text:p>4147,21533357932</text:p>
          </table:table-cell>
          <table:table-cell table:style-name="ce14" table:formula="of:=[.C119] / 10000" office:value-type="percentage" office:value="0.416721533357932" calcext:value-type="percentage">
            <text:p>41,67%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3-06-27" calcext:value-type="date">
            <text:p>27.06.2023</text:p>
          </table:table-cell>
          <table:table-cell table:formula="of:=([.D119] + ([.D119] * 0.0175))" office:value-type="float" office:value="4219.79160191696" calcext:value-type="float">
            <text:p>4219,79160191696</text:p>
          </table:table-cell>
          <table:table-cell table:formula="of:=[.C120]- (0.25 * 80) - IF(WEEKDAY([.B120]; 2) = 5; 60; 0)" office:value-type="float" office:value="4199.79160191696" calcext:value-type="float">
            <text:p>4199,79160191696</text:p>
          </table:table-cell>
          <table:table-cell table:style-name="ce14" table:formula="of:=[.C120] / 10000" office:value-type="percentage" office:value="0.421979160191696" calcext:value-type="percentage">
            <text:p>42,20%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3-06-28" calcext:value-type="date">
            <text:p>28.06.2023</text:p>
          </table:table-cell>
          <table:table-cell table:formula="of:=([.D120] + ([.D120] * 0.0175))" office:value-type="float" office:value="4273.28795495051" calcext:value-type="float">
            <text:p>4273,28795495051</text:p>
          </table:table-cell>
          <table:table-cell table:formula="of:=[.C121]- (0.25 * 80) - IF(WEEKDAY([.B121]; 2) = 5; 60; 0)" office:value-type="float" office:value="4253.28795495051" calcext:value-type="float">
            <text:p>4253,28795495051</text:p>
          </table:table-cell>
          <table:table-cell table:style-name="ce14" table:formula="of:=[.C121] / 10000" office:value-type="percentage" office:value="0.427328795495051" calcext:value-type="percentage">
            <text:p>42,73%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3-06-29" calcext:value-type="date">
            <text:p>29.06.2023</text:p>
          </table:table-cell>
          <table:table-cell table:formula="of:=([.D121] + ([.D121] * 0.0175))" office:value-type="float" office:value="4327.72049416214" calcext:value-type="float">
            <text:p>4327,72049416214</text:p>
          </table:table-cell>
          <table:table-cell table:formula="of:=[.C122]- (0.25 * 80) - IF(WEEKDAY([.B122]; 2) = 5; 60; 0)" office:value-type="float" office:value="4307.72049416214" calcext:value-type="float">
            <text:p>4307,72049416214</text:p>
          </table:table-cell>
          <table:table-cell table:style-name="ce14" table:formula="of:=[.C122] / 10000" office:value-type="percentage" office:value="0.432772049416214" calcext:value-type="percentage">
            <text:p>43,28%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3-06-30" calcext:value-type="date">
            <text:p>30.06.2023</text:p>
          </table:table-cell>
          <table:table-cell table:formula="of:=([.D122] + ([.D122] * 0.0175))" office:value-type="float" office:value="4383.10560280998" calcext:value-type="float">
            <text:p>4383,10560280998</text:p>
          </table:table-cell>
          <table:table-cell table:formula="of:=[.C123]- (0.25 * 80) - IF(WEEKDAY([.B123]; 2) = 5; 60; 0)" office:value-type="float" office:value="4303.10560280998" calcext:value-type="float">
            <text:p>4303,10560280998</text:p>
          </table:table-cell>
          <table:table-cell table:style-name="ce14" table:formula="of:=[.C123] / 10000" office:value-type="percentage" office:value="0.438310560280998" calcext:value-type="percentage">
            <text:p>43,83%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3-07-01" calcext:value-type="date">
            <text:p>1.07.2023</text:p>
          </table:table-cell>
          <table:table-cell table:formula="of:=([.D123] + ([.D123] * 0.0175))" office:value-type="float" office:value="4378.40995085915" calcext:value-type="float">
            <text:p>4378,40995085915</text:p>
          </table:table-cell>
          <table:table-cell table:formula="of:=[.C124]- (0.25 * 80) - IF(WEEKDAY([.B124]; 2) = 5; 60; 0)" office:value-type="float" office:value="4358.40995085915" calcext:value-type="float">
            <text:p>4358,40995085915</text:p>
          </table:table-cell>
          <table:table-cell table:style-name="ce14" table:formula="of:=[.C124] / 10000" office:value-type="percentage" office:value="0.437840995085915" calcext:value-type="percentage">
            <text:p>43,78%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3-07-02" calcext:value-type="date">
            <text:p>2.07.2023</text:p>
          </table:table-cell>
          <table:table-cell table:formula="of:=([.D124] + ([.D124] * 0.0175))" office:value-type="float" office:value="4434.68212499919" calcext:value-type="float">
            <text:p>4434,68212499919</text:p>
          </table:table-cell>
          <table:table-cell table:formula="of:=[.C125]- (0.25 * 80) - IF(WEEKDAY([.B125]; 2) = 5; 60; 0)" office:value-type="float" office:value="4414.68212499919" calcext:value-type="float">
            <text:p>4414,68212499919</text:p>
          </table:table-cell>
          <table:table-cell table:style-name="ce14" table:formula="of:=[.C125] / 10000" office:value-type="percentage" office:value="0.443468212499919" calcext:value-type="percentage">
            <text:p>44,35%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3-07-03" calcext:value-type="date">
            <text:p>3.07.2023</text:p>
          </table:table-cell>
          <table:table-cell table:formula="of:=([.D125] + ([.D125] * 0.0175))" office:value-type="float" office:value="4491.93906218667" calcext:value-type="float">
            <text:p>4491,93906218667</text:p>
          </table:table-cell>
          <table:table-cell table:formula="of:=[.C126]- (0.25 * 80) - IF(WEEKDAY([.B126]; 2) = 5; 60; 0)" office:value-type="float" office:value="4471.93906218667" calcext:value-type="float">
            <text:p>4471,93906218667</text:p>
          </table:table-cell>
          <table:table-cell table:style-name="ce14" table:formula="of:=[.C126] / 10000" office:value-type="percentage" office:value="0.449193906218667" calcext:value-type="percentage">
            <text:p>44,92%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3-07-04" calcext:value-type="date">
            <text:p>4.07.2023</text:p>
          </table:table-cell>
          <table:table-cell table:formula="of:=([.D126] + ([.D126] * 0.0175))" office:value-type="float" office:value="4550.19799577494" calcext:value-type="float">
            <text:p>4550,19799577494</text:p>
          </table:table-cell>
          <table:table-cell table:formula="of:=[.C127]- (0.25 * 80) - IF(WEEKDAY([.B127]; 2) = 5; 60; 0)" office:value-type="float" office:value="4530.19799577494" calcext:value-type="float">
            <text:p>4530,19799577494</text:p>
          </table:table-cell>
          <table:table-cell table:style-name="ce14" table:formula="of:=[.C127] / 10000" office:value-type="percentage" office:value="0.455019799577494" calcext:value-type="percentage">
            <text:p>45,50%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3-07-05" calcext:value-type="date">
            <text:p>5.07.2023</text:p>
          </table:table-cell>
          <table:table-cell table:formula="of:=([.D127] + ([.D127] * 0.0175))" office:value-type="float" office:value="4609.476460701" calcext:value-type="float">
            <text:p>4609,476460701</text:p>
          </table:table-cell>
          <table:table-cell table:formula="of:=[.C128]- (0.25 * 80) - IF(WEEKDAY([.B128]; 2) = 5; 60; 0)" office:value-type="float" office:value="4589.476460701" calcext:value-type="float">
            <text:p>4589,476460701</text:p>
          </table:table-cell>
          <table:table-cell table:style-name="ce14" table:formula="of:=[.C128] / 10000" office:value-type="percentage" office:value="0.4609476460701" calcext:value-type="percentage">
            <text:p>46,09%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3-07-06" calcext:value-type="date">
            <text:p>6.07.2023</text:p>
          </table:table-cell>
          <table:table-cell table:formula="of:=([.D128] + ([.D128] * 0.0175))" office:value-type="float" office:value="4669.79229876327" calcext:value-type="float">
            <text:p>4669,79229876327</text:p>
          </table:table-cell>
          <table:table-cell table:formula="of:=[.C129]- (0.25 * 80) - IF(WEEKDAY([.B129]; 2) = 5; 60; 0)" office:value-type="float" office:value="4649.79229876327" calcext:value-type="float">
            <text:p>4649,79229876327</text:p>
          </table:table-cell>
          <table:table-cell table:style-name="ce14" table:formula="of:=[.C129] / 10000" office:value-type="percentage" office:value="0.466979229876327" calcext:value-type="percentage">
            <text:p>46,70%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3-07-07" calcext:value-type="date">
            <text:p>7.07.2023</text:p>
          </table:table-cell>
          <table:table-cell table:formula="of:=([.D129] + ([.D129] * 0.0175))" office:value-type="float" office:value="4731.16366399163" calcext:value-type="float">
            <text:p>4731,16366399163</text:p>
          </table:table-cell>
          <table:table-cell table:formula="of:=[.C130]- (0.25 * 80) - IF(WEEKDAY([.B130]; 2) = 5; 60; 0)" office:value-type="float" office:value="4651.16366399163" calcext:value-type="float">
            <text:p>4651,16366399163</text:p>
          </table:table-cell>
          <table:table-cell table:style-name="ce14" table:formula="of:=[.C130] / 10000" office:value-type="percentage" office:value="0.473116366399163" calcext:value-type="percentage">
            <text:p>47,31%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3-07-08" calcext:value-type="date">
            <text:p>8.07.2023</text:p>
          </table:table-cell>
          <table:table-cell table:formula="of:=([.D130] + ([.D130] * 0.0175))" office:value-type="float" office:value="4732.55902811148" calcext:value-type="float">
            <text:p>4732,55902811148</text:p>
          </table:table-cell>
          <table:table-cell table:formula="of:=[.C131]- (0.25 * 80) - IF(WEEKDAY([.B131]; 2) = 5; 60; 0)" office:value-type="float" office:value="4712.55902811148" calcext:value-type="float">
            <text:p>4712,55902811148</text:p>
          </table:table-cell>
          <table:table-cell table:style-name="ce14" table:formula="of:=[.C131] / 10000" office:value-type="percentage" office:value="0.473255902811148" calcext:value-type="percentage">
            <text:p>47,33%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3-07-09" calcext:value-type="date">
            <text:p>9.07.2023</text:p>
          </table:table-cell>
          <table:table-cell table:formula="of:=([.D131] + ([.D131] * 0.0175))" office:value-type="float" office:value="4795.02881110343" calcext:value-type="float">
            <text:p>4795,02881110343</text:p>
          </table:table-cell>
          <table:table-cell table:formula="of:=[.C132]- (0.25 * 80) - IF(WEEKDAY([.B132]; 2) = 5; 60; 0)" office:value-type="float" office:value="4775.02881110343" calcext:value-type="float">
            <text:p>4775,02881110343</text:p>
          </table:table-cell>
          <table:table-cell table:style-name="ce14" table:formula="of:=[.C132] / 10000" office:value-type="percentage" office:value="0.479502881110343" calcext:value-type="percentage">
            <text:p>47,95%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3-07-10" calcext:value-type="date">
            <text:p>10.07.2023</text:p>
          </table:table-cell>
          <table:table-cell table:formula="of:=([.D132] + ([.D132] * 0.0175))" office:value-type="float" office:value="4858.59181529774" calcext:value-type="float">
            <text:p>4858,59181529774</text:p>
          </table:table-cell>
          <table:table-cell table:formula="of:=[.C133]- (0.25 * 80) - IF(WEEKDAY([.B133]; 2) = 5; 60; 0)" office:value-type="float" office:value="4838.59181529774" calcext:value-type="float">
            <text:p>4838,59181529774</text:p>
          </table:table-cell>
          <table:table-cell table:style-name="ce14" table:formula="of:=[.C133] / 10000" office:value-type="percentage" office:value="0.485859181529774" calcext:value-type="percentage">
            <text:p>48,59%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3-07-11" calcext:value-type="date">
            <text:p>11.07.2023</text:p>
          </table:table-cell>
          <table:table-cell table:formula="of:=([.D133] + ([.D133] * 0.0175))" office:value-type="float" office:value="4923.26717206545" calcext:value-type="float">
            <text:p>4923,26717206545</text:p>
          </table:table-cell>
          <table:table-cell table:formula="of:=[.C134]- (0.25 * 80) - IF(WEEKDAY([.B134]; 2) = 5; 60; 0)" office:value-type="float" office:value="4903.26717206545" calcext:value-type="float">
            <text:p>4903,26717206545</text:p>
          </table:table-cell>
          <table:table-cell table:style-name="ce14" table:formula="of:=[.C134] / 10000" office:value-type="percentage" office:value="0.492326717206545" calcext:value-type="percentage">
            <text:p>49,23%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3-07-12" calcext:value-type="date">
            <text:p>12.07.2023</text:p>
          </table:table-cell>
          <table:table-cell table:formula="of:=([.D134] + ([.D134] * 0.0175))" office:value-type="float" office:value="4989.0743475766" calcext:value-type="float">
            <text:p>4989,0743475766</text:p>
          </table:table-cell>
          <table:table-cell table:formula="of:=[.C135]- (0.25 * 80) - IF(WEEKDAY([.B135]; 2) = 5; 60; 0)" office:value-type="float" office:value="4969.0743475766" calcext:value-type="float">
            <text:p>4969,0743475766</text:p>
          </table:table-cell>
          <table:table-cell table:style-name="ce14" table:formula="of:=[.C135] / 10000" office:value-type="percentage" office:value="0.49890743475766" calcext:value-type="percentage">
            <text:p>49,89%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3-07-13" calcext:value-type="date">
            <text:p>13.07.2023</text:p>
          </table:table-cell>
          <table:table-cell table:formula="of:=([.D135] + ([.D135] * 0.0175))" office:value-type="float" office:value="5056.03314865919" calcext:value-type="float">
            <text:p>5056,03314865919</text:p>
          </table:table-cell>
          <table:table-cell table:formula="of:=[.C136]- (0.25 * 80) - IF(WEEKDAY([.B136]; 2) = 5; 60; 0)" office:value-type="float" office:value="5036.03314865919" calcext:value-type="float">
            <text:p>5036,03314865919</text:p>
          </table:table-cell>
          <table:table-cell table:style-name="ce14" table:formula="of:=[.C136] / 10000" office:value-type="percentage" office:value="0.505603314865919" calcext:value-type="percentage">
            <text:p>50,56%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3-07-14" calcext:value-type="date">
            <text:p>14.07.2023</text:p>
          </table:table-cell>
          <table:table-cell table:formula="of:=([.D136] + ([.D136] * 0.0175))" office:value-type="float" office:value="5124.16372876072" calcext:value-type="float">
            <text:p>5124,16372876072</text:p>
          </table:table-cell>
          <table:table-cell table:formula="of:=[.C137]- (0.25 * 80) - IF(WEEKDAY([.B137]; 2) = 5; 60; 0)" office:value-type="float" office:value="5044.16372876072" calcext:value-type="float">
            <text:p>5044,16372876072</text:p>
          </table:table-cell>
          <table:table-cell table:style-name="ce14" table:formula="of:=[.C137] / 10000" office:value-type="percentage" office:value="0.512416372876072" calcext:value-type="percentage">
            <text:p>51,24%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3-07-15" calcext:value-type="date">
            <text:p>15.07.2023</text:p>
          </table:table-cell>
          <table:table-cell table:formula="of:=([.D137] + ([.D137] * 0.0175))" office:value-type="float" office:value="5132.43659401403" calcext:value-type="float">
            <text:p>5132,43659401403</text:p>
          </table:table-cell>
          <table:table-cell table:formula="of:=[.C138]- (0.25 * 80) - IF(WEEKDAY([.B138]; 2) = 5; 60; 0)" office:value-type="float" office:value="5112.43659401403" calcext:value-type="float">
            <text:p>5112,43659401403</text:p>
          </table:table-cell>
          <table:table-cell table:style-name="ce14" table:formula="of:=[.C138] / 10000" office:value-type="percentage" office:value="0.513243659401403" calcext:value-type="percentage">
            <text:p>51,32%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3-07-16" calcext:value-type="date">
            <text:p>16.07.2023</text:p>
          </table:table-cell>
          <table:table-cell table:formula="of:=([.D138] + ([.D138] * 0.0175))" office:value-type="float" office:value="5201.90423440928" calcext:value-type="float">
            <text:p>5201,90423440928</text:p>
          </table:table-cell>
          <table:table-cell table:formula="of:=[.C139]- (0.25 * 80) - IF(WEEKDAY([.B139]; 2) = 5; 60; 0)" office:value-type="float" office:value="5181.90423440928" calcext:value-type="float">
            <text:p>5181,90423440928</text:p>
          </table:table-cell>
          <table:table-cell table:style-name="ce14" table:formula="of:=[.C139] / 10000" office:value-type="percentage" office:value="0.520190423440928" calcext:value-type="percentage">
            <text:p>52,02%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3-07-17" calcext:value-type="date">
            <text:p>17.07.2023</text:p>
          </table:table-cell>
          <table:table-cell table:formula="of:=([.D139] + ([.D139] * 0.0175))" office:value-type="float" office:value="5272.58755851144" calcext:value-type="float">
            <text:p>5272,58755851144</text:p>
          </table:table-cell>
          <table:table-cell table:formula="of:=[.C140]- (0.25 * 80) - IF(WEEKDAY([.B140]; 2) = 5; 60; 0)" office:value-type="float" office:value="5252.58755851144" calcext:value-type="float">
            <text:p>5252,58755851144</text:p>
          </table:table-cell>
          <table:table-cell table:style-name="ce14" table:formula="of:=[.C140] / 10000" office:value-type="percentage" office:value="0.527258755851144" calcext:value-type="percentage">
            <text:p>52,73%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3-07-18" calcext:value-type="date">
            <text:p>18.07.2023</text:p>
          </table:table-cell>
          <table:table-cell table:formula="of:=([.D140] + ([.D140] * 0.0175))" office:value-type="float" office:value="5344.50784078539" calcext:value-type="float">
            <text:p>5344,50784078539</text:p>
          </table:table-cell>
          <table:table-cell table:formula="of:=[.C141]- (0.25 * 80) - IF(WEEKDAY([.B141]; 2) = 5; 60; 0)" office:value-type="float" office:value="5324.50784078539" calcext:value-type="float">
            <text:p>5324,50784078539</text:p>
          </table:table-cell>
          <table:table-cell table:style-name="ce14" table:formula="of:=[.C141] / 10000" office:value-type="percentage" office:value="0.534450784078539" calcext:value-type="percentage">
            <text:p>53,45%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3-07-19" calcext:value-type="date">
            <text:p>19.07.2023</text:p>
          </table:table-cell>
          <table:table-cell table:formula="of:=([.D141] + ([.D141] * 0.0175))" office:value-type="float" office:value="5417.68672799914" calcext:value-type="float">
            <text:p>5417,68672799914</text:p>
          </table:table-cell>
          <table:table-cell table:formula="of:=[.C142]- (0.25 * 80) - IF(WEEKDAY([.B142]; 2) = 5; 60; 0)" office:value-type="float" office:value="5397.68672799914" calcext:value-type="float">
            <text:p>5397,68672799914</text:p>
          </table:table-cell>
          <table:table-cell table:style-name="ce14" table:formula="of:=[.C142] / 10000" office:value-type="percentage" office:value="0.541768672799914" calcext:value-type="percentage">
            <text:p>54,18%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3-07-20" calcext:value-type="date">
            <text:p>20.07.2023</text:p>
          </table:table-cell>
          <table:table-cell table:formula="of:=([.D142] + ([.D142] * 0.0175))" office:value-type="float" office:value="5492.14624573912" calcext:value-type="float">
            <text:p>5492,14624573912</text:p>
          </table:table-cell>
          <table:table-cell table:formula="of:=[.C143]- (0.25 * 80) - IF(WEEKDAY([.B143]; 2) = 5; 60; 0)" office:value-type="float" office:value="5472.14624573912" calcext:value-type="float">
            <text:p>5472,14624573912</text:p>
          </table:table-cell>
          <table:table-cell table:style-name="ce14" table:formula="of:=[.C143] / 10000" office:value-type="percentage" office:value="0.549214624573912" calcext:value-type="percentage">
            <text:p>54,92%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3-07-21" calcext:value-type="date">
            <text:p>21.07.2023</text:p>
          </table:table-cell>
          <table:table-cell table:formula="of:=([.D143] + ([.D143] * 0.0175))" office:value-type="float" office:value="5567.90880503956" calcext:value-type="float">
            <text:p>5567,90880503956</text:p>
          </table:table-cell>
          <table:table-cell table:formula="of:=[.C144]- (0.25 * 80) - IF(WEEKDAY([.B144]; 2) = 5; 60; 0)" office:value-type="float" office:value="5487.90880503956" calcext:value-type="float">
            <text:p>5487,90880503956</text:p>
          </table:table-cell>
          <table:table-cell table:style-name="ce14" table:formula="of:=[.C144] / 10000" office:value-type="percentage" office:value="0.556790880503956" calcext:value-type="percentage">
            <text:p>55,68%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3-07-22" calcext:value-type="date">
            <text:p>22.07.2023</text:p>
          </table:table-cell>
          <table:table-cell table:formula="of:=([.D144] + ([.D144] * 0.0175))" office:value-type="float" office:value="5583.94720912775" calcext:value-type="float">
            <text:p>5583,94720912775</text:p>
          </table:table-cell>
          <table:table-cell table:formula="of:=[.C145]- (0.25 * 80) - IF(WEEKDAY([.B145]; 2) = 5; 60; 0)" office:value-type="float" office:value="5563.94720912775" calcext:value-type="float">
            <text:p>5563,94720912775</text:p>
          </table:table-cell>
          <table:table-cell table:style-name="ce14" table:formula="of:=[.C145] / 10000" office:value-type="percentage" office:value="0.558394720912775" calcext:value-type="percentage">
            <text:p>55,84%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3-07-23" calcext:value-type="date">
            <text:p>23.07.2023</text:p>
          </table:table-cell>
          <table:table-cell table:formula="of:=([.D145] + ([.D145] * 0.0175))" office:value-type="float" office:value="5661.31628528748" calcext:value-type="float">
            <text:p>5661,31628528748</text:p>
          </table:table-cell>
          <table:table-cell table:formula="of:=[.C146]- (0.25 * 80) - IF(WEEKDAY([.B146]; 2) = 5; 60; 0)" office:value-type="float" office:value="5641.31628528748" calcext:value-type="float">
            <text:p>5641,31628528748</text:p>
          </table:table-cell>
          <table:table-cell table:style-name="ce14" table:formula="of:=[.C146] / 10000" office:value-type="percentage" office:value="0.566131628528748" calcext:value-type="percentage">
            <text:p>56,61%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3-07-24" calcext:value-type="date">
            <text:p>24.07.2023</text:p>
          </table:table-cell>
          <table:table-cell table:formula="of:=([.D146] + ([.D146] * 0.0175))" office:value-type="float" office:value="5740.03932028001" calcext:value-type="float">
            <text:p>5740,03932028001</text:p>
          </table:table-cell>
          <table:table-cell table:formula="of:=[.C147]- (0.25 * 80) - IF(WEEKDAY([.B147]; 2) = 5; 60; 0)" office:value-type="float" office:value="5720.03932028001" calcext:value-type="float">
            <text:p>5720,03932028001</text:p>
          </table:table-cell>
          <table:table-cell table:style-name="ce14" table:formula="of:=[.C147] / 10000" office:value-type="percentage" office:value="0.574003932028001" calcext:value-type="percentage">
            <text:p>57,40%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3-07-25" calcext:value-type="date">
            <text:p>25.07.2023</text:p>
          </table:table-cell>
          <table:table-cell table:formula="of:=([.D147] + ([.D147] * 0.0175))" office:value-type="float" office:value="5820.14000838491" calcext:value-type="float">
            <text:p>5820,14000838491</text:p>
          </table:table-cell>
          <table:table-cell table:formula="of:=[.C148]- (0.25 * 80) - IF(WEEKDAY([.B148]; 2) = 5; 60; 0)" office:value-type="float" office:value="5800.14000838491" calcext:value-type="float">
            <text:p>5800,14000838491</text:p>
          </table:table-cell>
          <table:table-cell table:style-name="ce14" table:formula="of:=[.C148] / 10000" office:value-type="percentage" office:value="0.582014000838491" calcext:value-type="percentage">
            <text:p>58,20%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3-07-26" calcext:value-type="date">
            <text:p>26.07.2023</text:p>
          </table:table-cell>
          <table:table-cell table:formula="of:=([.D148] + ([.D148] * 0.0175))" office:value-type="float" office:value="5901.64245853165" calcext:value-type="float">
            <text:p>5901,64245853165</text:p>
          </table:table-cell>
          <table:table-cell table:formula="of:=[.C149]- (0.25 * 80) - IF(WEEKDAY([.B149]; 2) = 5; 60; 0)" office:value-type="float" office:value="5881.64245853165" calcext:value-type="float">
            <text:p>5881,64245853165</text:p>
          </table:table-cell>
          <table:table-cell table:style-name="ce14" table:formula="of:=[.C149] / 10000" office:value-type="percentage" office:value="0.590164245853165" calcext:value-type="percentage">
            <text:p>59,02%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3-07-27" calcext:value-type="date">
            <text:p>27.07.2023</text:p>
          </table:table-cell>
          <table:table-cell table:formula="of:=([.D149] + ([.D149] * 0.0175))" office:value-type="float" office:value="5984.57120155595" calcext:value-type="float">
            <text:p>5984,57120155595</text:p>
          </table:table-cell>
          <table:table-cell table:formula="of:=[.C150]- (0.25 * 80) - IF(WEEKDAY([.B150]; 2) = 5; 60; 0)" office:value-type="float" office:value="5964.57120155595" calcext:value-type="float">
            <text:p>5964,57120155595</text:p>
          </table:table-cell>
          <table:table-cell table:style-name="ce14" table:formula="of:=[.C150] / 10000" office:value-type="percentage" office:value="0.598457120155595" calcext:value-type="percentage">
            <text:p>59,85%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3-07-28" calcext:value-type="date">
            <text:p>28.07.2023</text:p>
          </table:table-cell>
          <table:table-cell table:formula="of:=([.D150] + ([.D150] * 0.0175))" office:value-type="float" office:value="6068.95119758318" calcext:value-type="float">
            <text:p>6068,95119758318</text:p>
          </table:table-cell>
          <table:table-cell table:formula="of:=[.C151]- (0.25 * 80) - IF(WEEKDAY([.B151]; 2) = 5; 60; 0)" office:value-type="float" office:value="5988.95119758318" calcext:value-type="float">
            <text:p>5988,95119758318</text:p>
          </table:table-cell>
          <table:table-cell table:style-name="ce14" table:formula="of:=[.C151] / 10000" office:value-type="percentage" office:value="0.606895119758318" calcext:value-type="percentage">
            <text:p>60,69%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3-07-29" calcext:value-type="date">
            <text:p>29.07.2023</text:p>
          </table:table-cell>
          <table:table-cell table:formula="of:=([.D151] + ([.D151] * 0.0175))" office:value-type="float" office:value="6093.75784354089" calcext:value-type="float">
            <text:p>6093,75784354089</text:p>
          </table:table-cell>
          <table:table-cell table:formula="of:=[.C152]- (0.25 * 80) - IF(WEEKDAY([.B152]; 2) = 5; 60; 0)" office:value-type="float" office:value="6073.75784354089" calcext:value-type="float">
            <text:p>6073,75784354089</text:p>
          </table:table-cell>
          <table:table-cell table:style-name="ce14" table:formula="of:=[.C152] / 10000" office:value-type="percentage" office:value="0.609375784354089" calcext:value-type="percentage">
            <text:p>60,94%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3-07-30" calcext:value-type="date">
            <text:p>30.07.2023</text:p>
          </table:table-cell>
          <table:table-cell table:formula="of:=([.D152] + ([.D152] * 0.0175))" office:value-type="float" office:value="6180.04860580286" calcext:value-type="float">
            <text:p>6180,04860580286</text:p>
          </table:table-cell>
          <table:table-cell table:formula="of:=[.C153]- (0.25 * 80) - IF(WEEKDAY([.B153]; 2) = 5; 60; 0)" office:value-type="float" office:value="6160.04860580286" calcext:value-type="float">
            <text:p>6160,04860580286</text:p>
          </table:table-cell>
          <table:table-cell table:style-name="ce14" table:formula="of:=[.C153] / 10000" office:value-type="percentage" office:value="0.618004860580286" calcext:value-type="percentage">
            <text:p>61,80%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3-07-31" calcext:value-type="date">
            <text:p>31.07.2023</text:p>
          </table:table-cell>
          <table:table-cell table:formula="of:=([.D153] + ([.D153] * 0.0175))" office:value-type="float" office:value="6267.84945640441" calcext:value-type="float">
            <text:p>6267,84945640441</text:p>
          </table:table-cell>
          <table:table-cell table:formula="of:=[.C154]- (0.25 * 80) - IF(WEEKDAY([.B154]; 2) = 5; 60; 0)" office:value-type="float" office:value="6247.84945640441" calcext:value-type="float">
            <text:p>6247,84945640441</text:p>
          </table:table-cell>
          <table:table-cell table:style-name="ce14" table:formula="of:=[.C154] / 10000" office:value-type="percentage" office:value="0.626784945640441" calcext:value-type="percentage">
            <text:p>62,68%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3-08-01" calcext:value-type="date">
            <text:p>1.08.2023</text:p>
          </table:table-cell>
          <table:table-cell table:formula="of:=([.D154] + ([.D154] * 0.0175))" office:value-type="float" office:value="6357.18682189148" calcext:value-type="float">
            <text:p>6357,18682189148</text:p>
          </table:table-cell>
          <table:table-cell table:formula="of:=[.C155]- (0.25 * 80) - IF(WEEKDAY([.B155]; 2) = 5; 60; 0)" office:value-type="float" office:value="6337.18682189148" calcext:value-type="float">
            <text:p>6337,18682189148</text:p>
          </table:table-cell>
          <table:table-cell table:style-name="ce14" table:formula="of:=[.C155] / 10000" office:value-type="percentage" office:value="0.635718682189148" calcext:value-type="percentage">
            <text:p>63,57%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3-08-02" calcext:value-type="date">
            <text:p>2.08.2023</text:p>
          </table:table-cell>
          <table:table-cell table:formula="of:=([.D155] + ([.D155] * 0.0175))" office:value-type="float" office:value="6448.08759127458" calcext:value-type="float">
            <text:p>6448,08759127458</text:p>
          </table:table-cell>
          <table:table-cell table:formula="of:=[.C156]- (0.25 * 80) - IF(WEEKDAY([.B156]; 2) = 5; 60; 0)" office:value-type="float" office:value="6428.08759127458" calcext:value-type="float">
            <text:p>6428,08759127458</text:p>
          </table:table-cell>
          <table:table-cell table:style-name="ce14" table:formula="of:=[.C156] / 10000" office:value-type="percentage" office:value="0.644808759127458" calcext:value-type="percentage">
            <text:p>64,48%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3-08-03" calcext:value-type="date">
            <text:p>3.08.2023</text:p>
          </table:table-cell>
          <table:table-cell table:formula="of:=([.D156] + ([.D156] * 0.0175))" office:value-type="float" office:value="6540.57912412189" calcext:value-type="float">
            <text:p>6540,57912412189</text:p>
          </table:table-cell>
          <table:table-cell table:formula="of:=[.C157]- (0.25 * 80) - IF(WEEKDAY([.B157]; 2) = 5; 60; 0)" office:value-type="float" office:value="6520.57912412189" calcext:value-type="float">
            <text:p>6520,57912412189</text:p>
          </table:table-cell>
          <table:table-cell table:style-name="ce14" table:formula="of:=[.C157] / 10000" office:value-type="percentage" office:value="0.654057912412189" calcext:value-type="percentage">
            <text:p>65,41%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3-08-04" calcext:value-type="date">
            <text:p>4.08.2023</text:p>
          </table:table-cell>
          <table:table-cell table:formula="of:=([.D157] + ([.D157] * 0.0175))" office:value-type="float" office:value="6634.68925879402" calcext:value-type="float">
            <text:p>6634,68925879402</text:p>
          </table:table-cell>
          <table:table-cell table:formula="of:=[.C158]- (0.25 * 80) - IF(WEEKDAY([.B158]; 2) = 5; 60; 0)" office:value-type="float" office:value="6554.68925879402" calcext:value-type="float">
            <text:p>6554,68925879402</text:p>
          </table:table-cell>
          <table:table-cell table:style-name="ce14" table:formula="of:=[.C158] / 10000" office:value-type="percentage" office:value="0.663468925879402" calcext:value-type="percentage">
            <text:p>66,35%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3-08-05" calcext:value-type="date">
            <text:p>5.08.2023</text:p>
          </table:table-cell>
          <table:table-cell table:formula="of:=([.D158] + ([.D158] * 0.0175))" office:value-type="float" office:value="6669.39632082292" calcext:value-type="float">
            <text:p>6669,39632082292</text:p>
          </table:table-cell>
          <table:table-cell table:formula="of:=[.C159]- (0.25 * 80) - IF(WEEKDAY([.B159]; 2) = 5; 60; 0)" office:value-type="float" office:value="6649.39632082292" calcext:value-type="float">
            <text:p>6649,39632082292</text:p>
          </table:table-cell>
          <table:table-cell table:style-name="ce14" table:formula="of:=[.C159] / 10000" office:value-type="percentage" office:value="0.666939632082292" calcext:value-type="percentage">
            <text:p>66,69%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3-08-06" calcext:value-type="date">
            <text:p>6.08.2023</text:p>
          </table:table-cell>
          <table:table-cell table:formula="of:=([.D159] + ([.D159] * 0.0175))" office:value-type="float" office:value="6765.76075643732" calcext:value-type="float">
            <text:p>6765,76075643732</text:p>
          </table:table-cell>
          <table:table-cell table:formula="of:=[.C160]- (0.25 * 80) - IF(WEEKDAY([.B160]; 2) = 5; 60; 0)" office:value-type="float" office:value="6745.76075643732" calcext:value-type="float">
            <text:p>6745,76075643732</text:p>
          </table:table-cell>
          <table:table-cell table:style-name="ce14" table:formula="of:=[.C160] / 10000" office:value-type="percentage" office:value="0.676576075643732" calcext:value-type="percentage">
            <text:p>67,66%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3-08-07" calcext:value-type="date">
            <text:p>7.08.2023</text:p>
          </table:table-cell>
          <table:table-cell table:formula="of:=([.D160] + ([.D160] * 0.0175))" office:value-type="float" office:value="6863.81156967497" calcext:value-type="float">
            <text:p>6863,81156967497</text:p>
          </table:table-cell>
          <table:table-cell table:formula="of:=[.C161]- (0.25 * 80) - IF(WEEKDAY([.B161]; 2) = 5; 60; 0)" office:value-type="float" office:value="6843.81156967497" calcext:value-type="float">
            <text:p>6843,81156967497</text:p>
          </table:table-cell>
          <table:table-cell table:style-name="ce14" table:formula="of:=[.C161] / 10000" office:value-type="percentage" office:value="0.686381156967497" calcext:value-type="percentage">
            <text:p>68,64%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3-08-08" calcext:value-type="date">
            <text:p>8.08.2023</text:p>
          </table:table-cell>
          <table:table-cell table:formula="of:=([.D161] + ([.D161] * 0.0175))" office:value-type="float" office:value="6963.57827214428" calcext:value-type="float">
            <text:p>6963,57827214428</text:p>
          </table:table-cell>
          <table:table-cell table:formula="of:=[.C162]- (0.25 * 80) - IF(WEEKDAY([.B162]; 2) = 5; 60; 0)" office:value-type="float" office:value="6943.57827214428" calcext:value-type="float">
            <text:p>6943,57827214428</text:p>
          </table:table-cell>
          <table:table-cell table:style-name="ce14" table:formula="of:=[.C162] / 10000" office:value-type="percentage" office:value="0.696357827214428" calcext:value-type="percentage">
            <text:p>69,64%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3-08-09" calcext:value-type="date">
            <text:p>9.08.2023</text:p>
          </table:table-cell>
          <table:table-cell table:formula="of:=([.D162] + ([.D162] * 0.0175))" office:value-type="float" office:value="7065.09089190681" calcext:value-type="float">
            <text:p>7065,09089190681</text:p>
          </table:table-cell>
          <table:table-cell table:formula="of:=[.C163]- (0.25 * 80) - IF(WEEKDAY([.B163]; 2) = 5; 60; 0)" office:value-type="float" office:value="7045.09089190681" calcext:value-type="float">
            <text:p>7045,09089190681</text:p>
          </table:table-cell>
          <table:table-cell table:style-name="ce14" table:formula="of:=[.C163] / 10000" office:value-type="percentage" office:value="0.706509089190681" calcext:value-type="percentage">
            <text:p>70,65%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3-08-10" calcext:value-type="date">
            <text:p>10.08.2023</text:p>
          </table:table-cell>
          <table:table-cell table:formula="of:=([.D163] + ([.D163] * 0.0175))" office:value-type="float" office:value="7168.37998251518" calcext:value-type="float">
            <text:p>7168,37998251518</text:p>
          </table:table-cell>
          <table:table-cell table:formula="of:=[.C164]- (0.25 * 80) - IF(WEEKDAY([.B164]; 2) = 5; 60; 0)" office:value-type="float" office:value="7148.37998251518" calcext:value-type="float">
            <text:p>7148,37998251518</text:p>
          </table:table-cell>
          <table:table-cell table:style-name="ce14" table:formula="of:=[.C164] / 10000" office:value-type="percentage" office:value="0.716837998251518" calcext:value-type="percentage">
            <text:p>71,68%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3-08-11" calcext:value-type="date">
            <text:p>11.08.2023</text:p>
          </table:table-cell>
          <table:table-cell table:formula="of:=([.D164] + ([.D164] * 0.0175))" office:value-type="float" office:value="7273.47663220919" calcext:value-type="float">
            <text:p>7273,47663220919</text:p>
          </table:table-cell>
          <table:table-cell table:formula="of:=[.C165]- (0.25 * 80) - IF(WEEKDAY([.B165]; 2) = 5; 60; 0)" office:value-type="float" office:value="7193.47663220919" calcext:value-type="float">
            <text:p>7193,47663220919</text:p>
          </table:table-cell>
          <table:table-cell table:style-name="ce14" table:formula="of:=[.C165] / 10000" office:value-type="percentage" office:value="0.727347663220919" calcext:value-type="percentage">
            <text:p>72,73%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3-08-12" calcext:value-type="date">
            <text:p>12.08.2023</text:p>
          </table:table-cell>
          <table:table-cell table:formula="of:=([.D165] + ([.D165] * 0.0175))" office:value-type="float" office:value="7319.36247327286" calcext:value-type="float">
            <text:p>7319,36247327286</text:p>
          </table:table-cell>
          <table:table-cell table:formula="of:=[.C166]- (0.25 * 80) - IF(WEEKDAY([.B166]; 2) = 5; 60; 0)" office:value-type="float" office:value="7299.36247327286" calcext:value-type="float">
            <text:p>7299,36247327286</text:p>
          </table:table-cell>
          <table:table-cell table:style-name="ce14" table:formula="of:=[.C166] / 10000" office:value-type="percentage" office:value="0.731936247327286" calcext:value-type="percentage">
            <text:p>73,19%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3-08-13" calcext:value-type="date">
            <text:p>13.08.2023</text:p>
          </table:table-cell>
          <table:table-cell table:formula="of:=([.D166] + ([.D166] * 0.0175))" office:value-type="float" office:value="7427.10131655513" calcext:value-type="float">
            <text:p>7427,10131655513</text:p>
          </table:table-cell>
          <table:table-cell table:formula="of:=[.C167]- (0.25 * 80) - IF(WEEKDAY([.B167]; 2) = 5; 60; 0)" office:value-type="float" office:value="7407.10131655513" calcext:value-type="float">
            <text:p>7407,10131655513</text:p>
          </table:table-cell>
          <table:table-cell table:style-name="ce14" table:formula="of:=[.C167] / 10000" office:value-type="percentage" office:value="0.742710131655513" calcext:value-type="percentage">
            <text:p>74,27%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3-08-14" calcext:value-type="date">
            <text:p>14.08.2023</text:p>
          </table:table-cell>
          <table:table-cell table:formula="of:=([.D167] + ([.D167] * 0.0175))" office:value-type="float" office:value="7536.72558959485" calcext:value-type="float">
            <text:p>7536,72558959485</text:p>
          </table:table-cell>
          <table:table-cell table:formula="of:=[.C168]- (0.25 * 80) - IF(WEEKDAY([.B168]; 2) = 5; 60; 0)" office:value-type="float" office:value="7516.72558959485" calcext:value-type="float">
            <text:p>7516,72558959485</text:p>
          </table:table-cell>
          <table:table-cell table:style-name="ce14" table:formula="of:=[.C168] / 10000" office:value-type="percentage" office:value="0.753672558959485" calcext:value-type="percentage">
            <text:p>75,37%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3-08-15" calcext:value-type="date">
            <text:p>15.08.2023</text:p>
          </table:table-cell>
          <table:table-cell table:formula="of:=([.D168] + ([.D168] * 0.0175))" office:value-type="float" office:value="7648.26828741275" calcext:value-type="float">
            <text:p>7648,26828741275</text:p>
          </table:table-cell>
          <table:table-cell table:formula="of:=[.C169]- (0.25 * 80) - IF(WEEKDAY([.B169]; 2) = 5; 60; 0)" office:value-type="float" office:value="7628.26828741275" calcext:value-type="float">
            <text:p>7628,26828741275</text:p>
          </table:table-cell>
          <table:table-cell table:style-name="ce14" table:formula="of:=[.C169] / 10000" office:value-type="percentage" office:value="0.764826828741275" calcext:value-type="percentage">
            <text:p>76,48%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3-08-16" calcext:value-type="date">
            <text:p>16.08.2023</text:p>
          </table:table-cell>
          <table:table-cell table:formula="of:=([.D169] + ([.D169] * 0.0175))" office:value-type="float" office:value="7761.76298244248" calcext:value-type="float">
            <text:p>7761,76298244248</text:p>
          </table:table-cell>
          <table:table-cell table:formula="of:=[.C170]- (0.25 * 80) - IF(WEEKDAY([.B170]; 2) = 5; 60; 0)" office:value-type="float" office:value="7741.76298244248" calcext:value-type="float">
            <text:p>7741,76298244248</text:p>
          </table:table-cell>
          <table:table-cell table:style-name="ce14" table:formula="of:=[.C170] / 10000" office:value-type="percentage" office:value="0.776176298244248" calcext:value-type="percentage">
            <text:p>77,62%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3-08-17" calcext:value-type="date">
            <text:p>17.08.2023</text:p>
          </table:table-cell>
          <table:table-cell table:formula="of:=([.D170] + ([.D170] * 0.0175))" office:value-type="float" office:value="7877.24383463522" calcext:value-type="float">
            <text:p>7877,24383463522</text:p>
          </table:table-cell>
          <table:table-cell table:formula="of:=[.C171]- (0.25 * 80) - IF(WEEKDAY([.B171]; 2) = 5; 60; 0)" office:value-type="float" office:value="7857.24383463522" calcext:value-type="float">
            <text:p>7857,24383463522</text:p>
          </table:table-cell>
          <table:table-cell table:style-name="ce14" table:formula="of:=[.C171] / 10000" office:value-type="percentage" office:value="0.787724383463522" calcext:value-type="percentage">
            <text:p>78,77%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3-08-18" calcext:value-type="date">
            <text:p>18.08.2023</text:p>
          </table:table-cell>
          <table:table-cell table:formula="of:=([.D171] + ([.D171] * 0.0175))" office:value-type="float" office:value="7994.74560174134" calcext:value-type="float">
            <text:p>7994,74560174134</text:p>
          </table:table-cell>
          <table:table-cell table:formula="of:=[.C172]- (0.25 * 80) - IF(WEEKDAY([.B172]; 2) = 5; 60; 0)" office:value-type="float" office:value="7914.74560174134" calcext:value-type="float">
            <text:p>7914,74560174134</text:p>
          </table:table-cell>
          <table:table-cell table:style-name="ce14" table:formula="of:=[.C172] / 10000" office:value-type="percentage" office:value="0.799474560174134" calcext:value-type="percentage">
            <text:p>79,95%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3-08-19" calcext:value-type="date">
            <text:p>19.08.2023</text:p>
          </table:table-cell>
          <table:table-cell table:formula="of:=([.D172] + ([.D172] * 0.0175))" office:value-type="float" office:value="8053.25364977181" calcext:value-type="float">
            <text:p>8053,25364977181</text:p>
          </table:table-cell>
          <table:table-cell table:formula="of:=[.C173]- (0.25 * 80) - IF(WEEKDAY([.B173]; 2) = 5; 60; 0)" office:value-type="float" office:value="8033.25364977181" calcext:value-type="float">
            <text:p>8033,25364977181</text:p>
          </table:table-cell>
          <table:table-cell table:style-name="ce14" table:formula="of:=[.C173] / 10000" office:value-type="percentage" office:value="0.805325364977181" calcext:value-type="percentage">
            <text:p>80,53%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3-08-20" calcext:value-type="date">
            <text:p>20.08.2023</text:p>
          </table:table-cell>
          <table:table-cell table:formula="of:=([.D173] + ([.D173] * 0.0175))" office:value-type="float" office:value="8173.83558864282" calcext:value-type="float">
            <text:p>8173,83558864282</text:p>
          </table:table-cell>
          <table:table-cell table:formula="of:=[.C174]- (0.25 * 80) - IF(WEEKDAY([.B174]; 2) = 5; 60; 0)" office:value-type="float" office:value="8153.83558864282" calcext:value-type="float">
            <text:p>8153,83558864282</text:p>
          </table:table-cell>
          <table:table-cell table:style-name="ce14" table:formula="of:=[.C174] / 10000" office:value-type="percentage" office:value="0.817383558864282" calcext:value-type="percentage">
            <text:p>81,74%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3-08-21" calcext:value-type="date">
            <text:p>21.08.2023</text:p>
          </table:table-cell>
          <table:table-cell table:formula="of:=([.D174] + ([.D174] * 0.0175))" office:value-type="float" office:value="8296.52771144407" calcext:value-type="float">
            <text:p>8296,52771144407</text:p>
          </table:table-cell>
          <table:table-cell table:formula="of:=[.C175]- (0.25 * 80) - IF(WEEKDAY([.B175]; 2) = 5; 60; 0)" office:value-type="float" office:value="8276.52771144407" calcext:value-type="float">
            <text:p>8276,52771144407</text:p>
          </table:table-cell>
          <table:table-cell table:style-name="ce14" table:formula="of:=[.C175] / 10000" office:value-type="percentage" office:value="0.829652771144407" calcext:value-type="percentage">
            <text:p>82,97%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3-08-22" calcext:value-type="date">
            <text:p>22.08.2023</text:p>
          </table:table-cell>
          <table:table-cell table:formula="of:=([.D175] + ([.D175] * 0.0175))" office:value-type="float" office:value="8421.36694639434" calcext:value-type="float">
            <text:p>8421,36694639434</text:p>
          </table:table-cell>
          <table:table-cell table:formula="of:=[.C176]- (0.25 * 80) - IF(WEEKDAY([.B176]; 2) = 5; 60; 0)" office:value-type="float" office:value="8401.36694639434" calcext:value-type="float">
            <text:p>8401,36694639434</text:p>
          </table:table-cell>
          <table:table-cell table:style-name="ce14" table:formula="of:=[.C176] / 10000" office:value-type="percentage" office:value="0.842136694639434" calcext:value-type="percentage">
            <text:p>84,21%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3-08-23" calcext:value-type="date">
            <text:p>23.08.2023</text:p>
          </table:table-cell>
          <table:table-cell table:formula="of:=([.D176] + ([.D176] * 0.0175))" office:value-type="float" office:value="8548.39086795624" calcext:value-type="float">
            <text:p>8548,39086795624</text:p>
          </table:table-cell>
          <table:table-cell table:formula="of:=[.C177]- (0.25 * 80) - IF(WEEKDAY([.B177]; 2) = 5; 60; 0)" office:value-type="float" office:value="8528.39086795624" calcext:value-type="float">
            <text:p>8528,39086795624</text:p>
          </table:table-cell>
          <table:table-cell table:style-name="ce14" table:formula="of:=[.C177] / 10000" office:value-type="percentage" office:value="0.854839086795624" calcext:value-type="percentage">
            <text:p>85,48%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3-08-24" calcext:value-type="date">
            <text:p>24.08.2023</text:p>
          </table:table-cell>
          <table:table-cell table:formula="of:=([.D177] + ([.D177] * 0.0175))" office:value-type="float" office:value="8677.63770814547" calcext:value-type="float">
            <text:p>8677,63770814547</text:p>
          </table:table-cell>
          <table:table-cell table:formula="of:=[.C178]- (0.25 * 80) - IF(WEEKDAY([.B178]; 2) = 5; 60; 0)" office:value-type="float" office:value="8657.63770814547" calcext:value-type="float">
            <text:p>8657,63770814547</text:p>
          </table:table-cell>
          <table:table-cell table:style-name="ce14" table:formula="of:=[.C178] / 10000" office:value-type="percentage" office:value="0.867763770814547" calcext:value-type="percentage">
            <text:p>86,78%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3-08-25" calcext:value-type="date">
            <text:p>25.08.2023</text:p>
          </table:table-cell>
          <table:table-cell table:formula="of:=([.D178] + ([.D178] * 0.0175))" office:value-type="float" office:value="8809.14636803802" calcext:value-type="float">
            <text:p>8809,14636803802</text:p>
          </table:table-cell>
          <table:table-cell table:formula="of:=[.C179]- (0.25 * 80) - IF(WEEKDAY([.B179]; 2) = 5; 60; 0)" office:value-type="float" office:value="8729.14636803802" calcext:value-type="float">
            <text:p>8729,14636803802</text:p>
          </table:table-cell>
          <table:table-cell table:style-name="ce14" table:formula="of:=[.C179] / 10000" office:value-type="percentage" office:value="0.880914636803802" calcext:value-type="percentage">
            <text:p>88,09%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3-08-26" calcext:value-type="date">
            <text:p>26.08.2023</text:p>
          </table:table-cell>
          <table:table-cell table:formula="of:=([.D179] + ([.D179] * 0.0175))" office:value-type="float" office:value="8881.90642947869" calcext:value-type="float">
            <text:p>8881,90642947869</text:p>
          </table:table-cell>
          <table:table-cell table:formula="of:=[.C180]- (0.25 * 80) - IF(WEEKDAY([.B180]; 2) = 5; 60; 0)" office:value-type="float" office:value="8861.90642947869" calcext:value-type="float">
            <text:p>8861,90642947869</text:p>
          </table:table-cell>
          <table:table-cell table:style-name="ce14" table:formula="of:=[.C180] / 10000" office:value-type="percentage" office:value="0.888190642947869" calcext:value-type="percentage">
            <text:p>88,82%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3-08-27" calcext:value-type="date">
            <text:p>27.08.2023</text:p>
          </table:table-cell>
          <table:table-cell table:formula="of:=([.D180] + ([.D180] * 0.0175))" office:value-type="float" office:value="9016.98979199456" calcext:value-type="float">
            <text:p>9016,98979199456</text:p>
          </table:table-cell>
          <table:table-cell table:formula="of:=[.C181]- (0.25 * 80) - IF(WEEKDAY([.B181]; 2) = 5; 60; 0)" office:value-type="float" office:value="8996.98979199456" calcext:value-type="float">
            <text:p>8996,98979199456</text:p>
          </table:table-cell>
          <table:table-cell table:style-name="ce14" table:formula="of:=[.C181] / 10000" office:value-type="percentage" office:value="0.901698979199456" calcext:value-type="percentage">
            <text:p>90,17%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3-08-28" calcext:value-type="date">
            <text:p>28.08.2023</text:p>
          </table:table-cell>
          <table:table-cell table:formula="of:=([.D181] + ([.D181] * 0.0175))" office:value-type="float" office:value="9154.43711335447" calcext:value-type="float">
            <text:p>9154,43711335447</text:p>
          </table:table-cell>
          <table:table-cell table:formula="of:=[.C182]- (0.25 * 80) - IF(WEEKDAY([.B182]; 2) = 5; 60; 0)" office:value-type="float" office:value="9134.43711335447" calcext:value-type="float">
            <text:p>9134,43711335447</text:p>
          </table:table-cell>
          <table:table-cell table:style-name="ce14" table:formula="of:=[.C182] / 10000" office:value-type="percentage" office:value="0.915443711335447" calcext:value-type="percentage">
            <text:p>91,54%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3-08-29" calcext:value-type="date">
            <text:p>29.08.2023</text:p>
          </table:table-cell>
          <table:table-cell table:formula="of:=([.D182] + ([.D182] * 0.0175))" office:value-type="float" office:value="9294.28976283817" calcext:value-type="float">
            <text:p>9294,28976283817</text:p>
          </table:table-cell>
          <table:table-cell table:formula="of:=[.C183]- (0.25 * 80) - IF(WEEKDAY([.B183]; 2) = 5; 60; 0)" office:value-type="float" office:value="9274.28976283817" calcext:value-type="float">
            <text:p>9274,28976283817</text:p>
          </table:table-cell>
          <table:table-cell table:style-name="ce14" table:formula="of:=[.C183] / 10000" office:value-type="percentage" office:value="0.929428976283817" calcext:value-type="percentage">
            <text:p>92,94%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3-08-30" calcext:value-type="date">
            <text:p>30.08.2023</text:p>
          </table:table-cell>
          <table:table-cell table:formula="of:=([.D183] + ([.D183] * 0.0175))" office:value-type="float" office:value="9436.58983368784" calcext:value-type="float">
            <text:p>9436,58983368784</text:p>
          </table:table-cell>
          <table:table-cell table:formula="of:=[.C184]- (0.25 * 80) - IF(WEEKDAY([.B184]; 2) = 5; 60; 0)" office:value-type="float" office:value="9416.58983368784" calcext:value-type="float">
            <text:p>9416,58983368784</text:p>
          </table:table-cell>
          <table:table-cell table:style-name="ce14" table:formula="of:=[.C184] / 10000" office:value-type="percentage" office:value="0.943658983368784" calcext:value-type="percentage">
            <text:p>94,37%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3-08-31" calcext:value-type="date">
            <text:p>31.08.2023</text:p>
          </table:table-cell>
          <table:table-cell table:formula="of:=([.D184] + ([.D184] * 0.0175))" office:value-type="float" office:value="9581.38015577738" calcext:value-type="float">
            <text:p>9581,38015577738</text:p>
          </table:table-cell>
          <table:table-cell table:formula="of:=[.C185]- (0.25 * 80) - IF(WEEKDAY([.B185]; 2) = 5; 60; 0)" office:value-type="float" office:value="9561.38015577738" calcext:value-type="float">
            <text:p>9561,38015577738</text:p>
          </table:table-cell>
          <table:table-cell table:style-name="ce14" table:formula="of:=[.C185] / 10000" office:value-type="percentage" office:value="0.958138015577738" calcext:value-type="percentage">
            <text:p>95,81%</text:p>
          </table:table-cell>
          <table:table-cell table:number-columns-repeated="5"/>
        </table:table-row>
        <table:table-row table:style-name="ro1" table:number-rows-repeated="10483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4" table:style-name="ta1">
        <table:table-column table:style-name="co4" table:default-cell-style-name="Default"/>
        <table:table-column table:style-name="co4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 d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wierzchnia (rano)</text:p>
          </table:table-cell>
          <table:table-cell office:value-type="string" calcext:value-type="string">
            <text:p>Powierzchnia (wieczorem)</text:p>
          </table:table-cell>
          <table:table-cell office:value-type="string" calcext:value-type="string">
            <text:p>Procent zarośnięt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3-01" calcext:value-type="date">
            <text:p>1.03.2023</text:p>
          </table:table-cell>
          <table:table-cell table:formula="of:=2000" office:value-type="float" office:value="2000" calcext:value-type="float">
            <text:p>2000</text:p>
          </table:table-cell>
          <table:table-cell table:formula="of:=[.C2]- (0.25 * [.$J$5]) - IF(WEEKDAY([.B2]; 2) = 5; 60; 0)" office:value-type="float" office:value="1976.5" calcext:value-type="float">
            <text:p>1976,5</text:p>
          </table:table-cell>
          <table:table-cell table:style-name="ce14" table:formula="of:=[.C2] / 10000"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3-02" calcext:value-type="date">
            <text:p>2.03.2023</text:p>
          </table:table-cell>
          <table:table-cell table:formula="of:=([.D2] + ([.D2] * 0.0175))" office:value-type="float" office:value="2011.08875" calcext:value-type="float">
            <text:p>2011,08875</text:p>
          </table:table-cell>
          <table:table-cell table:formula="of:=[.C3]- (0.25 * [.$J$5]) - IF(WEEKDAY([.B3]; 2) = 5; 60; 0)" office:value-type="float" office:value="1987.58875" calcext:value-type="float">
            <text:p>1987,58875</text:p>
          </table:table-cell>
          <table:table-cell table:style-name="ce14" table:formula="of:=[.C3] / 10000" office:value-type="percentage" office:value="0.201108875" calcext:value-type="percentage">
            <text:p>20,11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3" calcext:value-type="date">
            <text:p>3.03.2023</text:p>
          </table:table-cell>
          <table:table-cell table:formula="of:=([.D3] + ([.D3] * 0.0175))" office:value-type="float" office:value="2022.371553125" calcext:value-type="float">
            <text:p>2022,371553125</text:p>
          </table:table-cell>
          <table:table-cell table:formula="of:=[.C4]- (0.25 * [.$J$5]) - IF(WEEKDAY([.B4]; 2) = 5; 60; 0)" office:value-type="float" office:value="1938.871553125" calcext:value-type="float">
            <text:p>1938,871553125</text:p>
          </table:table-cell>
          <table:table-cell table:style-name="ce14" table:formula="of:=[.C4] / 10000" office:value-type="percentage" office:value="0.2022371553125" calcext:value-type="percentage">
            <text:p>20,22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3-04" calcext:value-type="date">
            <text:p>4.03.2023</text:p>
          </table:table-cell>
          <table:table-cell table:formula="of:=([.D4] + ([.D4] * 0.0175))" office:value-type="float" office:value="1972.80180530469" calcext:value-type="float">
            <text:p>1972,80180530469</text:p>
          </table:table-cell>
          <table:table-cell table:formula="of:=[.C5]- (0.25 * [.$J$5]) - IF(WEEKDAY([.B5]; 2) = 5; 60; 0)" office:value-type="float" office:value="1949.30180530469" calcext:value-type="float">
            <text:p>1949,30180530469</text:p>
          </table:table-cell>
          <table:table-cell table:style-name="ce14" table:formula="of:=[.C5] / 10000" office:value-type="percentage" office:value="0.197280180530469" calcext:value-type="percentage">
            <text:p>19,73%</text:p>
          </table:table-cell>
          <table:table-cell/>
          <table:table-cell table:style-name="ce15" office:value-type="string" calcext:value-type="string" table:number-columns-spanned="3" table:number-rows-spanned="1">
            <text:p>Liczba amurów białych</text:p>
          </table:table-cell>
          <table:covered-table-cell table:number-columns-repeated="2" table:style-name="ce16"/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3-05" calcext:value-type="date">
            <text:p>5.03.2023</text:p>
          </table:table-cell>
          <table:table-cell table:formula="of:=([.D5] + ([.D5] * 0.0175))" office:value-type="float" office:value="1983.41458689752" calcext:value-type="float">
            <text:p>1983,41458689752</text:p>
          </table:table-cell>
          <table:table-cell table:formula="of:=[.C6]- (0.25 * [.$J$5]) - IF(WEEKDAY([.B6]; 2) = 5; 60; 0)" office:value-type="float" office:value="1959.91458689752" calcext:value-type="float">
            <text:p>1959,91458689752</text:p>
          </table:table-cell>
          <table:table-cell table:style-name="ce14" table:formula="of:=[.C6] / 10000" office:value-type="percentage" office:value="0.198341458689752" calcext:value-type="percentage">
            <text:p>19,83%</text:p>
          </table:table-cell>
          <table:table-cell/>
          <table:table-cell table:style-name="ce15" office:value-type="string" calcext:value-type="string" table:number-columns-spanned="3" table:number-rows-spanned="1">
            <text:p>Maks. Zarośnięcie</text:p>
          </table:table-cell>
          <table:covered-table-cell table:number-columns-repeated="2" table:style-name="ce16"/>
          <table:table-cell table:style-name="ce17" table:formula="of:=MAX([.E:.E])" office:value-type="percentage" office:value="0.491674206808508" calcext:value-type="percentage">
            <text:p>49,1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3-06" calcext:value-type="date">
            <text:p>6.03.2023</text:p>
          </table:table-cell>
          <table:table-cell table:formula="of:=([.D6] + ([.D6] * 0.0175))" office:value-type="float" office:value="1994.21309216823" calcext:value-type="float">
            <text:p>1994,21309216823</text:p>
          </table:table-cell>
          <table:table-cell table:formula="of:=[.C7]- (0.25 * [.$J$5]) - IF(WEEKDAY([.B7]; 2) = 5; 60; 0)" office:value-type="float" office:value="1970.71309216823" calcext:value-type="float">
            <text:p>1970,71309216823</text:p>
          </table:table-cell>
          <table:table-cell table:style-name="ce14" table:formula="of:=[.C7] / 10000" office:value-type="percentage" office:value="0.199421309216823" calcext:value-type="percentage">
            <text:p>19,94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3-07" calcext:value-type="date">
            <text:p>7.03.2023</text:p>
          </table:table-cell>
          <table:table-cell table:formula="of:=([.D7] + ([.D7] * 0.0175))" office:value-type="float" office:value="2005.20057128117" calcext:value-type="float">
            <text:p>2005,20057128117</text:p>
          </table:table-cell>
          <table:table-cell table:formula="of:=[.C8]- (0.25 * [.$J$5]) - IF(WEEKDAY([.B8]; 2) = 5; 60; 0)" office:value-type="float" office:value="1981.70057128117" calcext:value-type="float">
            <text:p>1981,70057128117</text:p>
          </table:table-cell>
          <table:table-cell table:style-name="ce14" table:formula="of:=[.C8] / 10000" office:value-type="percentage" office:value="0.200520057128117" calcext:value-type="percentage">
            <text:p>20,05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3-08" calcext:value-type="date">
            <text:p>8.03.2023</text:p>
          </table:table-cell>
          <table:table-cell table:formula="of:=([.D8] + ([.D8] * 0.0175))" office:value-type="float" office:value="2016.38033127859" calcext:value-type="float">
            <text:p>2016,38033127859</text:p>
          </table:table-cell>
          <table:table-cell table:formula="of:=[.C9]- (0.25 * [.$J$5]) - IF(WEEKDAY([.B9]; 2) = 5; 60; 0)" office:value-type="float" office:value="1992.88033127859" calcext:value-type="float">
            <text:p>1992,88033127859</text:p>
          </table:table-cell>
          <table:table-cell table:style-name="ce14" table:formula="of:=[.C9] / 10000" office:value-type="percentage" office:value="0.201638033127859" calcext:value-type="percentage">
            <text:p>20,16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3-09" calcext:value-type="date">
            <text:p>9.03.2023</text:p>
          </table:table-cell>
          <table:table-cell table:formula="of:=([.D9] + ([.D9] * 0.0175))" office:value-type="float" office:value="2027.75573707597" calcext:value-type="float">
            <text:p>2027,75573707597</text:p>
          </table:table-cell>
          <table:table-cell table:formula="of:=[.C10]- (0.25 * [.$J$5]) - IF(WEEKDAY([.B10]; 2) = 5; 60; 0)" office:value-type="float" office:value="2004.25573707597" calcext:value-type="float">
            <text:p>2004,25573707597</text:p>
          </table:table-cell>
          <table:table-cell table:style-name="ce14" table:formula="of:=[.C10] / 10000" office:value-type="percentage" office:value="0.202775573707597" calcext:value-type="percentage">
            <text:p>20,28%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3-10" calcext:value-type="date">
            <text:p>10.03.2023</text:p>
          </table:table-cell>
          <table:table-cell table:formula="of:=([.D10] + ([.D10] * 0.0175))" office:value-type="float" office:value="2039.3302124748" calcext:value-type="float">
            <text:p>2039,3302124748</text:p>
          </table:table-cell>
          <table:table-cell table:formula="of:=[.C11]- (0.25 * [.$J$5]) - IF(WEEKDAY([.B11]; 2) = 5; 60; 0)" office:value-type="float" office:value="1955.8302124748" calcext:value-type="float">
            <text:p>1955,8302124748</text:p>
          </table:table-cell>
          <table:table-cell table:style-name="ce14" table:formula="of:=[.C11] / 10000" office:value-type="percentage" office:value="0.20393302124748" calcext:value-type="percentage">
            <text:p>20,39%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3-11" calcext:value-type="date">
            <text:p>11.03.2023</text:p>
          </table:table-cell>
          <table:table-cell table:formula="of:=([.D11] + ([.D11] * 0.0175))" office:value-type="float" office:value="1990.0572411931" calcext:value-type="float">
            <text:p>1990,0572411931</text:p>
          </table:table-cell>
          <table:table-cell table:formula="of:=[.C12]- (0.25 * [.$J$5]) - IF(WEEKDAY([.B12]; 2) = 5; 60; 0)" office:value-type="float" office:value="1966.5572411931" calcext:value-type="float">
            <text:p>1966,5572411931</text:p>
          </table:table-cell>
          <table:table-cell table:style-name="ce14" table:formula="of:=[.C12] / 10000" office:value-type="percentage" office:value="0.19900572411931" calcext:value-type="percentage">
            <text:p>19,90%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3-12" calcext:value-type="date">
            <text:p>12.03.2023</text:p>
          </table:table-cell>
          <table:table-cell table:formula="of:=([.D12] + ([.D12] * 0.0175))" office:value-type="float" office:value="2000.97199291398" calcext:value-type="float">
            <text:p>2000,97199291398</text:p>
          </table:table-cell>
          <table:table-cell table:formula="of:=[.C13]- (0.25 * [.$J$5]) - IF(WEEKDAY([.B13]; 2) = 5; 60; 0)" office:value-type="float" office:value="1977.47199291398" calcext:value-type="float">
            <text:p>1977,47199291398</text:p>
          </table:table-cell>
          <table:table-cell table:style-name="ce14" table:formula="of:=[.C13] / 10000" office:value-type="percentage" office:value="0.200097199291398" calcext:value-type="percentage">
            <text:p>20,01%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3-13" calcext:value-type="date">
            <text:p>13.03.2023</text:p>
          </table:table-cell>
          <table:table-cell table:formula="of:=([.D13] + ([.D13] * 0.0175))" office:value-type="float" office:value="2012.07775278998" calcext:value-type="float">
            <text:p>2012,07775278998</text:p>
          </table:table-cell>
          <table:table-cell table:formula="of:=[.C14]- (0.25 * [.$J$5]) - IF(WEEKDAY([.B14]; 2) = 5; 60; 0)" office:value-type="float" office:value="1988.57775278998" calcext:value-type="float">
            <text:p>1988,57775278998</text:p>
          </table:table-cell>
          <table:table-cell table:style-name="ce14" table:formula="of:=[.C14] / 10000" office:value-type="percentage" office:value="0.201207775278998" calcext:value-type="percentage">
            <text:p>20,12%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3-14" calcext:value-type="date">
            <text:p>14.03.2023</text:p>
          </table:table-cell>
          <table:table-cell table:formula="of:=([.D14] + ([.D14] * 0.0175))" office:value-type="float" office:value="2023.3778634638" calcext:value-type="float">
            <text:p>2023,3778634638</text:p>
          </table:table-cell>
          <table:table-cell table:formula="of:=[.C15]- (0.25 * [.$J$5]) - IF(WEEKDAY([.B15]; 2) = 5; 60; 0)" office:value-type="float" office:value="1999.8778634638" calcext:value-type="float">
            <text:p>1999,8778634638</text:p>
          </table:table-cell>
          <table:table-cell table:style-name="ce14" table:formula="of:=[.C15] / 10000" office:value-type="percentage" office:value="0.20233778634638" calcext:value-type="percentage">
            <text:p>20,23%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3-15" calcext:value-type="date">
            <text:p>15.03.2023</text:p>
          </table:table-cell>
          <table:table-cell table:formula="of:=([.D15] + ([.D15] * 0.0175))" office:value-type="float" office:value="2034.87572607442" calcext:value-type="float">
            <text:p>2034,87572607442</text:p>
          </table:table-cell>
          <table:table-cell table:formula="of:=[.C16]- (0.25 * [.$J$5]) - IF(WEEKDAY([.B16]; 2) = 5; 60; 0)" office:value-type="float" office:value="2011.37572607442" calcext:value-type="float">
            <text:p>2011,37572607442</text:p>
          </table:table-cell>
          <table:table-cell table:style-name="ce14" table:formula="of:=[.C16] / 10000" office:value-type="percentage" office:value="0.203487572607442" calcext:value-type="percentage">
            <text:p>20,35%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3-16" calcext:value-type="date">
            <text:p>16.03.2023</text:p>
          </table:table-cell>
          <table:table-cell table:formula="of:=([.D16] + ([.D16] * 0.0175))" office:value-type="float" office:value="2046.57480128072" calcext:value-type="float">
            <text:p>2046,57480128072</text:p>
          </table:table-cell>
          <table:table-cell table:formula="of:=[.C17]- (0.25 * [.$J$5]) - IF(WEEKDAY([.B17]; 2) = 5; 60; 0)" office:value-type="float" office:value="2023.07480128072" calcext:value-type="float">
            <text:p>2023,07480128072</text:p>
          </table:table-cell>
          <table:table-cell table:style-name="ce14" table:formula="of:=[.C17] / 10000" office:value-type="percentage" office:value="0.204657480128072" calcext:value-type="percentage">
            <text:p>20,47%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3-17" calcext:value-type="date">
            <text:p>17.03.2023</text:p>
          </table:table-cell>
          <table:table-cell table:formula="of:=([.D17] + ([.D17] * 0.0175))" office:value-type="float" office:value="2058.47861030313" calcext:value-type="float">
            <text:p>2058,47861030313</text:p>
          </table:table-cell>
          <table:table-cell table:formula="of:=[.C18]- (0.25 * [.$J$5]) - IF(WEEKDAY([.B18]; 2) = 5; 60; 0)" office:value-type="float" office:value="1974.97861030313" calcext:value-type="float">
            <text:p>1974,97861030313</text:p>
          </table:table-cell>
          <table:table-cell table:style-name="ce14" table:formula="of:=[.C18] / 10000" office:value-type="percentage" office:value="0.205847861030313" calcext:value-type="percentage">
            <text:p>20,58%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03-18" calcext:value-type="date">
            <text:p>18.03.2023</text:p>
          </table:table-cell>
          <table:table-cell table:formula="of:=([.D18] + ([.D18] * 0.0175))" office:value-type="float" office:value="2009.54073598344" calcext:value-type="float">
            <text:p>2009,54073598344</text:p>
          </table:table-cell>
          <table:table-cell table:formula="of:=[.C19]- (0.25 * [.$J$5]) - IF(WEEKDAY([.B19]; 2) = 5; 60; 0)" office:value-type="float" office:value="1986.04073598344" calcext:value-type="float">
            <text:p>1986,04073598344</text:p>
          </table:table-cell>
          <table:table-cell table:style-name="ce14" table:formula="of:=[.C19] / 10000" office:value-type="percentage" office:value="0.200954073598344" calcext:value-type="percentage">
            <text:p>20,10%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3-03-19" calcext:value-type="date">
            <text:p>19.03.2023</text:p>
          </table:table-cell>
          <table:table-cell table:formula="of:=([.D19] + ([.D19] * 0.0175))" office:value-type="float" office:value="2020.79644886315" calcext:value-type="float">
            <text:p>2020,79644886315</text:p>
          </table:table-cell>
          <table:table-cell table:formula="of:=[.C20]- (0.25 * [.$J$5]) - IF(WEEKDAY([.B20]; 2) = 5; 60; 0)" office:value-type="float" office:value="1997.29644886315" calcext:value-type="float">
            <text:p>1997,29644886315</text:p>
          </table:table-cell>
          <table:table-cell table:style-name="ce14" table:formula="of:=[.C20] / 10000" office:value-type="percentage" office:value="0.202079644886315" calcext:value-type="percentage">
            <text:p>20,21%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03-20" calcext:value-type="date">
            <text:p>20.03.2023</text:p>
          </table:table-cell>
          <table:table-cell table:formula="of:=([.D20] + ([.D20] * 0.0175))" office:value-type="float" office:value="2032.24913671825" calcext:value-type="float">
            <text:p>2032,24913671825</text:p>
          </table:table-cell>
          <table:table-cell table:formula="of:=[.C21]- (0.25 * [.$J$5]) - IF(WEEKDAY([.B21]; 2) = 5; 60; 0)" office:value-type="float" office:value="2008.74913671825" calcext:value-type="float">
            <text:p>2008,74913671825</text:p>
          </table:table-cell>
          <table:table-cell table:style-name="ce14" table:formula="of:=[.C21] / 10000" office:value-type="percentage" office:value="0.203224913671825" calcext:value-type="percentage">
            <text:p>20,32%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3-21" calcext:value-type="date">
            <text:p>21.03.2023</text:p>
          </table:table-cell>
          <table:table-cell table:formula="of:=([.D21] + ([.D21] * 0.0175))" office:value-type="float" office:value="2043.90224661082" calcext:value-type="float">
            <text:p>2043,90224661082</text:p>
          </table:table-cell>
          <table:table-cell table:formula="of:=[.C22]- (0.25 * [.$J$5]) - IF(WEEKDAY([.B22]; 2) = 5; 60; 0)" office:value-type="float" office:value="2020.40224661082" calcext:value-type="float">
            <text:p>2020,40224661082</text:p>
          </table:table-cell>
          <table:table-cell table:style-name="ce14" table:formula="of:=[.C22] / 10000" office:value-type="percentage" office:value="0.204390224661082" calcext:value-type="percentage">
            <text:p>20,44%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3-03-22" calcext:value-type="date">
            <text:p>22.03.2023</text:p>
          </table:table-cell>
          <table:table-cell table:formula="of:=([.D22] + ([.D22] * 0.0175))" office:value-type="float" office:value="2055.75928592651" calcext:value-type="float">
            <text:p>2055,75928592651</text:p>
          </table:table-cell>
          <table:table-cell table:formula="of:=[.C23]- (0.25 * [.$J$5]) - IF(WEEKDAY([.B23]; 2) = 5; 60; 0)" office:value-type="float" office:value="2032.25928592651" calcext:value-type="float">
            <text:p>2032,25928592651</text:p>
          </table:table-cell>
          <table:table-cell table:style-name="ce14" table:formula="of:=[.C23] / 10000" office:value-type="percentage" office:value="0.205575928592651" calcext:value-type="percentage">
            <text:p>20,56%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3-23" calcext:value-type="date">
            <text:p>23.03.2023</text:p>
          </table:table-cell>
          <table:table-cell table:formula="of:=([.D23] + ([.D23] * 0.0175))" office:value-type="float" office:value="2067.82382343023" calcext:value-type="float">
            <text:p>2067,82382343023</text:p>
          </table:table-cell>
          <table:table-cell table:formula="of:=[.C24]- (0.25 * [.$J$5]) - IF(WEEKDAY([.B24]; 2) = 5; 60; 0)" office:value-type="float" office:value="2044.32382343023" calcext:value-type="float">
            <text:p>2044,32382343023</text:p>
          </table:table-cell>
          <table:table-cell table:style-name="ce14" table:formula="of:=[.C24] / 10000" office:value-type="percentage" office:value="0.206782382343023" calcext:value-type="percentage">
            <text:p>20,68%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3-24" calcext:value-type="date">
            <text:p>24.03.2023</text:p>
          </table:table-cell>
          <table:table-cell table:formula="of:=([.D24] + ([.D24] * 0.0175))" office:value-type="float" office:value="2080.09949034026" calcext:value-type="float">
            <text:p>2080,09949034026</text:p>
          </table:table-cell>
          <table:table-cell table:formula="of:=[.C25]- (0.25 * [.$J$5]) - IF(WEEKDAY([.B25]; 2) = 5; 60; 0)" office:value-type="float" office:value="1996.59949034026" calcext:value-type="float">
            <text:p>1996,59949034026</text:p>
          </table:table-cell>
          <table:table-cell table:style-name="ce14" table:formula="of:=[.C25] / 10000" office:value-type="percentage" office:value="0.208009949034026" calcext:value-type="percentage">
            <text:p>20,80%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3-25" calcext:value-type="date">
            <text:p>25.03.2023</text:p>
          </table:table-cell>
          <table:table-cell table:formula="of:=([.D25] + ([.D25] * 0.0175))" office:value-type="float" office:value="2031.53998142121" calcext:value-type="float">
            <text:p>2031,53998142121</text:p>
          </table:table-cell>
          <table:table-cell table:formula="of:=[.C26]- (0.25 * [.$J$5]) - IF(WEEKDAY([.B26]; 2) = 5; 60; 0)" office:value-type="float" office:value="2008.03998142121" calcext:value-type="float">
            <text:p>2008,03998142121</text:p>
          </table:table-cell>
          <table:table-cell table:style-name="ce14" table:formula="of:=[.C26] / 10000" office:value-type="percentage" office:value="0.203153998142121" calcext:value-type="percentage">
            <text:p>20,32%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3-26" calcext:value-type="date">
            <text:p>26.03.2023</text:p>
          </table:table-cell>
          <table:table-cell table:formula="of:=([.D26] + ([.D26] * 0.0175))" office:value-type="float" office:value="2043.18068109608" calcext:value-type="float">
            <text:p>2043,18068109608</text:p>
          </table:table-cell>
          <table:table-cell table:formula="of:=[.C27]- (0.25 * [.$J$5]) - IF(WEEKDAY([.B27]; 2) = 5; 60; 0)" office:value-type="float" office:value="2019.68068109608" calcext:value-type="float">
            <text:p>2019,68068109608</text:p>
          </table:table-cell>
          <table:table-cell table:style-name="ce14" table:formula="of:=[.C27] / 10000" office:value-type="percentage" office:value="0.204318068109608" calcext:value-type="percentage">
            <text:p>20,43%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3-27" calcext:value-type="date">
            <text:p>27.03.2023</text:p>
          </table:table-cell>
          <table:table-cell table:formula="of:=([.D27] + ([.D27] * 0.0175))" office:value-type="float" office:value="2055.02509301526" calcext:value-type="float">
            <text:p>2055,02509301526</text:p>
          </table:table-cell>
          <table:table-cell table:formula="of:=[.C28]- (0.25 * [.$J$5]) - IF(WEEKDAY([.B28]; 2) = 5; 60; 0)" office:value-type="float" office:value="2031.52509301526" calcext:value-type="float">
            <text:p>2031,52509301526</text:p>
          </table:table-cell>
          <table:table-cell table:style-name="ce14" table:formula="of:=[.C28] / 10000" office:value-type="percentage" office:value="0.205502509301526" calcext:value-type="percentage">
            <text:p>20,55%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3-03-28" calcext:value-type="date">
            <text:p>28.03.2023</text:p>
          </table:table-cell>
          <table:table-cell table:formula="of:=([.D28] + ([.D28] * 0.0175))" office:value-type="float" office:value="2067.07678214303" calcext:value-type="float">
            <text:p>2067,07678214303</text:p>
          </table:table-cell>
          <table:table-cell table:formula="of:=[.C29]- (0.25 * [.$J$5]) - IF(WEEKDAY([.B29]; 2) = 5; 60; 0)" office:value-type="float" office:value="2043.57678214303" calcext:value-type="float">
            <text:p>2043,57678214303</text:p>
          </table:table-cell>
          <table:table-cell table:style-name="ce14" table:formula="of:=[.C29] / 10000" office:value-type="percentage" office:value="0.206707678214303" calcext:value-type="percentage">
            <text:p>20,67%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03-29" calcext:value-type="date">
            <text:p>29.03.2023</text:p>
          </table:table-cell>
          <table:table-cell table:formula="of:=([.D29] + ([.D29] * 0.0175))" office:value-type="float" office:value="2079.33937583053" calcext:value-type="float">
            <text:p>2079,33937583053</text:p>
          </table:table-cell>
          <table:table-cell table:formula="of:=[.C30]- (0.25 * [.$J$5]) - IF(WEEKDAY([.B30]; 2) = 5; 60; 0)" office:value-type="float" office:value="2055.83937583053" calcext:value-type="float">
            <text:p>2055,83937583053</text:p>
          </table:table-cell>
          <table:table-cell table:style-name="ce14" table:formula="of:=[.C30] / 10000" office:value-type="percentage" office:value="0.207933937583053" calcext:value-type="percentage">
            <text:p>20,79%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03-30" calcext:value-type="date">
            <text:p>30.03.2023</text:p>
          </table:table-cell>
          <table:table-cell table:formula="of:=([.D30] + ([.D30] * 0.0175))" office:value-type="float" office:value="2091.81656490757" calcext:value-type="float">
            <text:p>2091,81656490757</text:p>
          </table:table-cell>
          <table:table-cell table:formula="of:=[.C31]- (0.25 * [.$J$5]) - IF(WEEKDAY([.B31]; 2) = 5; 60; 0)" office:value-type="float" office:value="2068.31656490757" calcext:value-type="float">
            <text:p>2068,31656490757</text:p>
          </table:table-cell>
          <table:table-cell table:style-name="ce14" table:formula="of:=[.C31] / 10000" office:value-type="percentage" office:value="0.209181656490757" calcext:value-type="percentage">
            <text:p>20,92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3-03-31" calcext:value-type="date">
            <text:p>31.03.2023</text:p>
          </table:table-cell>
          <table:table-cell table:formula="of:=([.D31] + ([.D31] * 0.0175))" office:value-type="float" office:value="2104.51210479345" calcext:value-type="float">
            <text:p>2104,51210479345</text:p>
          </table:table-cell>
          <table:table-cell table:formula="of:=[.C32]- (0.25 * [.$J$5]) - IF(WEEKDAY([.B32]; 2) = 5; 60; 0)" office:value-type="float" office:value="2021.01210479345" calcext:value-type="float">
            <text:p>2021,01210479345</text:p>
          </table:table-cell>
          <table:table-cell table:style-name="ce14" table:formula="of:=[.C32] / 10000" office:value-type="percentage" office:value="0.210451210479345" calcext:value-type="percentage">
            <text:p>21,05%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04-01" calcext:value-type="date">
            <text:p>1.04.2023</text:p>
          </table:table-cell>
          <table:table-cell table:formula="of:=([.D32] + ([.D32] * 0.0175))" office:value-type="float" office:value="2056.37981662734" calcext:value-type="float">
            <text:p>2056,37981662734</text:p>
          </table:table-cell>
          <table:table-cell table:formula="of:=[.C33]- (0.25 * [.$J$5]) - IF(WEEKDAY([.B33]; 2) = 5; 60; 0)" office:value-type="float" office:value="2032.87981662734" calcext:value-type="float">
            <text:p>2032,87981662734</text:p>
          </table:table-cell>
          <table:table-cell table:style-name="ce14" table:formula="of:=[.C33] / 10000" office:value-type="percentage" office:value="0.205637981662734" calcext:value-type="percentage">
            <text:p>20,56%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04-02" calcext:value-type="date">
            <text:p>2.04.2023</text:p>
          </table:table-cell>
          <table:table-cell table:formula="of:=([.D33] + ([.D33] * 0.0175))" office:value-type="float" office:value="2068.45521341831" calcext:value-type="float">
            <text:p>2068,45521341831</text:p>
          </table:table-cell>
          <table:table-cell table:formula="of:=[.C34]- (0.25 * [.$J$5]) - IF(WEEKDAY([.B34]; 2) = 5; 60; 0)" office:value-type="float" office:value="2044.95521341831" calcext:value-type="float">
            <text:p>2044,95521341831</text:p>
          </table:table-cell>
          <table:table-cell table:style-name="ce14" table:formula="of:=[.C34] / 10000" office:value-type="percentage" office:value="0.206845521341831" calcext:value-type="percentage">
            <text:p>20,68%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04-03" calcext:value-type="date">
            <text:p>3.04.2023</text:p>
          </table:table-cell>
          <table:table-cell table:formula="of:=([.D34] + ([.D34] * 0.0175))" office:value-type="float" office:value="2080.74192965313" calcext:value-type="float">
            <text:p>2080,74192965313</text:p>
          </table:table-cell>
          <table:table-cell table:formula="of:=[.C35]- (0.25 * [.$J$5]) - IF(WEEKDAY([.B35]; 2) = 5; 60; 0)" office:value-type="float" office:value="2057.24192965313" calcext:value-type="float">
            <text:p>2057,24192965313</text:p>
          </table:table-cell>
          <table:table-cell table:style-name="ce14" table:formula="of:=[.C35] / 10000" office:value-type="percentage" office:value="0.208074192965313" calcext:value-type="percentage">
            <text:p>20,81%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04-04" calcext:value-type="date">
            <text:p>4.04.2023</text:p>
          </table:table-cell>
          <table:table-cell table:formula="of:=([.D35] + ([.D35] * 0.0175))" office:value-type="float" office:value="2093.24366342206" calcext:value-type="float">
            <text:p>2093,24366342206</text:p>
          </table:table-cell>
          <table:table-cell table:formula="of:=[.C36]- (0.25 * [.$J$5]) - IF(WEEKDAY([.B36]; 2) = 5; 60; 0)" office:value-type="float" office:value="2069.74366342206" calcext:value-type="float">
            <text:p>2069,74366342206</text:p>
          </table:table-cell>
          <table:table-cell table:style-name="ce14" table:formula="of:=[.C36] / 10000" office:value-type="percentage" office:value="0.209324366342206" calcext:value-type="percentage">
            <text:p>20,93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04-05" calcext:value-type="date">
            <text:p>5.04.2023</text:p>
          </table:table-cell>
          <table:table-cell table:formula="of:=([.D36] + ([.D36] * 0.0175))" office:value-type="float" office:value="2105.96417753195" calcext:value-type="float">
            <text:p>2105,96417753195</text:p>
          </table:table-cell>
          <table:table-cell table:formula="of:=[.C37]- (0.25 * [.$J$5]) - IF(WEEKDAY([.B37]; 2) = 5; 60; 0)" office:value-type="float" office:value="2082.46417753195" calcext:value-type="float">
            <text:p>2082,46417753195</text:p>
          </table:table-cell>
          <table:table-cell table:style-name="ce14" table:formula="of:=[.C37] / 10000" office:value-type="percentage" office:value="0.210596417753195" calcext:value-type="percentage">
            <text:p>21,06%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04-06" calcext:value-type="date">
            <text:p>6.04.2023</text:p>
          </table:table-cell>
          <table:table-cell table:formula="of:=([.D37] + ([.D37] * 0.0175))" office:value-type="float" office:value="2118.90730063876" calcext:value-type="float">
            <text:p>2118,90730063876</text:p>
          </table:table-cell>
          <table:table-cell table:formula="of:=[.C38]- (0.25 * [.$J$5]) - IF(WEEKDAY([.B38]; 2) = 5; 60; 0)" office:value-type="float" office:value="2095.40730063876" calcext:value-type="float">
            <text:p>2095,40730063876</text:p>
          </table:table-cell>
          <table:table-cell table:style-name="ce14" table:formula="of:=[.C38] / 10000" office:value-type="percentage" office:value="0.211890730063876" calcext:value-type="percentage">
            <text:p>21,19%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04-07" calcext:value-type="date">
            <text:p>7.04.2023</text:p>
          </table:table-cell>
          <table:table-cell table:formula="of:=([.D38] + ([.D38] * 0.0175))" office:value-type="float" office:value="2132.07692839994" calcext:value-type="float">
            <text:p>2132,07692839994</text:p>
          </table:table-cell>
          <table:table-cell table:formula="of:=[.C39]- (0.25 * [.$J$5]) - IF(WEEKDAY([.B39]; 2) = 5; 60; 0)" office:value-type="float" office:value="2048.57692839994" calcext:value-type="float">
            <text:p>2048,57692839994</text:p>
          </table:table-cell>
          <table:table-cell table:style-name="ce14" table:formula="of:=[.C39] / 10000" office:value-type="percentage" office:value="0.213207692839994" calcext:value-type="percentage">
            <text:p>21,32%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04-08" calcext:value-type="date">
            <text:p>8.04.2023</text:p>
          </table:table-cell>
          <table:table-cell table:formula="of:=([.D39] + ([.D39] * 0.0175))" office:value-type="float" office:value="2084.42702464694" calcext:value-type="float">
            <text:p>2084,42702464694</text:p>
          </table:table-cell>
          <table:table-cell table:formula="of:=[.C40]- (0.25 * [.$J$5]) - IF(WEEKDAY([.B40]; 2) = 5; 60; 0)" office:value-type="float" office:value="2060.92702464694" calcext:value-type="float">
            <text:p>2060,92702464694</text:p>
          </table:table-cell>
          <table:table-cell table:style-name="ce14" table:formula="of:=[.C40] / 10000" office:value-type="percentage" office:value="0.208442702464694" calcext:value-type="percentage">
            <text:p>20,84%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04-09" calcext:value-type="date">
            <text:p>9.04.2023</text:p>
          </table:table-cell>
          <table:table-cell table:formula="of:=([.D40] + ([.D40] * 0.0175))" office:value-type="float" office:value="2096.99324757826" calcext:value-type="float">
            <text:p>2096,99324757826</text:p>
          </table:table-cell>
          <table:table-cell table:formula="of:=[.C41]- (0.25 * [.$J$5]) - IF(WEEKDAY([.B41]; 2) = 5; 60; 0)" office:value-type="float" office:value="2073.49324757826" calcext:value-type="float">
            <text:p>2073,49324757826</text:p>
          </table:table-cell>
          <table:table-cell table:style-name="ce14" table:formula="of:=[.C41] / 10000" office:value-type="percentage" office:value="0.209699324757826" calcext:value-type="percentage">
            <text:p>20,97%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4-10" calcext:value-type="date">
            <text:p>10.04.2023</text:p>
          </table:table-cell>
          <table:table-cell table:formula="of:=([.D41] + ([.D41] * 0.0175))" office:value-type="float" office:value="2109.77937941088" calcext:value-type="float">
            <text:p>2109,77937941088</text:p>
          </table:table-cell>
          <table:table-cell table:formula="of:=[.C42]- (0.25 * [.$J$5]) - IF(WEEKDAY([.B42]; 2) = 5; 60; 0)" office:value-type="float" office:value="2086.27937941088" calcext:value-type="float">
            <text:p>2086,27937941088</text:p>
          </table:table-cell>
          <table:table-cell table:style-name="ce14" table:formula="of:=[.C42] / 10000" office:value-type="percentage" office:value="0.210977937941088" calcext:value-type="percentage">
            <text:p>21,10%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04-11" calcext:value-type="date">
            <text:p>11.04.2023</text:p>
          </table:table-cell>
          <table:table-cell table:formula="of:=([.D42] + ([.D42] * 0.0175))" office:value-type="float" office:value="2122.78926855057" calcext:value-type="float">
            <text:p>2122,78926855057</text:p>
          </table:table-cell>
          <table:table-cell table:formula="of:=[.C43]- (0.25 * [.$J$5]) - IF(WEEKDAY([.B43]; 2) = 5; 60; 0)" office:value-type="float" office:value="2099.28926855057" calcext:value-type="float">
            <text:p>2099,28926855057</text:p>
          </table:table-cell>
          <table:table-cell table:style-name="ce14" table:formula="of:=[.C43] / 10000" office:value-type="percentage" office:value="0.212278926855057" calcext:value-type="percentage">
            <text:p>21,23%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4-12" calcext:value-type="date">
            <text:p>12.04.2023</text:p>
          </table:table-cell>
          <table:table-cell table:formula="of:=([.D43] + ([.D43] * 0.0175))" office:value-type="float" office:value="2136.0268307502" calcext:value-type="float">
            <text:p>2136,0268307502</text:p>
          </table:table-cell>
          <table:table-cell table:formula="of:=[.C44]- (0.25 * [.$J$5]) - IF(WEEKDAY([.B44]; 2) = 5; 60; 0)" office:value-type="float" office:value="2112.5268307502" calcext:value-type="float">
            <text:p>2112,5268307502</text:p>
          </table:table-cell>
          <table:table-cell table:style-name="ce14" table:formula="of:=[.C44] / 10000" office:value-type="percentage" office:value="0.21360268307502" calcext:value-type="percentage">
            <text:p>21,36%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13" calcext:value-type="date">
            <text:p>13.04.2023</text:p>
          </table:table-cell>
          <table:table-cell table:formula="of:=([.D44] + ([.D44] * 0.0175))" office:value-type="float" office:value="2149.49605028833" calcext:value-type="float">
            <text:p>2149,49605028833</text:p>
          </table:table-cell>
          <table:table-cell table:formula="of:=[.C45]- (0.25 * [.$J$5]) - IF(WEEKDAY([.B45]; 2) = 5; 60; 0)" office:value-type="float" office:value="2125.99605028833" calcext:value-type="float">
            <text:p>2125,99605028833</text:p>
          </table:table-cell>
          <table:table-cell table:style-name="ce14" table:formula="of:=[.C45] / 10000" office:value-type="percentage" office:value="0.214949605028833" calcext:value-type="percentage">
            <text:p>21,49%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04-14" calcext:value-type="date">
            <text:p>14.04.2023</text:p>
          </table:table-cell>
          <table:table-cell table:formula="of:=([.D45] + ([.D45] * 0.0175))" office:value-type="float" office:value="2163.20098116838" calcext:value-type="float">
            <text:p>2163,20098116838</text:p>
          </table:table-cell>
          <table:table-cell table:formula="of:=[.C46]- (0.25 * [.$J$5]) - IF(WEEKDAY([.B46]; 2) = 5; 60; 0)" office:value-type="float" office:value="2079.70098116838" calcext:value-type="float">
            <text:p>2079,70098116838</text:p>
          </table:table-cell>
          <table:table-cell table:style-name="ce14" table:formula="of:=[.C46] / 10000" office:value-type="percentage" office:value="0.216320098116838" calcext:value-type="percentage">
            <text:p>21,63%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04-15" calcext:value-type="date">
            <text:p>15.04.2023</text:p>
          </table:table-cell>
          <table:table-cell table:formula="of:=([.D46] + ([.D46] * 0.0175))" office:value-type="float" office:value="2116.09574833882" calcext:value-type="float">
            <text:p>2116,09574833882</text:p>
          </table:table-cell>
          <table:table-cell table:formula="of:=[.C47]- (0.25 * [.$J$5]) - IF(WEEKDAY([.B47]; 2) = 5; 60; 0)" office:value-type="float" office:value="2092.59574833882" calcext:value-type="float">
            <text:p>2092,59574833882</text:p>
          </table:table-cell>
          <table:table-cell table:style-name="ce14" table:formula="of:=[.C47] / 10000" office:value-type="percentage" office:value="0.211609574833882" calcext:value-type="percentage">
            <text:p>21,16%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3-04-16" calcext:value-type="date">
            <text:p>16.04.2023</text:p>
          </table:table-cell>
          <table:table-cell table:formula="of:=([.D47] + ([.D47] * 0.0175))" office:value-type="float" office:value="2129.21617393475" calcext:value-type="float">
            <text:p>2129,21617393475</text:p>
          </table:table-cell>
          <table:table-cell table:formula="of:=[.C48]- (0.25 * [.$J$5]) - IF(WEEKDAY([.B48]; 2) = 5; 60; 0)" office:value-type="float" office:value="2105.71617393475" calcext:value-type="float">
            <text:p>2105,71617393475</text:p>
          </table:table-cell>
          <table:table-cell table:style-name="ce14" table:formula="of:=[.C48] / 10000" office:value-type="percentage" office:value="0.212921617393475" calcext:value-type="percentage">
            <text:p>21,29%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04-17" calcext:value-type="date">
            <text:p>17.04.2023</text:p>
          </table:table-cell>
          <table:table-cell table:formula="of:=([.D48] + ([.D48] * 0.0175))" office:value-type="float" office:value="2142.56620697861" calcext:value-type="float">
            <text:p>2142,56620697861</text:p>
          </table:table-cell>
          <table:table-cell table:formula="of:=[.C49]- (0.25 * [.$J$5]) - IF(WEEKDAY([.B49]; 2) = 5; 60; 0)" office:value-type="float" office:value="2119.06620697861" calcext:value-type="float">
            <text:p>2119,06620697861</text:p>
          </table:table-cell>
          <table:table-cell table:style-name="ce14" table:formula="of:=[.C49] / 10000" office:value-type="percentage" office:value="0.214256620697861" calcext:value-type="percentage">
            <text:p>21,43%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04-18" calcext:value-type="date">
            <text:p>18.04.2023</text:p>
          </table:table-cell>
          <table:table-cell table:formula="of:=([.D49] + ([.D49] * 0.0175))" office:value-type="float" office:value="2156.14986560074" calcext:value-type="float">
            <text:p>2156,14986560074</text:p>
          </table:table-cell>
          <table:table-cell table:formula="of:=[.C50]- (0.25 * [.$J$5]) - IF(WEEKDAY([.B50]; 2) = 5; 60; 0)" office:value-type="float" office:value="2132.64986560074" calcext:value-type="float">
            <text:p>2132,64986560074</text:p>
          </table:table-cell>
          <table:table-cell table:style-name="ce14" table:formula="of:=[.C50] / 10000" office:value-type="percentage" office:value="0.215614986560074" calcext:value-type="percentage">
            <text:p>21,56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04-19" calcext:value-type="date">
            <text:p>19.04.2023</text:p>
          </table:table-cell>
          <table:table-cell table:formula="of:=([.D50] + ([.D50] * 0.0175))" office:value-type="float" office:value="2169.97123824875" calcext:value-type="float">
            <text:p>2169,97123824875</text:p>
          </table:table-cell>
          <table:table-cell table:formula="of:=[.C51]- (0.25 * [.$J$5]) - IF(WEEKDAY([.B51]; 2) = 5; 60; 0)" office:value-type="float" office:value="2146.47123824875" calcext:value-type="float">
            <text:p>2146,47123824875</text:p>
          </table:table-cell>
          <table:table-cell table:style-name="ce14" table:formula="of:=[.C51] / 10000" office:value-type="percentage" office:value="0.216997123824875" calcext:value-type="percentage">
            <text:p>21,70%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04-20" calcext:value-type="date">
            <text:p>20.04.2023</text:p>
          </table:table-cell>
          <table:table-cell table:formula="of:=([.D51] + ([.D51] * 0.0175))" office:value-type="float" office:value="2184.0344849181" calcext:value-type="float">
            <text:p>2184,0344849181</text:p>
          </table:table-cell>
          <table:table-cell table:formula="of:=[.C52]- (0.25 * [.$J$5]) - IF(WEEKDAY([.B52]; 2) = 5; 60; 0)" office:value-type="float" office:value="2160.5344849181" calcext:value-type="float">
            <text:p>2160,5344849181</text:p>
          </table:table-cell>
          <table:table-cell table:style-name="ce14" table:formula="of:=[.C52] / 10000" office:value-type="percentage" office:value="0.21840344849181" calcext:value-type="percentage">
            <text:p>21,84%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04-21" calcext:value-type="date">
            <text:p>21.04.2023</text:p>
          </table:table-cell>
          <table:table-cell table:formula="of:=([.D52] + ([.D52] * 0.0175))" office:value-type="float" office:value="2198.34383840417" calcext:value-type="float">
            <text:p>2198,34383840417</text:p>
          </table:table-cell>
          <table:table-cell table:formula="of:=[.C53]- (0.25 * [.$J$5]) - IF(WEEKDAY([.B53]; 2) = 5; 60; 0)" office:value-type="float" office:value="2114.84383840417" calcext:value-type="float">
            <text:p>2114,84383840417</text:p>
          </table:table-cell>
          <table:table-cell table:style-name="ce14" table:formula="of:=[.C53] / 10000" office:value-type="percentage" office:value="0.219834383840417" calcext:value-type="percentage">
            <text:p>21,98%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3-04-22" calcext:value-type="date">
            <text:p>22.04.2023</text:p>
          </table:table-cell>
          <table:table-cell table:formula="of:=([.D53] + ([.D53] * 0.0175))" office:value-type="float" office:value="2151.85360557624" calcext:value-type="float">
            <text:p>2151,85360557624</text:p>
          </table:table-cell>
          <table:table-cell table:formula="of:=[.C54]- (0.25 * [.$J$5]) - IF(WEEKDAY([.B54]; 2) = 5; 60; 0)" office:value-type="float" office:value="2128.35360557624" calcext:value-type="float">
            <text:p>2128,35360557624</text:p>
          </table:table-cell>
          <table:table-cell table:style-name="ce14" table:formula="of:=[.C54] / 10000" office:value-type="percentage" office:value="0.215185360557624" calcext:value-type="percentage">
            <text:p>21,52%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3-04-23" calcext:value-type="date">
            <text:p>23.04.2023</text:p>
          </table:table-cell>
          <table:table-cell table:formula="of:=([.D54] + ([.D54] * 0.0175))" office:value-type="float" office:value="2165.59979367383" calcext:value-type="float">
            <text:p>2165,59979367383</text:p>
          </table:table-cell>
          <table:table-cell table:formula="of:=[.C55]- (0.25 * [.$J$5]) - IF(WEEKDAY([.B55]; 2) = 5; 60; 0)" office:value-type="float" office:value="2142.09979367383" calcext:value-type="float">
            <text:p>2142,09979367383</text:p>
          </table:table-cell>
          <table:table-cell table:style-name="ce14" table:formula="of:=[.C55] / 10000" office:value-type="percentage" office:value="0.216559979367383" calcext:value-type="percentage">
            <text:p>21,66%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3-04-24" calcext:value-type="date">
            <text:p>24.04.2023</text:p>
          </table:table-cell>
          <table:table-cell table:formula="of:=([.D55] + ([.D55] * 0.0175))" office:value-type="float" office:value="2179.58654006312" calcext:value-type="float">
            <text:p>2179,58654006312</text:p>
          </table:table-cell>
          <table:table-cell table:formula="of:=[.C56]- (0.25 * [.$J$5]) - IF(WEEKDAY([.B56]; 2) = 5; 60; 0)" office:value-type="float" office:value="2156.08654006312" calcext:value-type="float">
            <text:p>2156,08654006312</text:p>
          </table:table-cell>
          <table:table-cell table:style-name="ce14" table:formula="of:=[.C56] / 10000" office:value-type="percentage" office:value="0.217958654006312" calcext:value-type="percentage">
            <text:p>21,80%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3-04-25" calcext:value-type="date">
            <text:p>25.04.2023</text:p>
          </table:table-cell>
          <table:table-cell table:formula="of:=([.D56] + ([.D56] * 0.0175))" office:value-type="float" office:value="2193.81805451422" calcext:value-type="float">
            <text:p>2193,81805451422</text:p>
          </table:table-cell>
          <table:table-cell table:formula="of:=[.C57]- (0.25 * [.$J$5]) - IF(WEEKDAY([.B57]; 2) = 5; 60; 0)" office:value-type="float" office:value="2170.31805451422" calcext:value-type="float">
            <text:p>2170,31805451422</text:p>
          </table:table-cell>
          <table:table-cell table:style-name="ce14" table:formula="of:=[.C57] / 10000" office:value-type="percentage" office:value="0.219381805451422" calcext:value-type="percentage">
            <text:p>21,94%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3-04-26" calcext:value-type="date">
            <text:p>26.04.2023</text:p>
          </table:table-cell>
          <table:table-cell table:formula="of:=([.D57] + ([.D57] * 0.0175))" office:value-type="float" office:value="2208.29862046822" calcext:value-type="float">
            <text:p>2208,29862046822</text:p>
          </table:table-cell>
          <table:table-cell table:formula="of:=[.C58]- (0.25 * [.$J$5]) - IF(WEEKDAY([.B58]; 2) = 5; 60; 0)" office:value-type="float" office:value="2184.79862046822" calcext:value-type="float">
            <text:p>2184,79862046822</text:p>
          </table:table-cell>
          <table:table-cell table:style-name="ce14" table:formula="of:=[.C58] / 10000" office:value-type="percentage" office:value="0.220829862046822" calcext:value-type="percentage">
            <text:p>22,08%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3-04-27" calcext:value-type="date">
            <text:p>27.04.2023</text:p>
          </table:table-cell>
          <table:table-cell table:formula="of:=([.D58] + ([.D58] * 0.0175))" office:value-type="float" office:value="2223.03259632642" calcext:value-type="float">
            <text:p>2223,03259632642</text:p>
          </table:table-cell>
          <table:table-cell table:formula="of:=[.C59]- (0.25 * [.$J$5]) - IF(WEEKDAY([.B59]; 2) = 5; 60; 0)" office:value-type="float" office:value="2199.53259632642" calcext:value-type="float">
            <text:p>2199,53259632642</text:p>
          </table:table-cell>
          <table:table-cell table:style-name="ce14" table:formula="of:=[.C59] / 10000" office:value-type="percentage" office:value="0.222303259632642" calcext:value-type="percentage">
            <text:p>22,23%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3-04-28" calcext:value-type="date">
            <text:p>28.04.2023</text:p>
          </table:table-cell>
          <table:table-cell table:formula="of:=([.D59] + ([.D59] * 0.0175))" office:value-type="float" office:value="2238.02441676213" calcext:value-type="float">
            <text:p>2238,02441676213</text:p>
          </table:table-cell>
          <table:table-cell table:formula="of:=[.C60]- (0.25 * [.$J$5]) - IF(WEEKDAY([.B60]; 2) = 5; 60; 0)" office:value-type="float" office:value="2154.52441676213" calcext:value-type="float">
            <text:p>2154,52441676213</text:p>
          </table:table-cell>
          <table:table-cell table:style-name="ce14" table:formula="of:=[.C60] / 10000" office:value-type="percentage" office:value="0.223802441676213" calcext:value-type="percentage">
            <text:p>22,38%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3-04-29" calcext:value-type="date">
            <text:p>29.04.2023</text:p>
          </table:table-cell>
          <table:table-cell table:formula="of:=([.D60] + ([.D60] * 0.0175))" office:value-type="float" office:value="2192.22859405547" calcext:value-type="float">
            <text:p>2192,22859405547</text:p>
          </table:table-cell>
          <table:table-cell table:formula="of:=[.C61]- (0.25 * [.$J$5]) - IF(WEEKDAY([.B61]; 2) = 5; 60; 0)" office:value-type="float" office:value="2168.72859405547" calcext:value-type="float">
            <text:p>2168,72859405547</text:p>
          </table:table-cell>
          <table:table-cell table:style-name="ce14" table:formula="of:=[.C61] / 10000" office:value-type="percentage" office:value="0.219222859405547" calcext:value-type="percentage">
            <text:p>21,92%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3-04-30" calcext:value-type="date">
            <text:p>30.04.2023</text:p>
          </table:table-cell>
          <table:table-cell table:formula="of:=([.D61] + ([.D61] * 0.0175))" office:value-type="float" office:value="2206.68134445144" calcext:value-type="float">
            <text:p>2206,68134445144</text:p>
          </table:table-cell>
          <table:table-cell table:formula="of:=[.C62]- (0.25 * [.$J$5]) - IF(WEEKDAY([.B62]; 2) = 5; 60; 0)" office:value-type="float" office:value="2183.18134445144" calcext:value-type="float">
            <text:p>2183,18134445144</text:p>
          </table:table-cell>
          <table:table-cell table:style-name="ce14" table:formula="of:=[.C62] / 10000" office:value-type="percentage" office:value="0.220668134445144" calcext:value-type="percentage">
            <text:p>22,07%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3-05-01" calcext:value-type="date">
            <text:p>1.05.2023</text:p>
          </table:table-cell>
          <table:table-cell table:formula="of:=([.D62] + ([.D62] * 0.0175))" office:value-type="float" office:value="2221.38701797934" calcext:value-type="float">
            <text:p>2221,38701797934</text:p>
          </table:table-cell>
          <table:table-cell table:formula="of:=[.C63]- (0.25 * [.$J$5]) - IF(WEEKDAY([.B63]; 2) = 5; 60; 0)" office:value-type="float" office:value="2197.88701797934" calcext:value-type="float">
            <text:p>2197,88701797934</text:p>
          </table:table-cell>
          <table:table-cell table:style-name="ce14" table:formula="of:=[.C63] / 10000" office:value-type="percentage" office:value="0.222138701797934" calcext:value-type="percentage">
            <text:p>22,21%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3-05-02" calcext:value-type="date">
            <text:p>2.05.2023</text:p>
          </table:table-cell>
          <table:table-cell table:formula="of:=([.D63] + ([.D63] * 0.0175))" office:value-type="float" office:value="2236.35004079397" calcext:value-type="float">
            <text:p>2236,35004079397</text:p>
          </table:table-cell>
          <table:table-cell table:formula="of:=[.C64]- (0.25 * [.$J$5]) - IF(WEEKDAY([.B64]; 2) = 5; 60; 0)" office:value-type="float" office:value="2212.85004079397" calcext:value-type="float">
            <text:p>2212,85004079397</text:p>
          </table:table-cell>
          <table:table-cell table:style-name="ce14" table:formula="of:=[.C64] / 10000" office:value-type="percentage" office:value="0.223635004079397" calcext:value-type="percentage">
            <text:p>22,36%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3-05-03" calcext:value-type="date">
            <text:p>3.05.2023</text:p>
          </table:table-cell>
          <table:table-cell table:formula="of:=([.D64] + ([.D64] * 0.0175))" office:value-type="float" office:value="2251.57491650787" calcext:value-type="float">
            <text:p>2251,57491650787</text:p>
          </table:table-cell>
          <table:table-cell table:formula="of:=[.C65]- (0.25 * [.$J$5]) - IF(WEEKDAY([.B65]; 2) = 5; 60; 0)" office:value-type="float" office:value="2228.07491650787" calcext:value-type="float">
            <text:p>2228,07491650787</text:p>
          </table:table-cell>
          <table:table-cell table:style-name="ce14" table:formula="of:=[.C65] / 10000" office:value-type="percentage" office:value="0.225157491650787" calcext:value-type="percentage">
            <text:p>22,52%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3-05-04" calcext:value-type="date">
            <text:p>4.05.2023</text:p>
          </table:table-cell>
          <table:table-cell table:formula="of:=([.D65] + ([.D65] * 0.0175))" office:value-type="float" office:value="2267.06622754676" calcext:value-type="float">
            <text:p>2267,06622754676</text:p>
          </table:table-cell>
          <table:table-cell table:formula="of:=[.C66]- (0.25 * [.$J$5]) - IF(WEEKDAY([.B66]; 2) = 5; 60; 0)" office:value-type="float" office:value="2243.56622754676" calcext:value-type="float">
            <text:p>2243,56622754676</text:p>
          </table:table-cell>
          <table:table-cell table:style-name="ce14" table:formula="of:=[.C66] / 10000" office:value-type="percentage" office:value="0.226706622754676" calcext:value-type="percentage">
            <text:p>22,67%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3-05-05" calcext:value-type="date">
            <text:p>5.05.2023</text:p>
          </table:table-cell>
          <table:table-cell table:formula="of:=([.D66] + ([.D66] * 0.0175))" office:value-type="float" office:value="2282.82863652883" calcext:value-type="float">
            <text:p>2282,82863652883</text:p>
          </table:table-cell>
          <table:table-cell table:formula="of:=[.C67]- (0.25 * [.$J$5]) - IF(WEEKDAY([.B67]; 2) = 5; 60; 0)" office:value-type="float" office:value="2199.32863652883" calcext:value-type="float">
            <text:p>2199,32863652883</text:p>
          </table:table-cell>
          <table:table-cell table:style-name="ce14" table:formula="of:=[.C67] / 10000" office:value-type="percentage" office:value="0.228282863652883" calcext:value-type="percentage">
            <text:p>22,83%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3-05-06" calcext:value-type="date">
            <text:p>6.05.2023</text:p>
          </table:table-cell>
          <table:table-cell table:formula="of:=([.D67] + ([.D67] * 0.0175))" office:value-type="float" office:value="2237.81688766808" calcext:value-type="float">
            <text:p>2237,81688766808</text:p>
          </table:table-cell>
          <table:table-cell table:formula="of:=[.C68]- (0.25 * [.$J$5]) - IF(WEEKDAY([.B68]; 2) = 5; 60; 0)" office:value-type="float" office:value="2214.31688766808" calcext:value-type="float">
            <text:p>2214,31688766808</text:p>
          </table:table-cell>
          <table:table-cell table:style-name="ce14" table:formula="of:=[.C68] / 10000" office:value-type="percentage" office:value="0.223781688766808" calcext:value-type="percentage">
            <text:p>22,38%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3-05-07" calcext:value-type="date">
            <text:p>7.05.2023</text:p>
          </table:table-cell>
          <table:table-cell table:formula="of:=([.D68] + ([.D68] * 0.0175))" office:value-type="float" office:value="2253.06743320227" calcext:value-type="float">
            <text:p>2253,06743320227</text:p>
          </table:table-cell>
          <table:table-cell table:formula="of:=[.C69]- (0.25 * [.$J$5]) - IF(WEEKDAY([.B69]; 2) = 5; 60; 0)" office:value-type="float" office:value="2229.56743320227" calcext:value-type="float">
            <text:p>2229,56743320227</text:p>
          </table:table-cell>
          <table:table-cell table:style-name="ce14" table:formula="of:=[.C69] / 10000" office:value-type="percentage" office:value="0.225306743320227" calcext:value-type="percentage">
            <text:p>22,53%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3-05-08" calcext:value-type="date">
            <text:p>8.05.2023</text:p>
          </table:table-cell>
          <table:table-cell table:formula="of:=([.D69] + ([.D69] * 0.0175))" office:value-type="float" office:value="2268.58486328331" calcext:value-type="float">
            <text:p>2268,58486328331</text:p>
          </table:table-cell>
          <table:table-cell table:formula="of:=[.C70]- (0.25 * [.$J$5]) - IF(WEEKDAY([.B70]; 2) = 5; 60; 0)" office:value-type="float" office:value="2245.08486328331" calcext:value-type="float">
            <text:p>2245,08486328331</text:p>
          </table:table-cell>
          <table:table-cell table:style-name="ce14" table:formula="of:=[.C70] / 10000" office:value-type="percentage" office:value="0.226858486328331" calcext:value-type="percentage">
            <text:p>22,69%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3-05-09" calcext:value-type="date">
            <text:p>9.05.2023</text:p>
          </table:table-cell>
          <table:table-cell table:formula="of:=([.D70] + ([.D70] * 0.0175))" office:value-type="float" office:value="2284.37384839077" calcext:value-type="float">
            <text:p>2284,37384839077</text:p>
          </table:table-cell>
          <table:table-cell table:formula="of:=[.C71]- (0.25 * [.$J$5]) - IF(WEEKDAY([.B71]; 2) = 5; 60; 0)" office:value-type="float" office:value="2260.87384839077" calcext:value-type="float">
            <text:p>2260,87384839077</text:p>
          </table:table-cell>
          <table:table-cell table:style-name="ce14" table:formula="of:=[.C71] / 10000" office:value-type="percentage" office:value="0.228437384839077" calcext:value-type="percentage">
            <text:p>22,84%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3-05-10" calcext:value-type="date">
            <text:p>10.05.2023</text:p>
          </table:table-cell>
          <table:table-cell table:formula="of:=([.D71] + ([.D71] * 0.0175))" office:value-type="float" office:value="2300.43914073761" calcext:value-type="float">
            <text:p>2300,43914073761</text:p>
          </table:table-cell>
          <table:table-cell table:formula="of:=[.C72]- (0.25 * [.$J$5]) - IF(WEEKDAY([.B72]; 2) = 5; 60; 0)" office:value-type="float" office:value="2276.93914073761" calcext:value-type="float">
            <text:p>2276,93914073761</text:p>
          </table:table-cell>
          <table:table-cell table:style-name="ce14" table:formula="of:=[.C72] / 10000" office:value-type="percentage" office:value="0.230043914073761" calcext:value-type="percentage">
            <text:p>23,00%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3-05-11" calcext:value-type="date">
            <text:p>11.05.2023</text:p>
          </table:table-cell>
          <table:table-cell table:formula="of:=([.D72] + ([.D72] * 0.0175))" office:value-type="float" office:value="2316.78557570052" calcext:value-type="float">
            <text:p>2316,78557570052</text:p>
          </table:table-cell>
          <table:table-cell table:formula="of:=[.C73]- (0.25 * [.$J$5]) - IF(WEEKDAY([.B73]; 2) = 5; 60; 0)" office:value-type="float" office:value="2293.28557570052" calcext:value-type="float">
            <text:p>2293,28557570052</text:p>
          </table:table-cell>
          <table:table-cell table:style-name="ce14" table:formula="of:=[.C73] / 10000" office:value-type="percentage" office:value="0.231678557570051" calcext:value-type="percentage">
            <text:p>23,17%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3-05-12" calcext:value-type="date">
            <text:p>12.05.2023</text:p>
          </table:table-cell>
          <table:table-cell table:formula="of:=([.D73] + ([.D73] * 0.0175))" office:value-type="float" office:value="2333.41807327527" calcext:value-type="float">
            <text:p>2333,41807327527</text:p>
          </table:table-cell>
          <table:table-cell table:formula="of:=[.C74]- (0.25 * [.$J$5]) - IF(WEEKDAY([.B74]; 2) = 5; 60; 0)" office:value-type="float" office:value="2249.91807327527" calcext:value-type="float">
            <text:p>2249,91807327527</text:p>
          </table:table-cell>
          <table:table-cell table:style-name="ce14" table:formula="of:=[.C74] / 10000" office:value-type="percentage" office:value="0.233341807327527" calcext:value-type="percentage">
            <text:p>23,33%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3-05-13" calcext:value-type="date">
            <text:p>13.05.2023</text:p>
          </table:table-cell>
          <table:table-cell table:formula="of:=([.D74] + ([.D74] * 0.0175))" office:value-type="float" office:value="2289.29163955759" calcext:value-type="float">
            <text:p>2289,29163955759</text:p>
          </table:table-cell>
          <table:table-cell table:formula="of:=[.C75]- (0.25 * [.$J$5]) - IF(WEEKDAY([.B75]; 2) = 5; 60; 0)" office:value-type="float" office:value="2265.79163955759" calcext:value-type="float">
            <text:p>2265,79163955759</text:p>
          </table:table-cell>
          <table:table-cell table:style-name="ce14" table:formula="of:=[.C75] / 10000" office:value-type="percentage" office:value="0.228929163955759" calcext:value-type="percentage">
            <text:p>22,89%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3-05-14" calcext:value-type="date">
            <text:p>14.05.2023</text:p>
          </table:table-cell>
          <table:table-cell table:formula="of:=([.D75] + ([.D75] * 0.0175))" office:value-type="float" office:value="2305.44299324985" calcext:value-type="float">
            <text:p>2305,44299324985</text:p>
          </table:table-cell>
          <table:table-cell table:formula="of:=[.C76]- (0.25 * [.$J$5]) - IF(WEEKDAY([.B76]; 2) = 5; 60; 0)" office:value-type="float" office:value="2281.94299324985" calcext:value-type="float">
            <text:p>2281,94299324985</text:p>
          </table:table-cell>
          <table:table-cell table:style-name="ce14" table:formula="of:=[.C76] / 10000" office:value-type="percentage" office:value="0.230544299324985" calcext:value-type="percentage">
            <text:p>23,05%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3-05-15" calcext:value-type="date">
            <text:p>15.05.2023</text:p>
          </table:table-cell>
          <table:table-cell table:formula="of:=([.D76] + ([.D76] * 0.0175))" office:value-type="float" office:value="2321.87699563172" calcext:value-type="float">
            <text:p>2321,87699563172</text:p>
          </table:table-cell>
          <table:table-cell table:formula="of:=[.C77]- (0.25 * [.$J$5]) - IF(WEEKDAY([.B77]; 2) = 5; 60; 0)" office:value-type="float" office:value="2298.37699563172" calcext:value-type="float">
            <text:p>2298,37699563172</text:p>
          </table:table-cell>
          <table:table-cell table:style-name="ce14" table:formula="of:=[.C77] / 10000" office:value-type="percentage" office:value="0.232187699563172" calcext:value-type="percentage">
            <text:p>23,22%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3-05-16" calcext:value-type="date">
            <text:p>16.05.2023</text:p>
          </table:table-cell>
          <table:table-cell table:formula="of:=([.D77] + ([.D77] * 0.0175))" office:value-type="float" office:value="2338.59859305528" calcext:value-type="float">
            <text:p>2338,59859305528</text:p>
          </table:table-cell>
          <table:table-cell table:formula="of:=[.C78]- (0.25 * [.$J$5]) - IF(WEEKDAY([.B78]; 2) = 5; 60; 0)" office:value-type="float" office:value="2315.09859305528" calcext:value-type="float">
            <text:p>2315,09859305528</text:p>
          </table:table-cell>
          <table:table-cell table:style-name="ce14" table:formula="of:=[.C78] / 10000" office:value-type="percentage" office:value="0.233859859305528" calcext:value-type="percentage">
            <text:p>23,39%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3-05-17" calcext:value-type="date">
            <text:p>17.05.2023</text:p>
          </table:table-cell>
          <table:table-cell table:formula="of:=([.D78] + ([.D78] * 0.0175))" office:value-type="float" office:value="2355.61281843374" calcext:value-type="float">
            <text:p>2355,61281843374</text:p>
          </table:table-cell>
          <table:table-cell table:formula="of:=[.C79]- (0.25 * [.$J$5]) - IF(WEEKDAY([.B79]; 2) = 5; 60; 0)" office:value-type="float" office:value="2332.11281843374" calcext:value-type="float">
            <text:p>2332,11281843374</text:p>
          </table:table-cell>
          <table:table-cell table:style-name="ce14" table:formula="of:=[.C79] / 10000" office:value-type="percentage" office:value="0.235561281843374" calcext:value-type="percentage">
            <text:p>23,56%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3-05-18" calcext:value-type="date">
            <text:p>18.05.2023</text:p>
          </table:table-cell>
          <table:table-cell table:formula="of:=([.D79] + ([.D79] * 0.0175))" office:value-type="float" office:value="2372.92479275633" calcext:value-type="float">
            <text:p>2372,92479275633</text:p>
          </table:table-cell>
          <table:table-cell table:formula="of:=[.C80]- (0.25 * [.$J$5]) - IF(WEEKDAY([.B80]; 2) = 5; 60; 0)" office:value-type="float" office:value="2349.42479275633" calcext:value-type="float">
            <text:p>2349,42479275633</text:p>
          </table:table-cell>
          <table:table-cell table:style-name="ce14" table:formula="of:=[.C80] / 10000" office:value-type="percentage" office:value="0.237292479275633" calcext:value-type="percentage">
            <text:p>23,73%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3-05-19" calcext:value-type="date">
            <text:p>19.05.2023</text:p>
          </table:table-cell>
          <table:table-cell table:formula="of:=([.D80] + ([.D80] * 0.0175))" office:value-type="float" office:value="2390.53972662957" calcext:value-type="float">
            <text:p>2390,53972662957</text:p>
          </table:table-cell>
          <table:table-cell table:formula="of:=[.C81]- (0.25 * [.$J$5]) - IF(WEEKDAY([.B81]; 2) = 5; 60; 0)" office:value-type="float" office:value="2307.03972662957" calcext:value-type="float">
            <text:p>2307,03972662957</text:p>
          </table:table-cell>
          <table:table-cell table:style-name="ce14" table:formula="of:=[.C81] / 10000" office:value-type="percentage" office:value="0.239053972662957" calcext:value-type="percentage">
            <text:p>23,91%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3-05-20" calcext:value-type="date">
            <text:p>20.05.2023</text:p>
          </table:table-cell>
          <table:table-cell table:formula="of:=([.D81] + ([.D81] * 0.0175))" office:value-type="float" office:value="2347.41292184559" calcext:value-type="float">
            <text:p>2347,41292184559</text:p>
          </table:table-cell>
          <table:table-cell table:formula="of:=[.C82]- (0.25 * [.$J$5]) - IF(WEEKDAY([.B82]; 2) = 5; 60; 0)" office:value-type="float" office:value="2323.91292184559" calcext:value-type="float">
            <text:p>2323,91292184559</text:p>
          </table:table-cell>
          <table:table-cell table:style-name="ce14" table:formula="of:=[.C82] / 10000" office:value-type="percentage" office:value="0.234741292184559" calcext:value-type="percentage">
            <text:p>23,47%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3-05-21" calcext:value-type="date">
            <text:p>21.05.2023</text:p>
          </table:table-cell>
          <table:table-cell table:formula="of:=([.D82] + ([.D82] * 0.0175))" office:value-type="float" office:value="2364.58139797789" calcext:value-type="float">
            <text:p>2364,58139797789</text:p>
          </table:table-cell>
          <table:table-cell table:formula="of:=[.C83]- (0.25 * [.$J$5]) - IF(WEEKDAY([.B83]; 2) = 5; 60; 0)" office:value-type="float" office:value="2341.08139797789" calcext:value-type="float">
            <text:p>2341,08139797789</text:p>
          </table:table-cell>
          <table:table-cell table:style-name="ce14" table:formula="of:=[.C83] / 10000" office:value-type="percentage" office:value="0.236458139797789" calcext:value-type="percentage">
            <text:p>23,65%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3-05-22" calcext:value-type="date">
            <text:p>22.05.2023</text:p>
          </table:table-cell>
          <table:table-cell table:formula="of:=([.D83] + ([.D83] * 0.0175))" office:value-type="float" office:value="2382.0503224425" calcext:value-type="float">
            <text:p>2382,0503224425</text:p>
          </table:table-cell>
          <table:table-cell table:formula="of:=[.C84]- (0.25 * [.$J$5]) - IF(WEEKDAY([.B84]; 2) = 5; 60; 0)" office:value-type="float" office:value="2358.5503224425" calcext:value-type="float">
            <text:p>2358,5503224425</text:p>
          </table:table-cell>
          <table:table-cell table:style-name="ce14" table:formula="of:=[.C84] / 10000" office:value-type="percentage" office:value="0.23820503224425" calcext:value-type="percentage">
            <text:p>23,82%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3-05-23" calcext:value-type="date">
            <text:p>23.05.2023</text:p>
          </table:table-cell>
          <table:table-cell table:formula="of:=([.D84] + ([.D84] * 0.0175))" office:value-type="float" office:value="2399.82495308524" calcext:value-type="float">
            <text:p>2399,82495308524</text:p>
          </table:table-cell>
          <table:table-cell table:formula="of:=[.C85]- (0.25 * [.$J$5]) - IF(WEEKDAY([.B85]; 2) = 5; 60; 0)" office:value-type="float" office:value="2376.32495308524" calcext:value-type="float">
            <text:p>2376,32495308524</text:p>
          </table:table-cell>
          <table:table-cell table:style-name="ce14" table:formula="of:=[.C85] / 10000" office:value-type="percentage" office:value="0.239982495308524" calcext:value-type="percentage">
            <text:p>24,00%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3-05-24" calcext:value-type="date">
            <text:p>24.05.2023</text:p>
          </table:table-cell>
          <table:table-cell table:formula="of:=([.D85] + ([.D85] * 0.0175))" office:value-type="float" office:value="2417.91063976423" calcext:value-type="float">
            <text:p>2417,91063976423</text:p>
          </table:table-cell>
          <table:table-cell table:formula="of:=[.C86]- (0.25 * [.$J$5]) - IF(WEEKDAY([.B86]; 2) = 5; 60; 0)" office:value-type="float" office:value="2394.41063976423" calcext:value-type="float">
            <text:p>2394,41063976423</text:p>
          </table:table-cell>
          <table:table-cell table:style-name="ce14" table:formula="of:=[.C86] / 10000" office:value-type="percentage" office:value="0.241791063976423" calcext:value-type="percentage">
            <text:p>24,18%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3-05-25" calcext:value-type="date">
            <text:p>25.05.2023</text:p>
          </table:table-cell>
          <table:table-cell table:formula="of:=([.D86] + ([.D86] * 0.0175))" office:value-type="float" office:value="2436.31282596011" calcext:value-type="float">
            <text:p>2436,31282596011</text:p>
          </table:table-cell>
          <table:table-cell table:formula="of:=[.C87]- (0.25 * [.$J$5]) - IF(WEEKDAY([.B87]; 2) = 5; 60; 0)" office:value-type="float" office:value="2412.81282596011" calcext:value-type="float">
            <text:p>2412,81282596011</text:p>
          </table:table-cell>
          <table:table-cell table:style-name="ce14" table:formula="of:=[.C87] / 10000" office:value-type="percentage" office:value="0.243631282596011" calcext:value-type="percentage">
            <text:p>24,36%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3-05-26" calcext:value-type="date">
            <text:p>26.05.2023</text:p>
          </table:table-cell>
          <table:table-cell table:formula="of:=([.D87] + ([.D87] * 0.0175))" office:value-type="float" office:value="2455.03705041441" calcext:value-type="float">
            <text:p>2455,03705041441</text:p>
          </table:table-cell>
          <table:table-cell table:formula="of:=[.C88]- (0.25 * [.$J$5]) - IF(WEEKDAY([.B88]; 2) = 5; 60; 0)" office:value-type="float" office:value="2371.53705041441" calcext:value-type="float">
            <text:p>2371,53705041441</text:p>
          </table:table-cell>
          <table:table-cell table:style-name="ce14" table:formula="of:=[.C88] / 10000" office:value-type="percentage" office:value="0.245503705041441" calcext:value-type="percentage">
            <text:p>24,55%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3-05-27" calcext:value-type="date">
            <text:p>27.05.2023</text:p>
          </table:table-cell>
          <table:table-cell table:formula="of:=([.D88] + ([.D88] * 0.0175))" office:value-type="float" office:value="2413.03894879666" calcext:value-type="float">
            <text:p>2413,03894879666</text:p>
          </table:table-cell>
          <table:table-cell table:formula="of:=[.C89]- (0.25 * [.$J$5]) - IF(WEEKDAY([.B89]; 2) = 5; 60; 0)" office:value-type="float" office:value="2389.53894879666" calcext:value-type="float">
            <text:p>2389,53894879666</text:p>
          </table:table-cell>
          <table:table-cell table:style-name="ce14" table:formula="of:=[.C89] / 10000" office:value-type="percentage" office:value="0.241303894879666" calcext:value-type="percentage">
            <text:p>24,13%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3-05-28" calcext:value-type="date">
            <text:p>28.05.2023</text:p>
          </table:table-cell>
          <table:table-cell table:formula="of:=([.D89] + ([.D89] * 0.0175))" office:value-type="float" office:value="2431.3558804006" calcext:value-type="float">
            <text:p>2431,3558804006</text:p>
          </table:table-cell>
          <table:table-cell table:formula="of:=[.C90]- (0.25 * [.$J$5]) - IF(WEEKDAY([.B90]; 2) = 5; 60; 0)" office:value-type="float" office:value="2407.8558804006" calcext:value-type="float">
            <text:p>2407,8558804006</text:p>
          </table:table-cell>
          <table:table-cell table:style-name="ce14" table:formula="of:=[.C90] / 10000" office:value-type="percentage" office:value="0.24313558804006" calcext:value-type="percentage">
            <text:p>24,31%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3-05-29" calcext:value-type="date">
            <text:p>29.05.2023</text:p>
          </table:table-cell>
          <table:table-cell table:formula="of:=([.D90] + ([.D90] * 0.0175))" office:value-type="float" office:value="2449.99335830761" calcext:value-type="float">
            <text:p>2449,99335830761</text:p>
          </table:table-cell>
          <table:table-cell table:formula="of:=[.C91]- (0.25 * [.$J$5]) - IF(WEEKDAY([.B91]; 2) = 5; 60; 0)" office:value-type="float" office:value="2426.49335830761" calcext:value-type="float">
            <text:p>2426,49335830761</text:p>
          </table:table-cell>
          <table:table-cell table:style-name="ce14" table:formula="of:=[.C91] / 10000" office:value-type="percentage" office:value="0.244999335830761" calcext:value-type="percentage">
            <text:p>24,50%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3-05-30" calcext:value-type="date">
            <text:p>30.05.2023</text:p>
          </table:table-cell>
          <table:table-cell table:formula="of:=([.D91] + ([.D91] * 0.0175))" office:value-type="float" office:value="2468.956992078" calcext:value-type="float">
            <text:p>2468,956992078</text:p>
          </table:table-cell>
          <table:table-cell table:formula="of:=[.C92]- (0.25 * [.$J$5]) - IF(WEEKDAY([.B92]; 2) = 5; 60; 0)" office:value-type="float" office:value="2445.456992078" calcext:value-type="float">
            <text:p>2445,456992078</text:p>
          </table:table-cell>
          <table:table-cell table:style-name="ce14" table:formula="of:=[.C92] / 10000" office:value-type="percentage" office:value="0.2468956992078" calcext:value-type="percentage">
            <text:p>24,69%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3-05-31" calcext:value-type="date">
            <text:p>31.05.2023</text:p>
          </table:table-cell>
          <table:table-cell table:formula="of:=([.D92] + ([.D92] * 0.0175))" office:value-type="float" office:value="2488.25248943936" calcext:value-type="float">
            <text:p>2488,25248943936</text:p>
          </table:table-cell>
          <table:table-cell table:formula="of:=[.C93]- (0.25 * [.$J$5]) - IF(WEEKDAY([.B93]; 2) = 5; 60; 0)" office:value-type="float" office:value="2464.75248943936" calcext:value-type="float">
            <text:p>2464,75248943936</text:p>
          </table:table-cell>
          <table:table-cell table:style-name="ce14" table:formula="of:=[.C93] / 10000" office:value-type="percentage" office:value="0.248825248943936" calcext:value-type="percentage">
            <text:p>24,88%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3-06-01" calcext:value-type="date">
            <text:p>1.06.2023</text:p>
          </table:table-cell>
          <table:table-cell table:formula="of:=([.D93] + ([.D93] * 0.0175))" office:value-type="float" office:value="2507.88565800455" calcext:value-type="float">
            <text:p>2507,88565800455</text:p>
          </table:table-cell>
          <table:table-cell table:formula="of:=[.C94]- (0.25 * [.$J$5]) - IF(WEEKDAY([.B94]; 2) = 5; 60; 0)" office:value-type="float" office:value="2484.38565800455" calcext:value-type="float">
            <text:p>2484,38565800455</text:p>
          </table:table-cell>
          <table:table-cell table:style-name="ce14" table:formula="of:=[.C94] / 10000" office:value-type="percentage" office:value="0.250788565800455" calcext:value-type="percentage">
            <text:p>25,08%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3-06-02" calcext:value-type="date">
            <text:p>2.06.2023</text:p>
          </table:table-cell>
          <table:table-cell table:formula="of:=([.D94] + ([.D94] * 0.0175))" office:value-type="float" office:value="2527.86240701963" calcext:value-type="float">
            <text:p>2527,86240701963</text:p>
          </table:table-cell>
          <table:table-cell table:formula="of:=[.C95]- (0.25 * [.$J$5]) - IF(WEEKDAY([.B95]; 2) = 5; 60; 0)" office:value-type="float" office:value="2444.36240701963" calcext:value-type="float">
            <text:p>2444,36240701963</text:p>
          </table:table-cell>
          <table:table-cell table:style-name="ce14" table:formula="of:=[.C95] / 10000" office:value-type="percentage" office:value="0.252786240701963" calcext:value-type="percentage">
            <text:p>25,28%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3-06-03" calcext:value-type="date">
            <text:p>3.06.2023</text:p>
          </table:table-cell>
          <table:table-cell table:formula="of:=([.D95] + ([.D95] * 0.0175))" office:value-type="float" office:value="2487.13874914248" calcext:value-type="float">
            <text:p>2487,13874914248</text:p>
          </table:table-cell>
          <table:table-cell table:formula="of:=[.C96]- (0.25 * [.$J$5]) - IF(WEEKDAY([.B96]; 2) = 5; 60; 0)" office:value-type="float" office:value="2463.63874914248" calcext:value-type="float">
            <text:p>2463,63874914248</text:p>
          </table:table-cell>
          <table:table-cell table:style-name="ce14" table:formula="of:=[.C96] / 10000" office:value-type="percentage" office:value="0.248713874914247" calcext:value-type="percentage">
            <text:p>24,87%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3-06-04" calcext:value-type="date">
            <text:p>4.06.2023</text:p>
          </table:table-cell>
          <table:table-cell table:formula="of:=([.D96] + ([.D96] * 0.0175))" office:value-type="float" office:value="2506.75242725247" calcext:value-type="float">
            <text:p>2506,75242725247</text:p>
          </table:table-cell>
          <table:table-cell table:formula="of:=[.C97]- (0.25 * [.$J$5]) - IF(WEEKDAY([.B97]; 2) = 5; 60; 0)" office:value-type="float" office:value="2483.25242725247" calcext:value-type="float">
            <text:p>2483,25242725247</text:p>
          </table:table-cell>
          <table:table-cell table:style-name="ce14" table:formula="of:=[.C97] / 10000" office:value-type="percentage" office:value="0.250675242725247" calcext:value-type="percentage">
            <text:p>25,07%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3-06-05" calcext:value-type="date">
            <text:p>5.06.2023</text:p>
          </table:table-cell>
          <table:table-cell table:formula="of:=([.D97] + ([.D97] * 0.0175))" office:value-type="float" office:value="2526.70934472939" calcext:value-type="float">
            <text:p>2526,70934472939</text:p>
          </table:table-cell>
          <table:table-cell table:formula="of:=[.C98]- (0.25 * [.$J$5]) - IF(WEEKDAY([.B98]; 2) = 5; 60; 0)" office:value-type="float" office:value="2503.20934472939" calcext:value-type="float">
            <text:p>2503,20934472939</text:p>
          </table:table-cell>
          <table:table-cell table:style-name="ce14" table:formula="of:=[.C98] / 10000" office:value-type="percentage" office:value="0.252670934472939" calcext:value-type="percentage">
            <text:p>25,27%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3-06-06" calcext:value-type="date">
            <text:p>6.06.2023</text:p>
          </table:table-cell>
          <table:table-cell table:formula="of:=([.D98] + ([.D98] * 0.0175))" office:value-type="float" office:value="2547.01550826215" calcext:value-type="float">
            <text:p>2547,01550826215</text:p>
          </table:table-cell>
          <table:table-cell table:formula="of:=[.C99]- (0.25 * [.$J$5]) - IF(WEEKDAY([.B99]; 2) = 5; 60; 0)" office:value-type="float" office:value="2523.51550826215" calcext:value-type="float">
            <text:p>2523,51550826215</text:p>
          </table:table-cell>
          <table:table-cell table:style-name="ce14" table:formula="of:=[.C99] / 10000" office:value-type="percentage" office:value="0.254701550826215" calcext:value-type="percentage">
            <text:p>25,47%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3-06-07" calcext:value-type="date">
            <text:p>7.06.2023</text:p>
          </table:table-cell>
          <table:table-cell table:formula="of:=([.D99] + ([.D99] * 0.0175))" office:value-type="float" office:value="2567.67702965674" calcext:value-type="float">
            <text:p>2567,67702965674</text:p>
          </table:table-cell>
          <table:table-cell table:formula="of:=[.C100]- (0.25 * [.$J$5]) - IF(WEEKDAY([.B100]; 2) = 5; 60; 0)" office:value-type="float" office:value="2544.17702965674" calcext:value-type="float">
            <text:p>2544,17702965674</text:p>
          </table:table-cell>
          <table:table-cell table:style-name="ce14" table:formula="of:=[.C100] / 10000" office:value-type="percentage" office:value="0.256767702965674" calcext:value-type="percentage">
            <text:p>25,68%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3-06-08" calcext:value-type="date">
            <text:p>8.06.2023</text:p>
          </table:table-cell>
          <table:table-cell table:formula="of:=([.D100] + ([.D100] * 0.0175))" office:value-type="float" office:value="2588.70012767573" calcext:value-type="float">
            <text:p>2588,70012767573</text:p>
          </table:table-cell>
          <table:table-cell table:formula="of:=[.C101]- (0.25 * [.$J$5]) - IF(WEEKDAY([.B101]; 2) = 5; 60; 0)" office:value-type="float" office:value="2565.20012767573" calcext:value-type="float">
            <text:p>2565,20012767573</text:p>
          </table:table-cell>
          <table:table-cell table:style-name="ce14" table:formula="of:=[.C101] / 10000" office:value-type="percentage" office:value="0.258870012767573" calcext:value-type="percentage">
            <text:p>25,89%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3-06-09" calcext:value-type="date">
            <text:p>9.06.2023</text:p>
          </table:table-cell>
          <table:table-cell table:formula="of:=([.D101] + ([.D101] * 0.0175))" office:value-type="float" office:value="2610.09112991006" calcext:value-type="float">
            <text:p>2610,09112991006</text:p>
          </table:table-cell>
          <table:table-cell table:formula="of:=[.C102]- (0.25 * [.$J$5]) - IF(WEEKDAY([.B102]; 2) = 5; 60; 0)" office:value-type="float" office:value="2526.59112991006" calcext:value-type="float">
            <text:p>2526,59112991006</text:p>
          </table:table-cell>
          <table:table-cell table:style-name="ce14" table:formula="of:=[.C102] / 10000" office:value-type="percentage" office:value="0.261009112991006" calcext:value-type="percentage">
            <text:p>26,10%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3-06-10" calcext:value-type="date">
            <text:p>10.06.2023</text:p>
          </table:table-cell>
          <table:table-cell table:formula="of:=([.D102] + ([.D102] * 0.0175))" office:value-type="float" office:value="2570.80647468348" calcext:value-type="float">
            <text:p>2570,80647468348</text:p>
          </table:table-cell>
          <table:table-cell table:formula="of:=[.C103]- (0.25 * [.$J$5]) - IF(WEEKDAY([.B103]; 2) = 5; 60; 0)" office:value-type="float" office:value="2547.30647468348" calcext:value-type="float">
            <text:p>2547,30647468348</text:p>
          </table:table-cell>
          <table:table-cell table:style-name="ce14" table:formula="of:=[.C103] / 10000" office:value-type="percentage" office:value="0.257080647468348" calcext:value-type="percentage">
            <text:p>25,71%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3-06-11" calcext:value-type="date">
            <text:p>11.06.2023</text:p>
          </table:table-cell>
          <table:table-cell table:formula="of:=([.D103] + ([.D103] * 0.0175))" office:value-type="float" office:value="2591.88433799044" calcext:value-type="float">
            <text:p>2591,88433799044</text:p>
          </table:table-cell>
          <table:table-cell table:formula="of:=[.C104]- (0.25 * [.$J$5]) - IF(WEEKDAY([.B104]; 2) = 5; 60; 0)" office:value-type="float" office:value="2568.38433799044" calcext:value-type="float">
            <text:p>2568,38433799044</text:p>
          </table:table-cell>
          <table:table-cell table:style-name="ce14" table:formula="of:=[.C104] / 10000" office:value-type="percentage" office:value="0.259188433799044" calcext:value-type="percentage">
            <text:p>25,92%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3-06-12" calcext:value-type="date">
            <text:p>12.06.2023</text:p>
          </table:table-cell>
          <table:table-cell table:formula="of:=([.D104] + ([.D104] * 0.0175))" office:value-type="float" office:value="2613.33106390528" calcext:value-type="float">
            <text:p>2613,33106390528</text:p>
          </table:table-cell>
          <table:table-cell table:formula="of:=[.C105]- (0.25 * [.$J$5]) - IF(WEEKDAY([.B105]; 2) = 5; 60; 0)" office:value-type="float" office:value="2589.83106390528" calcext:value-type="float">
            <text:p>2589,83106390528</text:p>
          </table:table-cell>
          <table:table-cell table:style-name="ce14" table:formula="of:=[.C105] / 10000" office:value-type="percentage" office:value="0.261333106390528" calcext:value-type="percentage">
            <text:p>26,13%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3-06-13" calcext:value-type="date">
            <text:p>13.06.2023</text:p>
          </table:table-cell>
          <table:table-cell table:formula="of:=([.D105] + ([.D105] * 0.0175))" office:value-type="float" office:value="2635.15310752362" calcext:value-type="float">
            <text:p>2635,15310752362</text:p>
          </table:table-cell>
          <table:table-cell table:formula="of:=[.C106]- (0.25 * [.$J$5]) - IF(WEEKDAY([.B106]; 2) = 5; 60; 0)" office:value-type="float" office:value="2611.65310752362" calcext:value-type="float">
            <text:p>2611,65310752362</text:p>
          </table:table-cell>
          <table:table-cell table:style-name="ce14" table:formula="of:=[.C106] / 10000" office:value-type="percentage" office:value="0.263515310752362" calcext:value-type="percentage">
            <text:p>26,35%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3-06-14" calcext:value-type="date">
            <text:p>14.06.2023</text:p>
          </table:table-cell>
          <table:table-cell table:formula="of:=([.D106] + ([.D106] * 0.0175))" office:value-type="float" office:value="2657.35703690528" calcext:value-type="float">
            <text:p>2657,35703690528</text:p>
          </table:table-cell>
          <table:table-cell table:formula="of:=[.C107]- (0.25 * [.$J$5]) - IF(WEEKDAY([.B107]; 2) = 5; 60; 0)" office:value-type="float" office:value="2633.85703690528" calcext:value-type="float">
            <text:p>2633,85703690528</text:p>
          </table:table-cell>
          <table:table-cell table:style-name="ce14" table:formula="of:=[.C107] / 10000" office:value-type="percentage" office:value="0.265735703690528" calcext:value-type="percentage">
            <text:p>26,57%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3-06-15" calcext:value-type="date">
            <text:p>15.06.2023</text:p>
          </table:table-cell>
          <table:table-cell table:formula="of:=([.D107] + ([.D107] * 0.0175))" office:value-type="float" office:value="2679.94953505112" calcext:value-type="float">
            <text:p>2679,94953505112</text:p>
          </table:table-cell>
          <table:table-cell table:formula="of:=[.C108]- (0.25 * [.$J$5]) - IF(WEEKDAY([.B108]; 2) = 5; 60; 0)" office:value-type="float" office:value="2656.44953505112" calcext:value-type="float">
            <text:p>2656,44953505112</text:p>
          </table:table-cell>
          <table:table-cell table:style-name="ce14" table:formula="of:=[.C108] / 10000" office:value-type="percentage" office:value="0.267994953505112" calcext:value-type="percentage">
            <text:p>26,80%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3-06-16" calcext:value-type="date">
            <text:p>16.06.2023</text:p>
          </table:table-cell>
          <table:table-cell table:formula="of:=([.D108] + ([.D108] * 0.0175))" office:value-type="float" office:value="2702.93740191452" calcext:value-type="float">
            <text:p>2702,93740191452</text:p>
          </table:table-cell>
          <table:table-cell table:formula="of:=[.C109]- (0.25 * [.$J$5]) - IF(WEEKDAY([.B109]; 2) = 5; 60; 0)" office:value-type="float" office:value="2619.43740191452" calcext:value-type="float">
            <text:p>2619,43740191452</text:p>
          </table:table-cell>
          <table:table-cell table:style-name="ce14" table:formula="of:=[.C109] / 10000" office:value-type="percentage" office:value="0.270293740191452" calcext:value-type="percentage">
            <text:p>27,03%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3-06-17" calcext:value-type="date">
            <text:p>17.06.2023</text:p>
          </table:table-cell>
          <table:table-cell table:formula="of:=([.D109] + ([.D109] * 0.0175))" office:value-type="float" office:value="2665.27755644802" calcext:value-type="float">
            <text:p>2665,27755644802</text:p>
          </table:table-cell>
          <table:table-cell table:formula="of:=[.C110]- (0.25 * [.$J$5]) - IF(WEEKDAY([.B110]; 2) = 5; 60; 0)" office:value-type="float" office:value="2641.77755644802" calcext:value-type="float">
            <text:p>2641,77755644802</text:p>
          </table:table-cell>
          <table:table-cell table:style-name="ce14" table:formula="of:=[.C110] / 10000" office:value-type="percentage" office:value="0.266527755644802" calcext:value-type="percentage">
            <text:p>26,65%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3-06-18" calcext:value-type="date">
            <text:p>18.06.2023</text:p>
          </table:table-cell>
          <table:table-cell table:formula="of:=([.D110] + ([.D110] * 0.0175))" office:value-type="float" office:value="2688.00866368586" calcext:value-type="float">
            <text:p>2688,00866368586</text:p>
          </table:table-cell>
          <table:table-cell table:formula="of:=[.C111]- (0.25 * [.$J$5]) - IF(WEEKDAY([.B111]; 2) = 5; 60; 0)" office:value-type="float" office:value="2664.50866368586" calcext:value-type="float">
            <text:p>2664,50866368586</text:p>
          </table:table-cell>
          <table:table-cell table:style-name="ce14" table:formula="of:=[.C111] / 10000" office:value-type="percentage" office:value="0.268800866368586" calcext:value-type="percentage">
            <text:p>26,88%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3-06-19" calcext:value-type="date">
            <text:p>19.06.2023</text:p>
          </table:table-cell>
          <table:table-cell table:formula="of:=([.D111] + ([.D111] * 0.0175))" office:value-type="float" office:value="2711.13756530037" calcext:value-type="float">
            <text:p>2711,13756530037</text:p>
          </table:table-cell>
          <table:table-cell table:formula="of:=[.C112]- (0.25 * [.$J$5]) - IF(WEEKDAY([.B112]; 2) = 5; 60; 0)" office:value-type="float" office:value="2687.63756530037" calcext:value-type="float">
            <text:p>2687,63756530037</text:p>
          </table:table-cell>
          <table:table-cell table:style-name="ce14" table:formula="of:=[.C112] / 10000" office:value-type="percentage" office:value="0.271113756530037" calcext:value-type="percentage">
            <text:p>27,11%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3-06-20" calcext:value-type="date">
            <text:p>20.06.2023</text:p>
          </table:table-cell>
          <table:table-cell table:formula="of:=([.D112] + ([.D112] * 0.0175))" office:value-type="float" office:value="2734.67122269312" calcext:value-type="float">
            <text:p>2734,67122269312</text:p>
          </table:table-cell>
          <table:table-cell table:formula="of:=[.C113]- (0.25 * [.$J$5]) - IF(WEEKDAY([.B113]; 2) = 5; 60; 0)" office:value-type="float" office:value="2711.17122269312" calcext:value-type="float">
            <text:p>2711,17122269312</text:p>
          </table:table-cell>
          <table:table-cell table:style-name="ce14" table:formula="of:=[.C113] / 10000" office:value-type="percentage" office:value="0.273467122269312" calcext:value-type="percentage">
            <text:p>27,35%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3-06-21" calcext:value-type="date">
            <text:p>21.06.2023</text:p>
          </table:table-cell>
          <table:table-cell table:formula="of:=([.D113] + ([.D113] * 0.0175))" office:value-type="float" office:value="2758.61671909025" calcext:value-type="float">
            <text:p>2758,61671909025</text:p>
          </table:table-cell>
          <table:table-cell table:formula="of:=[.C114]- (0.25 * [.$J$5]) - IF(WEEKDAY([.B114]; 2) = 5; 60; 0)" office:value-type="float" office:value="2735.11671909025" calcext:value-type="float">
            <text:p>2735,11671909025</text:p>
          </table:table-cell>
          <table:table-cell table:style-name="ce14" table:formula="of:=[.C114] / 10000" office:value-type="percentage" office:value="0.275861671909025" calcext:value-type="percentage">
            <text:p>27,59%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3-06-22" calcext:value-type="date">
            <text:p>22.06.2023</text:p>
          </table:table-cell>
          <table:table-cell table:formula="of:=([.D114] + ([.D114] * 0.0175))" office:value-type="float" office:value="2782.98126167433" calcext:value-type="float">
            <text:p>2782,98126167433</text:p>
          </table:table-cell>
          <table:table-cell table:formula="of:=[.C115]- (0.25 * [.$J$5]) - IF(WEEKDAY([.B115]; 2) = 5; 60; 0)" office:value-type="float" office:value="2759.48126167433" calcext:value-type="float">
            <text:p>2759,48126167433</text:p>
          </table:table-cell>
          <table:table-cell table:style-name="ce14" table:formula="of:=[.C115] / 10000" office:value-type="percentage" office:value="0.278298126167433" calcext:value-type="percentage">
            <text:p>27,83%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3-06-23" calcext:value-type="date">
            <text:p>23.06.2023</text:p>
          </table:table-cell>
          <table:table-cell table:formula="of:=([.D115] + ([.D115] * 0.0175))" office:value-type="float" office:value="2807.77218375363" calcext:value-type="float">
            <text:p>2807,77218375363</text:p>
          </table:table-cell>
          <table:table-cell table:formula="of:=[.C116]- (0.25 * [.$J$5]) - IF(WEEKDAY([.B116]; 2) = 5; 60; 0)" office:value-type="float" office:value="2724.27218375363" calcext:value-type="float">
            <text:p>2724,27218375363</text:p>
          </table:table-cell>
          <table:table-cell table:style-name="ce14" table:formula="of:=[.C116] / 10000" office:value-type="percentage" office:value="0.280777218375363" calcext:value-type="percentage">
            <text:p>28,08%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3-06-24" calcext:value-type="date">
            <text:p>24.06.2023</text:p>
          </table:table-cell>
          <table:table-cell table:formula="of:=([.D116] + ([.D116] * 0.0175))" office:value-type="float" office:value="2771.94694696932" calcext:value-type="float">
            <text:p>2771,94694696932</text:p>
          </table:table-cell>
          <table:table-cell table:formula="of:=[.C117]- (0.25 * [.$J$5]) - IF(WEEKDAY([.B117]; 2) = 5; 60; 0)" office:value-type="float" office:value="2748.44694696932" calcext:value-type="float">
            <text:p>2748,44694696932</text:p>
          </table:table-cell>
          <table:table-cell table:style-name="ce14" table:formula="of:=[.C117] / 10000" office:value-type="percentage" office:value="0.277194694696932" calcext:value-type="percentage">
            <text:p>27,72%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3-06-25" calcext:value-type="date">
            <text:p>25.06.2023</text:p>
          </table:table-cell>
          <table:table-cell table:formula="of:=([.D117] + ([.D117] * 0.0175))" office:value-type="float" office:value="2796.54476854128" calcext:value-type="float">
            <text:p>2796,54476854128</text:p>
          </table:table-cell>
          <table:table-cell table:formula="of:=[.C118]- (0.25 * [.$J$5]) - IF(WEEKDAY([.B118]; 2) = 5; 60; 0)" office:value-type="float" office:value="2773.04476854128" calcext:value-type="float">
            <text:p>2773,04476854128</text:p>
          </table:table-cell>
          <table:table-cell table:style-name="ce14" table:formula="of:=[.C118] / 10000" office:value-type="percentage" office:value="0.279654476854128" calcext:value-type="percentage">
            <text:p>27,97%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3-06-26" calcext:value-type="date">
            <text:p>26.06.2023</text:p>
          </table:table-cell>
          <table:table-cell table:formula="of:=([.D118] + ([.D118] * 0.0175))" office:value-type="float" office:value="2821.57305199076" calcext:value-type="float">
            <text:p>2821,57305199076</text:p>
          </table:table-cell>
          <table:table-cell table:formula="of:=[.C119]- (0.25 * [.$J$5]) - IF(WEEKDAY([.B119]; 2) = 5; 60; 0)" office:value-type="float" office:value="2798.07305199076" calcext:value-type="float">
            <text:p>2798,07305199076</text:p>
          </table:table-cell>
          <table:table-cell table:style-name="ce14" table:formula="of:=[.C119] / 10000" office:value-type="percentage" office:value="0.282157305199076" calcext:value-type="percentage">
            <text:p>28,22%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3-06-27" calcext:value-type="date">
            <text:p>27.06.2023</text:p>
          </table:table-cell>
          <table:table-cell table:formula="of:=([.D119] + ([.D119] * 0.0175))" office:value-type="float" office:value="2847.03933040059" calcext:value-type="float">
            <text:p>2847,03933040059</text:p>
          </table:table-cell>
          <table:table-cell table:formula="of:=[.C120]- (0.25 * [.$J$5]) - IF(WEEKDAY([.B120]; 2) = 5; 60; 0)" office:value-type="float" office:value="2823.53933040059" calcext:value-type="float">
            <text:p>2823,53933040059</text:p>
          </table:table-cell>
          <table:table-cell table:style-name="ce14" table:formula="of:=[.C120] / 10000" office:value-type="percentage" office:value="0.284703933040059" calcext:value-type="percentage">
            <text:p>28,47%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3-06-28" calcext:value-type="date">
            <text:p>28.06.2023</text:p>
          </table:table-cell>
          <table:table-cell table:formula="of:=([.D120] + ([.D120] * 0.0175))" office:value-type="float" office:value="2872.9512686826" calcext:value-type="float">
            <text:p>2872,9512686826</text:p>
          </table:table-cell>
          <table:table-cell table:formula="of:=[.C121]- (0.25 * [.$J$5]) - IF(WEEKDAY([.B121]; 2) = 5; 60; 0)" office:value-type="float" office:value="2849.4512686826" calcext:value-type="float">
            <text:p>2849,4512686826</text:p>
          </table:table-cell>
          <table:table-cell table:style-name="ce14" table:formula="of:=[.C121] / 10000" office:value-type="percentage" office:value="0.287295126868261" calcext:value-type="percentage">
            <text:p>28,73%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3-06-29" calcext:value-type="date">
            <text:p>29.06.2023</text:p>
          </table:table-cell>
          <table:table-cell table:formula="of:=([.D121] + ([.D121] * 0.0175))" office:value-type="float" office:value="2899.31666588455" calcext:value-type="float">
            <text:p>2899,31666588455</text:p>
          </table:table-cell>
          <table:table-cell table:formula="of:=[.C122]- (0.25 * [.$J$5]) - IF(WEEKDAY([.B122]; 2) = 5; 60; 0)" office:value-type="float" office:value="2875.81666588455" calcext:value-type="float">
            <text:p>2875,81666588455</text:p>
          </table:table-cell>
          <table:table-cell table:style-name="ce14" table:formula="of:=[.C122] / 10000" office:value-type="percentage" office:value="0.289931666588455" calcext:value-type="percentage">
            <text:p>28,99%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3-06-30" calcext:value-type="date">
            <text:p>30.06.2023</text:p>
          </table:table-cell>
          <table:table-cell table:formula="of:=([.D122] + ([.D122] * 0.0175))" office:value-type="float" office:value="2926.14345753753" calcext:value-type="float">
            <text:p>2926,14345753753</text:p>
          </table:table-cell>
          <table:table-cell table:formula="of:=[.C123]- (0.25 * [.$J$5]) - IF(WEEKDAY([.B123]; 2) = 5; 60; 0)" office:value-type="float" office:value="2842.64345753753" calcext:value-type="float">
            <text:p>2842,64345753753</text:p>
          </table:table-cell>
          <table:table-cell table:style-name="ce14" table:formula="of:=[.C123] / 10000" office:value-type="percentage" office:value="0.292614345753753" calcext:value-type="percentage">
            <text:p>29,26%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3-07-01" calcext:value-type="date">
            <text:p>1.07.2023</text:p>
          </table:table-cell>
          <table:table-cell table:formula="of:=([.D123] + ([.D123] * 0.0175))" office:value-type="float" office:value="2892.38971804444" calcext:value-type="float">
            <text:p>2892,38971804444</text:p>
          </table:table-cell>
          <table:table-cell table:formula="of:=[.C124]- (0.25 * [.$J$5]) - IF(WEEKDAY([.B124]; 2) = 5; 60; 0)" office:value-type="float" office:value="2868.88971804444" calcext:value-type="float">
            <text:p>2868,88971804444</text:p>
          </table:table-cell>
          <table:table-cell table:style-name="ce14" table:formula="of:=[.C124] / 10000" office:value-type="percentage" office:value="0.289238971804444" calcext:value-type="percentage">
            <text:p>28,92%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3-07-02" calcext:value-type="date">
            <text:p>2.07.2023</text:p>
          </table:table-cell>
          <table:table-cell table:formula="of:=([.D124] + ([.D124] * 0.0175))" office:value-type="float" office:value="2919.09528811021" calcext:value-type="float">
            <text:p>2919,09528811021</text:p>
          </table:table-cell>
          <table:table-cell table:formula="of:=[.C125]- (0.25 * [.$J$5]) - IF(WEEKDAY([.B125]; 2) = 5; 60; 0)" office:value-type="float" office:value="2895.59528811021" calcext:value-type="float">
            <text:p>2895,59528811021</text:p>
          </table:table-cell>
          <table:table-cell table:style-name="ce14" table:formula="of:=[.C125] / 10000" office:value-type="percentage" office:value="0.291909528811021" calcext:value-type="percentage">
            <text:p>29,19%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3-07-03" calcext:value-type="date">
            <text:p>3.07.2023</text:p>
          </table:table-cell>
          <table:table-cell table:formula="of:=([.D125] + ([.D125] * 0.0175))" office:value-type="float" office:value="2946.26820565214" calcext:value-type="float">
            <text:p>2946,26820565214</text:p>
          </table:table-cell>
          <table:table-cell table:formula="of:=[.C126]- (0.25 * [.$J$5]) - IF(WEEKDAY([.B126]; 2) = 5; 60; 0)" office:value-type="float" office:value="2922.76820565214" calcext:value-type="float">
            <text:p>2922,76820565214</text:p>
          </table:table-cell>
          <table:table-cell table:style-name="ce14" table:formula="of:=[.C126] / 10000" office:value-type="percentage" office:value="0.294626820565214" calcext:value-type="percentage">
            <text:p>29,46%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3-07-04" calcext:value-type="date">
            <text:p>4.07.2023</text:p>
          </table:table-cell>
          <table:table-cell table:formula="of:=([.D126] + ([.D126] * 0.0175))" office:value-type="float" office:value="2973.91664925106" calcext:value-type="float">
            <text:p>2973,91664925106</text:p>
          </table:table-cell>
          <table:table-cell table:formula="of:=[.C127]- (0.25 * [.$J$5]) - IF(WEEKDAY([.B127]; 2) = 5; 60; 0)" office:value-type="float" office:value="2950.41664925106" calcext:value-type="float">
            <text:p>2950,41664925106</text:p>
          </table:table-cell>
          <table:table-cell table:style-name="ce14" table:formula="of:=[.C127] / 10000" office:value-type="percentage" office:value="0.297391664925106" calcext:value-type="percentage">
            <text:p>29,74%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3-07-05" calcext:value-type="date">
            <text:p>5.07.2023</text:p>
          </table:table-cell>
          <table:table-cell table:formula="of:=([.D127] + ([.D127] * 0.0175))" office:value-type="float" office:value="3002.04894061295" calcext:value-type="float">
            <text:p>3002,04894061295</text:p>
          </table:table-cell>
          <table:table-cell table:formula="of:=[.C128]- (0.25 * [.$J$5]) - IF(WEEKDAY([.B128]; 2) = 5; 60; 0)" office:value-type="float" office:value="2978.54894061295" calcext:value-type="float">
            <text:p>2978,54894061295</text:p>
          </table:table-cell>
          <table:table-cell table:style-name="ce14" table:formula="of:=[.C128] / 10000" office:value-type="percentage" office:value="0.300204894061295" calcext:value-type="percentage">
            <text:p>30,02%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3-07-06" calcext:value-type="date">
            <text:p>6.07.2023</text:p>
          </table:table-cell>
          <table:table-cell table:formula="of:=([.D128] + ([.D128] * 0.0175))" office:value-type="float" office:value="3030.67354707368" calcext:value-type="float">
            <text:p>3030,67354707368</text:p>
          </table:table-cell>
          <table:table-cell table:formula="of:=[.C129]- (0.25 * [.$J$5]) - IF(WEEKDAY([.B129]; 2) = 5; 60; 0)" office:value-type="float" office:value="3007.17354707368" calcext:value-type="float">
            <text:p>3007,17354707368</text:p>
          </table:table-cell>
          <table:table-cell table:style-name="ce14" table:formula="of:=[.C129] / 10000" office:value-type="percentage" office:value="0.303067354707368" calcext:value-type="percentage">
            <text:p>30,31%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3-07-07" calcext:value-type="date">
            <text:p>7.07.2023</text:p>
          </table:table-cell>
          <table:table-cell table:formula="of:=([.D129] + ([.D129] * 0.0175))" office:value-type="float" office:value="3059.79908414746" calcext:value-type="float">
            <text:p>3059,79908414746</text:p>
          </table:table-cell>
          <table:table-cell table:formula="of:=[.C130]- (0.25 * [.$J$5]) - IF(WEEKDAY([.B130]; 2) = 5; 60; 0)" office:value-type="float" office:value="2976.29908414746" calcext:value-type="float">
            <text:p>2976,29908414746</text:p>
          </table:table-cell>
          <table:table-cell table:style-name="ce14" table:formula="of:=[.C130] / 10000" office:value-type="percentage" office:value="0.305979908414746" calcext:value-type="percentage">
            <text:p>30,60%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3-07-08" calcext:value-type="date">
            <text:p>8.07.2023</text:p>
          </table:table-cell>
          <table:table-cell table:formula="of:=([.D130] + ([.D130] * 0.0175))" office:value-type="float" office:value="3028.38431812005" calcext:value-type="float">
            <text:p>3028,38431812005</text:p>
          </table:table-cell>
          <table:table-cell table:formula="of:=[.C131]- (0.25 * [.$J$5]) - IF(WEEKDAY([.B131]; 2) = 5; 60; 0)" office:value-type="float" office:value="3004.88431812005" calcext:value-type="float">
            <text:p>3004,88431812005</text:p>
          </table:table-cell>
          <table:table-cell table:style-name="ce14" table:formula="of:=[.C131] / 10000" office:value-type="percentage" office:value="0.302838431812005" calcext:value-type="percentage">
            <text:p>30,28%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3-07-09" calcext:value-type="date">
            <text:p>9.07.2023</text:p>
          </table:table-cell>
          <table:table-cell table:formula="of:=([.D131] + ([.D131] * 0.0175))" office:value-type="float" office:value="3057.46979368715" calcext:value-type="float">
            <text:p>3057,46979368715</text:p>
          </table:table-cell>
          <table:table-cell table:formula="of:=[.C132]- (0.25 * [.$J$5]) - IF(WEEKDAY([.B132]; 2) = 5; 60; 0)" office:value-type="float" office:value="3033.96979368715" calcext:value-type="float">
            <text:p>3033,96979368715</text:p>
          </table:table-cell>
          <table:table-cell table:style-name="ce14" table:formula="of:=[.C132] / 10000" office:value-type="percentage" office:value="0.305746979368715" calcext:value-type="percentage">
            <text:p>30,57%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3-07-10" calcext:value-type="date">
            <text:p>10.07.2023</text:p>
          </table:table-cell>
          <table:table-cell table:formula="of:=([.D132] + ([.D132] * 0.0175))" office:value-type="float" office:value="3087.06426507667" calcext:value-type="float">
            <text:p>3087,06426507667</text:p>
          </table:table-cell>
          <table:table-cell table:formula="of:=[.C133]- (0.25 * [.$J$5]) - IF(WEEKDAY([.B133]; 2) = 5; 60; 0)" office:value-type="float" office:value="3063.56426507667" calcext:value-type="float">
            <text:p>3063,56426507667</text:p>
          </table:table-cell>
          <table:table-cell table:style-name="ce14" table:formula="of:=[.C133] / 10000" office:value-type="percentage" office:value="0.308706426507667" calcext:value-type="percentage">
            <text:p>30,87%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3-07-11" calcext:value-type="date">
            <text:p>11.07.2023</text:p>
          </table:table-cell>
          <table:table-cell table:formula="of:=([.D133] + ([.D133] * 0.0175))" office:value-type="float" office:value="3117.17663971551" calcext:value-type="float">
            <text:p>3117,17663971551</text:p>
          </table:table-cell>
          <table:table-cell table:formula="of:=[.C134]- (0.25 * [.$J$5]) - IF(WEEKDAY([.B134]; 2) = 5; 60; 0)" office:value-type="float" office:value="3093.67663971551" calcext:value-type="float">
            <text:p>3093,67663971551</text:p>
          </table:table-cell>
          <table:table-cell table:style-name="ce14" table:formula="of:=[.C134] / 10000" office:value-type="percentage" office:value="0.311717663971551" calcext:value-type="percentage">
            <text:p>31,17%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3-07-12" calcext:value-type="date">
            <text:p>12.07.2023</text:p>
          </table:table-cell>
          <table:table-cell table:formula="of:=([.D134] + ([.D134] * 0.0175))" office:value-type="float" office:value="3147.81598091053" calcext:value-type="float">
            <text:p>3147,81598091053</text:p>
          </table:table-cell>
          <table:table-cell table:formula="of:=[.C135]- (0.25 * [.$J$5]) - IF(WEEKDAY([.B135]; 2) = 5; 60; 0)" office:value-type="float" office:value="3124.31598091053" calcext:value-type="float">
            <text:p>3124,31598091053</text:p>
          </table:table-cell>
          <table:table-cell table:style-name="ce14" table:formula="of:=[.C135] / 10000" office:value-type="percentage" office:value="0.314781598091053" calcext:value-type="percentage">
            <text:p>31,48%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3-07-13" calcext:value-type="date">
            <text:p>13.07.2023</text:p>
          </table:table-cell>
          <table:table-cell table:formula="of:=([.D135] + ([.D135] * 0.0175))" office:value-type="float" office:value="3178.99151057647" calcext:value-type="float">
            <text:p>3178,99151057647</text:p>
          </table:table-cell>
          <table:table-cell table:formula="of:=[.C136]- (0.25 * [.$J$5]) - IF(WEEKDAY([.B136]; 2) = 5; 60; 0)" office:value-type="float" office:value="3155.49151057647" calcext:value-type="float">
            <text:p>3155,49151057647</text:p>
          </table:table-cell>
          <table:table-cell table:style-name="ce14" table:formula="of:=[.C136] / 10000" office:value-type="percentage" office:value="0.317899151057647" calcext:value-type="percentage">
            <text:p>31,79%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3-07-14" calcext:value-type="date">
            <text:p>14.07.2023</text:p>
          </table:table-cell>
          <table:table-cell table:formula="of:=([.D136] + ([.D136] * 0.0175))" office:value-type="float" office:value="3210.71261201156" calcext:value-type="float">
            <text:p>3210,71261201156</text:p>
          </table:table-cell>
          <table:table-cell table:formula="of:=[.C137]- (0.25 * [.$J$5]) - IF(WEEKDAY([.B137]; 2) = 5; 60; 0)" office:value-type="float" office:value="3127.21261201156" calcext:value-type="float">
            <text:p>3127,21261201156</text:p>
          </table:table-cell>
          <table:table-cell table:style-name="ce14" table:formula="of:=[.C137] / 10000" office:value-type="percentage" office:value="0.321071261201156" calcext:value-type="percentage">
            <text:p>32,11%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3-07-15" calcext:value-type="date">
            <text:p>15.07.2023</text:p>
          </table:table-cell>
          <table:table-cell table:formula="of:=([.D137] + ([.D137] * 0.0175))" office:value-type="float" office:value="3181.93883272176" calcext:value-type="float">
            <text:p>3181,93883272176</text:p>
          </table:table-cell>
          <table:table-cell table:formula="of:=[.C138]- (0.25 * [.$J$5]) - IF(WEEKDAY([.B138]; 2) = 5; 60; 0)" office:value-type="float" office:value="3158.43883272176" calcext:value-type="float">
            <text:p>3158,43883272176</text:p>
          </table:table-cell>
          <table:table-cell table:style-name="ce14" table:formula="of:=[.C138] / 10000" office:value-type="percentage" office:value="0.318193883272176" calcext:value-type="percentage">
            <text:p>31,82%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3-07-16" calcext:value-type="date">
            <text:p>16.07.2023</text:p>
          </table:table-cell>
          <table:table-cell table:formula="of:=([.D138] + ([.D138] * 0.0175))" office:value-type="float" office:value="3213.71151229439" calcext:value-type="float">
            <text:p>3213,71151229439</text:p>
          </table:table-cell>
          <table:table-cell table:formula="of:=[.C139]- (0.25 * [.$J$5]) - IF(WEEKDAY([.B139]; 2) = 5; 60; 0)" office:value-type="float" office:value="3190.21151229439" calcext:value-type="float">
            <text:p>3190,21151229439</text:p>
          </table:table-cell>
          <table:table-cell table:style-name="ce14" table:formula="of:=[.C139] / 10000" office:value-type="percentage" office:value="0.321371151229439" calcext:value-type="percentage">
            <text:p>32,14%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3-07-17" calcext:value-type="date">
            <text:p>17.07.2023</text:p>
          </table:table-cell>
          <table:table-cell table:formula="of:=([.D139] + ([.D139] * 0.0175))" office:value-type="float" office:value="3246.04021375954" calcext:value-type="float">
            <text:p>3246,04021375954</text:p>
          </table:table-cell>
          <table:table-cell table:formula="of:=[.C140]- (0.25 * [.$J$5]) - IF(WEEKDAY([.B140]; 2) = 5; 60; 0)" office:value-type="float" office:value="3222.54021375954" calcext:value-type="float">
            <text:p>3222,54021375954</text:p>
          </table:table-cell>
          <table:table-cell table:style-name="ce14" table:formula="of:=[.C140] / 10000" office:value-type="percentage" office:value="0.324604021375954" calcext:value-type="percentage">
            <text:p>32,46%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3-07-18" calcext:value-type="date">
            <text:p>18.07.2023</text:p>
          </table:table-cell>
          <table:table-cell table:formula="of:=([.D140] + ([.D140] * 0.0175))" office:value-type="float" office:value="3278.93466750033" calcext:value-type="float">
            <text:p>3278,93466750033</text:p>
          </table:table-cell>
          <table:table-cell table:formula="of:=[.C141]- (0.25 * [.$J$5]) - IF(WEEKDAY([.B141]; 2) = 5; 60; 0)" office:value-type="float" office:value="3255.43466750033" calcext:value-type="float">
            <text:p>3255,43466750033</text:p>
          </table:table-cell>
          <table:table-cell table:style-name="ce14" table:formula="of:=[.C141] / 10000" office:value-type="percentage" office:value="0.327893466750033" calcext:value-type="percentage">
            <text:p>32,79%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3-07-19" calcext:value-type="date">
            <text:p>19.07.2023</text:p>
          </table:table-cell>
          <table:table-cell table:formula="of:=([.D141] + ([.D141] * 0.0175))" office:value-type="float" office:value="3312.40477418159" calcext:value-type="float">
            <text:p>3312,40477418159</text:p>
          </table:table-cell>
          <table:table-cell table:formula="of:=[.C142]- (0.25 * [.$J$5]) - IF(WEEKDAY([.B142]; 2) = 5; 60; 0)" office:value-type="float" office:value="3288.90477418159" calcext:value-type="float">
            <text:p>3288,90477418159</text:p>
          </table:table-cell>
          <table:table-cell table:style-name="ce14" table:formula="of:=[.C142] / 10000" office:value-type="percentage" office:value="0.331240477418159" calcext:value-type="percentage">
            <text:p>33,12%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3-07-20" calcext:value-type="date">
            <text:p>20.07.2023</text:p>
          </table:table-cell>
          <table:table-cell table:formula="of:=([.D142] + ([.D142] * 0.0175))" office:value-type="float" office:value="3346.46060772977" calcext:value-type="float">
            <text:p>3346,46060772977</text:p>
          </table:table-cell>
          <table:table-cell table:formula="of:=[.C143]- (0.25 * [.$J$5]) - IF(WEEKDAY([.B143]; 2) = 5; 60; 0)" office:value-type="float" office:value="3322.96060772977" calcext:value-type="float">
            <text:p>3322,96060772977</text:p>
          </table:table-cell>
          <table:table-cell table:style-name="ce14" table:formula="of:=[.C143] / 10000" office:value-type="percentage" office:value="0.334646060772977" calcext:value-type="percentage">
            <text:p>33,46%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3-07-21" calcext:value-type="date">
            <text:p>21.07.2023</text:p>
          </table:table-cell>
          <table:table-cell table:formula="of:=([.D143] + ([.D143] * 0.0175))" office:value-type="float" office:value="3381.11241836504" calcext:value-type="float">
            <text:p>3381,11241836504</text:p>
          </table:table-cell>
          <table:table-cell table:formula="of:=[.C144]- (0.25 * [.$J$5]) - IF(WEEKDAY([.B144]; 2) = 5; 60; 0)" office:value-type="float" office:value="3297.61241836504" calcext:value-type="float">
            <text:p>3297,61241836504</text:p>
          </table:table-cell>
          <table:table-cell table:style-name="ce14" table:formula="of:=[.C144] / 10000" office:value-type="percentage" office:value="0.338111241836504" calcext:value-type="percentage">
            <text:p>33,81%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3-07-22" calcext:value-type="date">
            <text:p>22.07.2023</text:p>
          </table:table-cell>
          <table:table-cell table:formula="of:=([.D144] + ([.D144] * 0.0175))" office:value-type="float" office:value="3355.32063568643" calcext:value-type="float">
            <text:p>3355,32063568643</text:p>
          </table:table-cell>
          <table:table-cell table:formula="of:=[.C145]- (0.25 * [.$J$5]) - IF(WEEKDAY([.B145]; 2) = 5; 60; 0)" office:value-type="float" office:value="3331.82063568643" calcext:value-type="float">
            <text:p>3331,82063568643</text:p>
          </table:table-cell>
          <table:table-cell table:style-name="ce14" table:formula="of:=[.C145] / 10000" office:value-type="percentage" office:value="0.335532063568643" calcext:value-type="percentage">
            <text:p>33,55%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3-07-23" calcext:value-type="date">
            <text:p>23.07.2023</text:p>
          </table:table-cell>
          <table:table-cell table:formula="of:=([.D145] + ([.D145] * 0.0175))" office:value-type="float" office:value="3390.12749681094" calcext:value-type="float">
            <text:p>3390,12749681094</text:p>
          </table:table-cell>
          <table:table-cell table:formula="of:=[.C146]- (0.25 * [.$J$5]) - IF(WEEKDAY([.B146]; 2) = 5; 60; 0)" office:value-type="float" office:value="3366.62749681094" calcext:value-type="float">
            <text:p>3366,62749681094</text:p>
          </table:table-cell>
          <table:table-cell table:style-name="ce14" table:formula="of:=[.C146] / 10000" office:value-type="percentage" office:value="0.339012749681094" calcext:value-type="percentage">
            <text:p>33,90%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3-07-24" calcext:value-type="date">
            <text:p>24.07.2023</text:p>
          </table:table-cell>
          <table:table-cell table:formula="of:=([.D146] + ([.D146] * 0.0175))" office:value-type="float" office:value="3425.54347800513" calcext:value-type="float">
            <text:p>3425,54347800513</text:p>
          </table:table-cell>
          <table:table-cell table:formula="of:=[.C147]- (0.25 * [.$J$5]) - IF(WEEKDAY([.B147]; 2) = 5; 60; 0)" office:value-type="float" office:value="3402.04347800513" calcext:value-type="float">
            <text:p>3402,04347800513</text:p>
          </table:table-cell>
          <table:table-cell table:style-name="ce14" table:formula="of:=[.C147] / 10000" office:value-type="percentage" office:value="0.342554347800513" calcext:value-type="percentage">
            <text:p>34,26%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3-07-25" calcext:value-type="date">
            <text:p>25.07.2023</text:p>
          </table:table-cell>
          <table:table-cell table:formula="of:=([.D147] + ([.D147] * 0.0175))" office:value-type="float" office:value="3461.57923887022" calcext:value-type="float">
            <text:p>3461,57923887022</text:p>
          </table:table-cell>
          <table:table-cell table:formula="of:=[.C148]- (0.25 * [.$J$5]) - IF(WEEKDAY([.B148]; 2) = 5; 60; 0)" office:value-type="float" office:value="3438.07923887022" calcext:value-type="float">
            <text:p>3438,07923887022</text:p>
          </table:table-cell>
          <table:table-cell table:style-name="ce14" table:formula="of:=[.C148] / 10000" office:value-type="percentage" office:value="0.346157923887022" calcext:value-type="percentage">
            <text:p>34,62%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3-07-26" calcext:value-type="date">
            <text:p>26.07.2023</text:p>
          </table:table-cell>
          <table:table-cell table:formula="of:=([.D148] + ([.D148] * 0.0175))" office:value-type="float" office:value="3498.24562555045" calcext:value-type="float">
            <text:p>3498,24562555045</text:p>
          </table:table-cell>
          <table:table-cell table:formula="of:=[.C149]- (0.25 * [.$J$5]) - IF(WEEKDAY([.B149]; 2) = 5; 60; 0)" office:value-type="float" office:value="3474.74562555045" calcext:value-type="float">
            <text:p>3474,74562555045</text:p>
          </table:table-cell>
          <table:table-cell table:style-name="ce14" table:formula="of:=[.C149] / 10000" office:value-type="percentage" office:value="0.349824562555045" calcext:value-type="percentage">
            <text:p>34,98%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3-07-27" calcext:value-type="date">
            <text:p>27.07.2023</text:p>
          </table:table-cell>
          <table:table-cell table:formula="of:=([.D149] + ([.D149] * 0.0175))" office:value-type="float" office:value="3535.55367399758" calcext:value-type="float">
            <text:p>3535,55367399758</text:p>
          </table:table-cell>
          <table:table-cell table:formula="of:=[.C150]- (0.25 * [.$J$5]) - IF(WEEKDAY([.B150]; 2) = 5; 60; 0)" office:value-type="float" office:value="3512.05367399758" calcext:value-type="float">
            <text:p>3512,05367399758</text:p>
          </table:table-cell>
          <table:table-cell table:style-name="ce14" table:formula="of:=[.C150] / 10000" office:value-type="percentage" office:value="0.353555367399758" calcext:value-type="percentage">
            <text:p>35,36%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3-07-28" calcext:value-type="date">
            <text:p>28.07.2023</text:p>
          </table:table-cell>
          <table:table-cell table:formula="of:=([.D150] + ([.D150] * 0.0175))" office:value-type="float" office:value="3573.51461329254" calcext:value-type="float">
            <text:p>3573,51461329254</text:p>
          </table:table-cell>
          <table:table-cell table:formula="of:=[.C151]- (0.25 * [.$J$5]) - IF(WEEKDAY([.B151]; 2) = 5; 60; 0)" office:value-type="float" office:value="3490.01461329254" calcext:value-type="float">
            <text:p>3490,01461329254</text:p>
          </table:table-cell>
          <table:table-cell table:style-name="ce14" table:formula="of:=[.C151] / 10000" office:value-type="percentage" office:value="0.357351461329254" calcext:value-type="percentage">
            <text:p>35,74%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3-07-29" calcext:value-type="date">
            <text:p>29.07.2023</text:p>
          </table:table-cell>
          <table:table-cell table:formula="of:=([.D151] + ([.D151] * 0.0175))" office:value-type="float" office:value="3551.08986902516" calcext:value-type="float">
            <text:p>3551,08986902516</text:p>
          </table:table-cell>
          <table:table-cell table:formula="of:=[.C152]- (0.25 * [.$J$5]) - IF(WEEKDAY([.B152]; 2) = 5; 60; 0)" office:value-type="float" office:value="3527.58986902516" calcext:value-type="float">
            <text:p>3527,58986902516</text:p>
          </table:table-cell>
          <table:table-cell table:style-name="ce14" table:formula="of:=[.C152] / 10000" office:value-type="percentage" office:value="0.355108986902516" calcext:value-type="percentage">
            <text:p>35,51%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3-07-30" calcext:value-type="date">
            <text:p>30.07.2023</text:p>
          </table:table-cell>
          <table:table-cell table:formula="of:=([.D152] + ([.D152] * 0.0175))" office:value-type="float" office:value="3589.3226917331" calcext:value-type="float">
            <text:p>3589,3226917331</text:p>
          </table:table-cell>
          <table:table-cell table:formula="of:=[.C153]- (0.25 * [.$J$5]) - IF(WEEKDAY([.B153]; 2) = 5; 60; 0)" office:value-type="float" office:value="3565.8226917331" calcext:value-type="float">
            <text:p>3565,8226917331</text:p>
          </table:table-cell>
          <table:table-cell table:style-name="ce14" table:formula="of:=[.C153] / 10000" office:value-type="percentage" office:value="0.35893226917331" calcext:value-type="percentage">
            <text:p>35,89%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3-07-31" calcext:value-type="date">
            <text:p>31.07.2023</text:p>
          </table:table-cell>
          <table:table-cell table:formula="of:=([.D153] + ([.D153] * 0.0175))" office:value-type="float" office:value="3628.22458883843" calcext:value-type="float">
            <text:p>3628,22458883843</text:p>
          </table:table-cell>
          <table:table-cell table:formula="of:=[.C154]- (0.25 * [.$J$5]) - IF(WEEKDAY([.B154]; 2) = 5; 60; 0)" office:value-type="float" office:value="3604.72458883843" calcext:value-type="float">
            <text:p>3604,72458883843</text:p>
          </table:table-cell>
          <table:table-cell table:style-name="ce14" table:formula="of:=[.C154] / 10000" office:value-type="percentage" office:value="0.362822458883843" calcext:value-type="percentage">
            <text:p>36,28%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3-08-01" calcext:value-type="date">
            <text:p>1.08.2023</text:p>
          </table:table-cell>
          <table:table-cell table:formula="of:=([.D154] + ([.D154] * 0.0175))" office:value-type="float" office:value="3667.8072691431" calcext:value-type="float">
            <text:p>3667,8072691431</text:p>
          </table:table-cell>
          <table:table-cell table:formula="of:=[.C155]- (0.25 * [.$J$5]) - IF(WEEKDAY([.B155]; 2) = 5; 60; 0)" office:value-type="float" office:value="3644.3072691431" calcext:value-type="float">
            <text:p>3644,3072691431</text:p>
          </table:table-cell>
          <table:table-cell table:style-name="ce14" table:formula="of:=[.C155] / 10000" office:value-type="percentage" office:value="0.36678072691431" calcext:value-type="percentage">
            <text:p>36,68%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3-08-02" calcext:value-type="date">
            <text:p>2.08.2023</text:p>
          </table:table-cell>
          <table:table-cell table:formula="of:=([.D155] + ([.D155] * 0.0175))" office:value-type="float" office:value="3708.08264635311" calcext:value-type="float">
            <text:p>3708,08264635311</text:p>
          </table:table-cell>
          <table:table-cell table:formula="of:=[.C156]- (0.25 * [.$J$5]) - IF(WEEKDAY([.B156]; 2) = 5; 60; 0)" office:value-type="float" office:value="3684.58264635311" calcext:value-type="float">
            <text:p>3684,58264635311</text:p>
          </table:table-cell>
          <table:table-cell table:style-name="ce14" table:formula="of:=[.C156] / 10000" office:value-type="percentage" office:value="0.37080826463531" calcext:value-type="percentage">
            <text:p>37,08%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3-08-03" calcext:value-type="date">
            <text:p>3.08.2023</text:p>
          </table:table-cell>
          <table:table-cell table:formula="of:=([.D156] + ([.D156] * 0.0175))" office:value-type="float" office:value="3749.06284266428" calcext:value-type="float">
            <text:p>3749,06284266428</text:p>
          </table:table-cell>
          <table:table-cell table:formula="of:=[.C157]- (0.25 * [.$J$5]) - IF(WEEKDAY([.B157]; 2) = 5; 60; 0)" office:value-type="float" office:value="3725.56284266428" calcext:value-type="float">
            <text:p>3725,56284266428</text:p>
          </table:table-cell>
          <table:table-cell table:style-name="ce14" table:formula="of:=[.C157] / 10000" office:value-type="percentage" office:value="0.374906284266428" calcext:value-type="percentage">
            <text:p>37,49%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3-08-04" calcext:value-type="date">
            <text:p>4.08.2023</text:p>
          </table:table-cell>
          <table:table-cell table:formula="of:=([.D157] + ([.D157] * 0.0175))" office:value-type="float" office:value="3790.76019241091" calcext:value-type="float">
            <text:p>3790,76019241091</text:p>
          </table:table-cell>
          <table:table-cell table:formula="of:=[.C158]- (0.25 * [.$J$5]) - IF(WEEKDAY([.B158]; 2) = 5; 60; 0)" office:value-type="float" office:value="3707.26019241091" calcext:value-type="float">
            <text:p>3707,26019241091</text:p>
          </table:table-cell>
          <table:table-cell table:style-name="ce14" table:formula="of:=[.C158] / 10000" office:value-type="percentage" office:value="0.379076019241091" calcext:value-type="percentage">
            <text:p>37,91%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3-08-05" calcext:value-type="date">
            <text:p>5.08.2023</text:p>
          </table:table-cell>
          <table:table-cell table:formula="of:=([.D158] + ([.D158] * 0.0175))" office:value-type="float" office:value="3772.1372457781" calcext:value-type="float">
            <text:p>3772,1372457781</text:p>
          </table:table-cell>
          <table:table-cell table:formula="of:=[.C159]- (0.25 * [.$J$5]) - IF(WEEKDAY([.B159]; 2) = 5; 60; 0)" office:value-type="float" office:value="3748.6372457781" calcext:value-type="float">
            <text:p>3748,6372457781</text:p>
          </table:table-cell>
          <table:table-cell table:style-name="ce14" table:formula="of:=[.C159] / 10000" office:value-type="percentage" office:value="0.37721372457781" calcext:value-type="percentage">
            <text:p>37,72%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3-08-06" calcext:value-type="date">
            <text:p>6.08.2023</text:p>
          </table:table-cell>
          <table:table-cell table:formula="of:=([.D159] + ([.D159] * 0.0175))" office:value-type="float" office:value="3814.23839757922" calcext:value-type="float">
            <text:p>3814,23839757922</text:p>
          </table:table-cell>
          <table:table-cell table:formula="of:=[.C160]- (0.25 * [.$J$5]) - IF(WEEKDAY([.B160]; 2) = 5; 60; 0)" office:value-type="float" office:value="3790.73839757922" calcext:value-type="float">
            <text:p>3790,73839757922</text:p>
          </table:table-cell>
          <table:table-cell table:style-name="ce14" table:formula="of:=[.C160] / 10000" office:value-type="percentage" office:value="0.381423839757922" calcext:value-type="percentage">
            <text:p>38,14%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3-08-07" calcext:value-type="date">
            <text:p>7.08.2023</text:p>
          </table:table-cell>
          <table:table-cell table:formula="of:=([.D160] + ([.D160] * 0.0175))" office:value-type="float" office:value="3857.07631953685" calcext:value-type="float">
            <text:p>3857,07631953685</text:p>
          </table:table-cell>
          <table:table-cell table:formula="of:=[.C161]- (0.25 * [.$J$5]) - IF(WEEKDAY([.B161]; 2) = 5; 60; 0)" office:value-type="float" office:value="3833.57631953685" calcext:value-type="float">
            <text:p>3833,57631953685</text:p>
          </table:table-cell>
          <table:table-cell table:style-name="ce14" table:formula="of:=[.C161] / 10000" office:value-type="percentage" office:value="0.385707631953685" calcext:value-type="percentage">
            <text:p>38,57%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3-08-08" calcext:value-type="date">
            <text:p>8.08.2023</text:p>
          </table:table-cell>
          <table:table-cell table:formula="of:=([.D161] + ([.D161] * 0.0175))" office:value-type="float" office:value="3900.66390512875" calcext:value-type="float">
            <text:p>3900,66390512875</text:p>
          </table:table-cell>
          <table:table-cell table:formula="of:=[.C162]- (0.25 * [.$J$5]) - IF(WEEKDAY([.B162]; 2) = 5; 60; 0)" office:value-type="float" office:value="3877.16390512875" calcext:value-type="float">
            <text:p>3877,16390512875</text:p>
          </table:table-cell>
          <table:table-cell table:style-name="ce14" table:formula="of:=[.C162] / 10000" office:value-type="percentage" office:value="0.390066390512875" calcext:value-type="percentage">
            <text:p>39,01%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3-08-09" calcext:value-type="date">
            <text:p>9.08.2023</text:p>
          </table:table-cell>
          <table:table-cell table:formula="of:=([.D162] + ([.D162] * 0.0175))" office:value-type="float" office:value="3945.0142734685" calcext:value-type="float">
            <text:p>3945,0142734685</text:p>
          </table:table-cell>
          <table:table-cell table:formula="of:=[.C163]- (0.25 * [.$J$5]) - IF(WEEKDAY([.B163]; 2) = 5; 60; 0)" office:value-type="float" office:value="3921.5142734685" calcext:value-type="float">
            <text:p>3921,5142734685</text:p>
          </table:table-cell>
          <table:table-cell table:style-name="ce14" table:formula="of:=[.C163] / 10000" office:value-type="percentage" office:value="0.39450142734685" calcext:value-type="percentage">
            <text:p>39,45%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3-08-10" calcext:value-type="date">
            <text:p>10.08.2023</text:p>
          </table:table-cell>
          <table:table-cell table:formula="of:=([.D163] + ([.D163] * 0.0175))" office:value-type="float" office:value="3990.1407732542" calcext:value-type="float">
            <text:p>3990,1407732542</text:p>
          </table:table-cell>
          <table:table-cell table:formula="of:=[.C164]- (0.25 * [.$J$5]) - IF(WEEKDAY([.B164]; 2) = 5; 60; 0)" office:value-type="float" office:value="3966.6407732542" calcext:value-type="float">
            <text:p>3966,6407732542</text:p>
          </table:table-cell>
          <table:table-cell table:style-name="ce14" table:formula="of:=[.C164] / 10000" office:value-type="percentage" office:value="0.39901407732542" calcext:value-type="percentage">
            <text:p>39,90%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3-08-11" calcext:value-type="date">
            <text:p>11.08.2023</text:p>
          </table:table-cell>
          <table:table-cell table:formula="of:=([.D164] + ([.D164] * 0.0175))" office:value-type="float" office:value="4036.05698678615" calcext:value-type="float">
            <text:p>4036,05698678615</text:p>
          </table:table-cell>
          <table:table-cell table:formula="of:=[.C165]- (0.25 * [.$J$5]) - IF(WEEKDAY([.B165]; 2) = 5; 60; 0)" office:value-type="float" office:value="3952.55698678615" calcext:value-type="float">
            <text:p>3952,55698678615</text:p>
          </table:table-cell>
          <table:table-cell table:style-name="ce14" table:formula="of:=[.C165] / 10000" office:value-type="percentage" office:value="0.403605698678615" calcext:value-type="percentage">
            <text:p>40,36%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3-08-12" calcext:value-type="date">
            <text:p>12.08.2023</text:p>
          </table:table-cell>
          <table:table-cell table:formula="of:=([.D165] + ([.D165] * 0.0175))" office:value-type="float" office:value="4021.72673405491" calcext:value-type="float">
            <text:p>4021,72673405491</text:p>
          </table:table-cell>
          <table:table-cell table:formula="of:=[.C166]- (0.25 * [.$J$5]) - IF(WEEKDAY([.B166]; 2) = 5; 60; 0)" office:value-type="float" office:value="3998.22673405491" calcext:value-type="float">
            <text:p>3998,22673405491</text:p>
          </table:table-cell>
          <table:table-cell table:style-name="ce14" table:formula="of:=[.C166] / 10000" office:value-type="percentage" office:value="0.402172673405491" calcext:value-type="percentage">
            <text:p>40,22%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3-08-13" calcext:value-type="date">
            <text:p>13.08.2023</text:p>
          </table:table-cell>
          <table:table-cell table:formula="of:=([.D166] + ([.D166] * 0.0175))" office:value-type="float" office:value="4068.19570190087" calcext:value-type="float">
            <text:p>4068,19570190087</text:p>
          </table:table-cell>
          <table:table-cell table:formula="of:=[.C167]- (0.25 * [.$J$5]) - IF(WEEKDAY([.B167]; 2) = 5; 60; 0)" office:value-type="float" office:value="4044.69570190087" calcext:value-type="float">
            <text:p>4044,69570190087</text:p>
          </table:table-cell>
          <table:table-cell table:style-name="ce14" table:formula="of:=[.C167] / 10000" office:value-type="percentage" office:value="0.406819570190087" calcext:value-type="percentage">
            <text:p>40,68%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3-08-14" calcext:value-type="date">
            <text:p>14.08.2023</text:p>
          </table:table-cell>
          <table:table-cell table:formula="of:=([.D167] + ([.D167] * 0.0175))" office:value-type="float" office:value="4115.47787668413" calcext:value-type="float">
            <text:p>4115,47787668413</text:p>
          </table:table-cell>
          <table:table-cell table:formula="of:=[.C168]- (0.25 * [.$J$5]) - IF(WEEKDAY([.B168]; 2) = 5; 60; 0)" office:value-type="float" office:value="4091.97787668413" calcext:value-type="float">
            <text:p>4091,97787668413</text:p>
          </table:table-cell>
          <table:table-cell table:style-name="ce14" table:formula="of:=[.C168] / 10000" office:value-type="percentage" office:value="0.411547787668413" calcext:value-type="percentage">
            <text:p>41,15%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3-08-15" calcext:value-type="date">
            <text:p>15.08.2023</text:p>
          </table:table-cell>
          <table:table-cell table:formula="of:=([.D168] + ([.D168] * 0.0175))" office:value-type="float" office:value="4163.5874895261" calcext:value-type="float">
            <text:p>4163,5874895261</text:p>
          </table:table-cell>
          <table:table-cell table:formula="of:=[.C169]- (0.25 * [.$J$5]) - IF(WEEKDAY([.B169]; 2) = 5; 60; 0)" office:value-type="float" office:value="4140.0874895261" calcext:value-type="float">
            <text:p>4140,0874895261</text:p>
          </table:table-cell>
          <table:table-cell table:style-name="ce14" table:formula="of:=[.C169] / 10000" office:value-type="percentage" office:value="0.41635874895261" calcext:value-type="percentage">
            <text:p>41,64%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3-08-16" calcext:value-type="date">
            <text:p>16.08.2023</text:p>
          </table:table-cell>
          <table:table-cell table:formula="of:=([.D169] + ([.D169] * 0.0175))" office:value-type="float" office:value="4212.53902059281" calcext:value-type="float">
            <text:p>4212,53902059281</text:p>
          </table:table-cell>
          <table:table-cell table:formula="of:=[.C170]- (0.25 * [.$J$5]) - IF(WEEKDAY([.B170]; 2) = 5; 60; 0)" office:value-type="float" office:value="4189.03902059281" calcext:value-type="float">
            <text:p>4189,03902059281</text:p>
          </table:table-cell>
          <table:table-cell table:style-name="ce14" table:formula="of:=[.C170] / 10000" office:value-type="percentage" office:value="0.421253902059281" calcext:value-type="percentage">
            <text:p>42,13%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3-08-17" calcext:value-type="date">
            <text:p>17.08.2023</text:p>
          </table:table-cell>
          <table:table-cell table:formula="of:=([.D170] + ([.D170] * 0.0175))" office:value-type="float" office:value="4262.34720345319" calcext:value-type="float">
            <text:p>4262,34720345319</text:p>
          </table:table-cell>
          <table:table-cell table:formula="of:=[.C171]- (0.25 * [.$J$5]) - IF(WEEKDAY([.B171]; 2) = 5; 60; 0)" office:value-type="float" office:value="4238.84720345319" calcext:value-type="float">
            <text:p>4238,84720345319</text:p>
          </table:table-cell>
          <table:table-cell table:style-name="ce14" table:formula="of:=[.C171] / 10000" office:value-type="percentage" office:value="0.426234720345319" calcext:value-type="percentage">
            <text:p>42,62%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3-08-18" calcext:value-type="date">
            <text:p>18.08.2023</text:p>
          </table:table-cell>
          <table:table-cell table:formula="of:=([.D171] + ([.D171] * 0.0175))" office:value-type="float" office:value="4313.02702951362" calcext:value-type="float">
            <text:p>4313,02702951362</text:p>
          </table:table-cell>
          <table:table-cell table:formula="of:=[.C172]- (0.25 * [.$J$5]) - IF(WEEKDAY([.B172]; 2) = 5; 60; 0)" office:value-type="float" office:value="4229.52702951362" calcext:value-type="float">
            <text:p>4229,52702951362</text:p>
          </table:table-cell>
          <table:table-cell table:style-name="ce14" table:formula="of:=[.C172] / 10000" office:value-type="percentage" office:value="0.431302702951362" calcext:value-type="percentage">
            <text:p>43,13%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3-08-19" calcext:value-type="date">
            <text:p>19.08.2023</text:p>
          </table:table-cell>
          <table:table-cell table:formula="of:=([.D172] + ([.D172] * 0.0175))" office:value-type="float" office:value="4303.5437525301" calcext:value-type="float">
            <text:p>4303,5437525301</text:p>
          </table:table-cell>
          <table:table-cell table:formula="of:=[.C173]- (0.25 * [.$J$5]) - IF(WEEKDAY([.B173]; 2) = 5; 60; 0)" office:value-type="float" office:value="4280.0437525301" calcext:value-type="float">
            <text:p>4280,0437525301</text:p>
          </table:table-cell>
          <table:table-cell table:style-name="ce14" table:formula="of:=[.C173] / 10000" office:value-type="percentage" office:value="0.43035437525301" calcext:value-type="percentage">
            <text:p>43,04%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3-08-20" calcext:value-type="date">
            <text:p>20.08.2023</text:p>
          </table:table-cell>
          <table:table-cell table:formula="of:=([.D173] + ([.D173] * 0.0175))" office:value-type="float" office:value="4354.94451819938" calcext:value-type="float">
            <text:p>4354,94451819938</text:p>
          </table:table-cell>
          <table:table-cell table:formula="of:=[.C174]- (0.25 * [.$J$5]) - IF(WEEKDAY([.B174]; 2) = 5; 60; 0)" office:value-type="float" office:value="4331.44451819938" calcext:value-type="float">
            <text:p>4331,44451819938</text:p>
          </table:table-cell>
          <table:table-cell table:style-name="ce14" table:formula="of:=[.C174] / 10000" office:value-type="percentage" office:value="0.435494451819938" calcext:value-type="percentage">
            <text:p>43,55%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3-08-21" calcext:value-type="date">
            <text:p>21.08.2023</text:p>
          </table:table-cell>
          <table:table-cell table:formula="of:=([.D174] + ([.D174] * 0.0175))" office:value-type="float" office:value="4407.24479726787" calcext:value-type="float">
            <text:p>4407,24479726787</text:p>
          </table:table-cell>
          <table:table-cell table:formula="of:=[.C175]- (0.25 * [.$J$5]) - IF(WEEKDAY([.B175]; 2) = 5; 60; 0)" office:value-type="float" office:value="4383.74479726787" calcext:value-type="float">
            <text:p>4383,74479726787</text:p>
          </table:table-cell>
          <table:table-cell table:style-name="ce14" table:formula="of:=[.C175] / 10000" office:value-type="percentage" office:value="0.440724479726787" calcext:value-type="percentage">
            <text:p>44,07%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3-08-22" calcext:value-type="date">
            <text:p>22.08.2023</text:p>
          </table:table-cell>
          <table:table-cell table:formula="of:=([.D175] + ([.D175] * 0.0175))" office:value-type="float" office:value="4460.46033122006" calcext:value-type="float">
            <text:p>4460,46033122006</text:p>
          </table:table-cell>
          <table:table-cell table:formula="of:=[.C176]- (0.25 * [.$J$5]) - IF(WEEKDAY([.B176]; 2) = 5; 60; 0)" office:value-type="float" office:value="4436.96033122006" calcext:value-type="float">
            <text:p>4436,96033122006</text:p>
          </table:table-cell>
          <table:table-cell table:style-name="ce14" table:formula="of:=[.C176] / 10000" office:value-type="percentage" office:value="0.446046033122006" calcext:value-type="percentage">
            <text:p>44,60%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3-08-23" calcext:value-type="date">
            <text:p>23.08.2023</text:p>
          </table:table-cell>
          <table:table-cell table:formula="of:=([.D176] + ([.D176] * 0.0175))" office:value-type="float" office:value="4514.60713701641" calcext:value-type="float">
            <text:p>4514,60713701641</text:p>
          </table:table-cell>
          <table:table-cell table:formula="of:=[.C177]- (0.25 * [.$J$5]) - IF(WEEKDAY([.B177]; 2) = 5; 60; 0)" office:value-type="float" office:value="4491.10713701641" calcext:value-type="float">
            <text:p>4491,10713701641</text:p>
          </table:table-cell>
          <table:table-cell table:style-name="ce14" table:formula="of:=[.C177] / 10000" office:value-type="percentage" office:value="0.451460713701641" calcext:value-type="percentage">
            <text:p>45,15%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3-08-24" calcext:value-type="date">
            <text:p>24.08.2023</text:p>
          </table:table-cell>
          <table:table-cell table:formula="of:=([.D177] + ([.D177] * 0.0175))" office:value-type="float" office:value="4569.7015119142" calcext:value-type="float">
            <text:p>4569,7015119142</text:p>
          </table:table-cell>
          <table:table-cell table:formula="of:=[.C178]- (0.25 * [.$J$5]) - IF(WEEKDAY([.B178]; 2) = 5; 60; 0)" office:value-type="float" office:value="4546.2015119142" calcext:value-type="float">
            <text:p>4546,2015119142</text:p>
          </table:table-cell>
          <table:table-cell table:style-name="ce14" table:formula="of:=[.C178] / 10000" office:value-type="percentage" office:value="0.45697015119142" calcext:value-type="percentage">
            <text:p>45,70%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3-08-25" calcext:value-type="date">
            <text:p>25.08.2023</text:p>
          </table:table-cell>
          <table:table-cell table:formula="of:=([.D178] + ([.D178] * 0.0175))" office:value-type="float" office:value="4625.7600383727" calcext:value-type="float">
            <text:p>4625,7600383727</text:p>
          </table:table-cell>
          <table:table-cell table:formula="of:=[.C179]- (0.25 * [.$J$5]) - IF(WEEKDAY([.B179]; 2) = 5; 60; 0)" office:value-type="float" office:value="4542.2600383727" calcext:value-type="float">
            <text:p>4542,2600383727</text:p>
          </table:table-cell>
          <table:table-cell table:style-name="ce14" table:formula="of:=[.C179] / 10000" office:value-type="percentage" office:value="0.46257600383727" calcext:value-type="percentage">
            <text:p>46,26%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3-08-26" calcext:value-type="date">
            <text:p>26.08.2023</text:p>
          </table:table-cell>
          <table:table-cell table:formula="of:=([.D179] + ([.D179] * 0.0175))" office:value-type="float" office:value="4621.74958904422" calcext:value-type="float">
            <text:p>4621,74958904422</text:p>
          </table:table-cell>
          <table:table-cell table:formula="of:=[.C180]- (0.25 * [.$J$5]) - IF(WEEKDAY([.B180]; 2) = 5; 60; 0)" office:value-type="float" office:value="4598.24958904422" calcext:value-type="float">
            <text:p>4598,24958904422</text:p>
          </table:table-cell>
          <table:table-cell table:style-name="ce14" table:formula="of:=[.C180] / 10000" office:value-type="percentage" office:value="0.462174958904422" calcext:value-type="percentage">
            <text:p>46,22%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3-08-27" calcext:value-type="date">
            <text:p>27.08.2023</text:p>
          </table:table-cell>
          <table:table-cell table:formula="of:=([.D180] + ([.D180] * 0.0175))" office:value-type="float" office:value="4678.71895685249" calcext:value-type="float">
            <text:p>4678,71895685249</text:p>
          </table:table-cell>
          <table:table-cell table:formula="of:=[.C181]- (0.25 * [.$J$5]) - IF(WEEKDAY([.B181]; 2) = 5; 60; 0)" office:value-type="float" office:value="4655.21895685249" calcext:value-type="float">
            <text:p>4655,21895685249</text:p>
          </table:table-cell>
          <table:table-cell table:style-name="ce14" table:formula="of:=[.C181] / 10000" office:value-type="percentage" office:value="0.467871895685249" calcext:value-type="percentage">
            <text:p>46,79%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3-08-28" calcext:value-type="date">
            <text:p>28.08.2023</text:p>
          </table:table-cell>
          <table:table-cell table:formula="of:=([.D181] + ([.D181] * 0.0175))" office:value-type="float" office:value="4736.68528859741" calcext:value-type="float">
            <text:p>4736,68528859741</text:p>
          </table:table-cell>
          <table:table-cell table:formula="of:=[.C182]- (0.25 * [.$J$5]) - IF(WEEKDAY([.B182]; 2) = 5; 60; 0)" office:value-type="float" office:value="4713.18528859741" calcext:value-type="float">
            <text:p>4713,18528859741</text:p>
          </table:table-cell>
          <table:table-cell table:style-name="ce14" table:formula="of:=[.C182] / 10000" office:value-type="percentage" office:value="0.473668528859741" calcext:value-type="percentage">
            <text:p>47,37%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3-08-29" calcext:value-type="date">
            <text:p>29.08.2023</text:p>
          </table:table-cell>
          <table:table-cell table:formula="of:=([.D182] + ([.D182] * 0.0175))" office:value-type="float" office:value="4795.66603114786" calcext:value-type="float">
            <text:p>4795,66603114786</text:p>
          </table:table-cell>
          <table:table-cell table:formula="of:=[.C183]- (0.25 * [.$J$5]) - IF(WEEKDAY([.B183]; 2) = 5; 60; 0)" office:value-type="float" office:value="4772.16603114786" calcext:value-type="float">
            <text:p>4772,16603114786</text:p>
          </table:table-cell>
          <table:table-cell table:style-name="ce14" table:formula="of:=[.C183] / 10000" office:value-type="percentage" office:value="0.479566603114786" calcext:value-type="percentage">
            <text:p>47,96%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3-08-30" calcext:value-type="date">
            <text:p>30.08.2023</text:p>
          </table:table-cell>
          <table:table-cell table:formula="of:=([.D183] + ([.D183] * 0.0175))" office:value-type="float" office:value="4855.67893669295" calcext:value-type="float">
            <text:p>4855,67893669295</text:p>
          </table:table-cell>
          <table:table-cell table:formula="of:=[.C184]- (0.25 * [.$J$5]) - IF(WEEKDAY([.B184]; 2) = 5; 60; 0)" office:value-type="float" office:value="4832.17893669295" calcext:value-type="float">
            <text:p>4832,17893669295</text:p>
          </table:table-cell>
          <table:table-cell table:style-name="ce14" table:formula="of:=[.C184] / 10000" office:value-type="percentage" office:value="0.485567893669295" calcext:value-type="percentage">
            <text:p>48,56%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3-08-31" calcext:value-type="date">
            <text:p>31.08.2023</text:p>
          </table:table-cell>
          <table:table-cell table:formula="of:=([.D184] + ([.D184] * 0.0175))" office:value-type="float" office:value="4916.74206808508" calcext:value-type="float">
            <text:p>4916,74206808508</text:p>
          </table:table-cell>
          <table:table-cell table:formula="of:=[.C185]- (0.25 * [.$J$5]) - IF(WEEKDAY([.B185]; 2) = 5; 60; 0)" office:value-type="float" office:value="4893.24206808508" calcext:value-type="float">
            <text:p>4893,24206808508</text:p>
          </table:table-cell>
          <table:table-cell table:style-name="ce14" table:formula="of:=[.C185] / 10000" office:value-type="percentage" office:value="0.491674206808508" calcext:value-type="percentage">
            <text:p>49,17%</text:p>
          </table:table-cell>
          <table:table-cell table:number-columns-repeated="5"/>
        </table:table-row>
        <table:table-row table:style-name="ro1" table:number-rows-repeated="104839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dwaita Sans1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Adwaita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.00.0000</text:date>, <text:time style:data-style-name="N2" text:time-value="09:46:30.949563361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5-27T10:36:45.189823573</dc:date>
    <meta:editing-duration>PT39M2S</meta:editing-duration>
    <meta:editing-cycles>26</meta:editing-cycles>
    <meta:document-statistic meta:table-count="5" meta:cell-count="6759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34">
      <number:month number:style="long"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292cm" svg:y="0.316cm" chart:style-name="ch2">
          <text:p>Średnia temperatura w poszczególnych miesiącach roku</text:p>
        </chart:title>
        <chart:legend chart:legend-position="end" svg:x="13.276cm" svg:y="4.201cm" style:legend-expansion="high" chart:style-name="ch3"/>
        <chart:plot-area chart:style-name="ch4" svg:x="1.331cm" svg:y="1.275cm" svg:width="11.625cm" svg:height="6.564cm">
          <chart:coordinate-region svg:x="1.965cm" svg:y="1.474cm" svg:width="10.991cm" svg:height="4.605cm"/>
          <chart:axis chart:dimension="x" chart:name="primary-x" chart:style-name="ch5" chartooo:axis-type="auto">
            <chartooo:date-scale/>
            <chart:title svg:x="6.548cm" svg:y="8.019cm" chart:style-name="ch2">
              <text:p><text:span text:style-name="T1">Miesiąć</text:span></text:p>
            </chart:title>
            <chart:categories table:cell-range-address="Zadanie1.G2:Zadanie1.G13"/>
          </chart:axis>
          <chart:axis chart:dimension="y" chart:name="primary-y" chart:style-name="ch6">
            <chart:title svg:x="0.451cm" svg:y="6.061cm" chart:style-name="ch7">
              <text:p><text:span text:style-name="T1">Średnia temperatura</text:span></text:p>
            </chart:title>
            <chart:grid chart:style-name="ch8" chart:class="major"/>
          </chart:axis>
          <chart:series chart:style-name="ch9" chart:values-cell-range-address="Zadanie1.H2:Zadanie1.H13" chart:label-cell-address="Zadanie1.H1:Zadanie1.H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Zadanie1.H1:Zadanie1.H1</svg:desc>
                </draw:g>
              </table:table-cell>
            </table:table-row>
          </table:table-header-rows>
          <table:table-rows>
            <table:table-row>
              <table:table-cell office:value-type="float" office:value="44562">
                <text:p>44562</text:p>
                <draw:g>
                  <svg:desc>Zadanie1.G2:Zadanie1.G13</svg:desc>
                </draw:g>
              </table:table-cell>
              <table:table-cell office:value-type="float" office:value="1.1">
                <text:p>1.1</text:p>
                <draw:g>
                  <svg:desc>Zadanie1.H2:Zadanie1.H13</svg:desc>
                </draw:g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